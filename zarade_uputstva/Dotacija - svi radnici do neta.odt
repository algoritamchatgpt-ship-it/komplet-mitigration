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4000000384B2BDA6B2.png"/>
  <manifest:file-entry manifest:media-type="image/png" manifest:full-path="Pictures/10000201000006400000038409DA83C2.png"/>
  <manifest:file-entry manifest:media-type="image/png" manifest:full-path="Pictures/1000020100000640000003843DE94BB7.png"/>
  <manifest:file-entry manifest:media-type="image/png" manifest:full-path="Pictures/1000000000000640000003849576E431.png"/>
  <manifest:file-entry manifest:media-type="image/png" manifest:full-path="Pictures/1000020100000640000003840807DC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ETO OBRAČUN</text:span></text:p>
      <text:p text:style-name="P1"/>
      <text:p text:style-name="P1">NOVA POLJA – DOTACIJA</text:p>
      <text:p text:style-name="P1"/>
      <text:p text:style-name="P2"><text:tab/>Ova opcija je predviđena za one obračune u kojima jedan ili više zaposlenih ostvaruje zaradu nižu od minimalne zarade za ČASOVE OSNOVNE ZARADE, ČASOVE DODATAKA NA ZARADU ILI ČASOVE NAKNADE i u kojima se minuli rad obračunava na sve iznose vezane za časove po učinku i časove dodataka na zaradu – u PARAMETRIMA 1 u polje minuli rad uneti broj 3 = NA NETO OBRAČUN. <text:span text:style-name="T1">NETO</text:span> iznos minimalne zarade se unosi kroz PARAMETRE 1, u polju minimalna zarada, za zakonski broj časova u mesecu za koji se radi obračun zarade. </text:p>
      <text:p text:style-name="P2"/>
      <text:p text:style-name="P2"><draw:frame draw:style-name="fr2" draw:name="графика2" text:anchor-type="paragraph" svg:x="0.0181in" svg:y="0.022in" svg:width="7.0945in" svg:height="6.5839in" draw:z-index="1"><draw:image xlink:href="Pictures/100002010000064000000384B2BDA6B2.png" xlink:type="simple" xlink:show="embed" xlink:actuate="onLoad"/></draw:frame></text:p>
      <text:p text:style-name="P2"/>
      <text:p text:style-name="P2"><text:tab/>Ova opcija koristi se nakon obračuna – kada se utvrdi da je jedan ili više iznosa manji od minimalne zarade. Svi iznosi se dotiraju do iznosa važeće minimalne zarade po času za određeni mesec. </text:p>
      <text:p text:style-name="P2"><text:tab/></text:p>
      <text:p text:style-name="P2"/>
      <text:p text:style-name="P2"><text:soft-page-break/><text:tab/>Dakle, uneti su podaci u PARAMETRIMA 1 za način obračuna minulog rada i minimalna zarada za mesec za koji radite obračun zarade, uneti su zaposleni, uneti su časovi za dodatke na zaradu, časovi naknada ( za koje je urađen obračun naknada kroz program na osnovu dvanaestomesečnog proseka ) i urađen je OBRAČUN NETO. Utvrđeno je da u obračunu postoje zaposleni koji imaju iznose manje od propisne minimalne zarade po času i prelazimo na dotaciju. Koraci su sledeći: <text:s/></text:p>
      <text:p text:style-name="P1"/>
      <text:p text:style-name="P2"><text:tab/>PLATNI SPISAK &gt; PRENOSI &gt; DOTACIJA &gt; SVI RADNICI DO NETA</text:p>
      <text:p text:style-name="P2"/>
      <text:p text:style-name="P2"><draw:frame draw:style-name="fr3" draw:name="графика4" text:anchor-type="paragraph" svg:width="6.6929in" svg:height="3.7646in" draw:z-index="3"><draw:image xlink:href="Pictures/1000020100000640000003840807DCE6.png" xlink:type="simple" xlink:show="embed" xlink:actuate="onLoad"/></draw:frame></text:p>
      <text:p text:style-name="P2"><draw:frame draw:style-name="fr3" draw:name="графика6" text:anchor-type="paragraph" svg:width="6.6929in" svg:height="3.7646in" draw:z-index="4"><draw:image xlink:href="Pictures/10000201000006400000038409DA83C2.png" xlink:type="simple" xlink:show="embed" xlink:actuate="onLoad"/></draw:frame></text:p>
      <text:p text:style-name="P2"><draw:frame draw:style-name="fr1" draw:name="графика1" text:anchor-type="paragraph" svg:width="6.7154in" svg:height="5.4772in" draw:z-index="0"><draw:image xlink:href="Pictures/1000000000000640000003849576E431.png" xlink:type="simple" xlink:show="embed" xlink:actuate="onLoad"/></draw:frame><text:soft-page-break/></text:p>
      <text:p text:style-name="P2"><text:tab/>Na ekranu vam se pojavila poruka: Završeno je računanje dotacije. <text:span text:style-name="T1">Pustite ponovo neto obračun kako bi se preračunao ponovo minuli rad i ostali podaci. </text:span>Sada samo ponovite obračun i iskontrolišite podatke.</text:p>
      <text:p text:style-name="P2"><text:tab/></text:p>
      <text:p text:style-name="P2"><text:tab/></text:p>
      <text:p text:style-name="P2"/>
      <text:p text:style-name="P2"><text:tab/>Na kartici F7 ili na listiću dodata su polja u kojima se nalaze iznosi dotacija:</text:p>
      <text:p text:style-name="P1"/>
      <text:list xml:id="list7453737960767920605" text:style-name="L1">
        <text:list-item>
          <text:p text:style-name="P3">DOTACIJA NA OSNOVNU ZARADU - <text:s/>u ovom polju je iznos dotacije za časove po učinku.</text:p>
          <text:p text:style-name="P3"/>
        </text:list-item>
        <text:list-item>
          <text:p text:style-name="P3">RAZLIKA DOTACIJE NA DODATKE – u ovom polju je zbirni iznos dotacije za sve časove dodataka.</text:p>
          <text:p text:style-name="P3"><text:s/></text:p>
        </text:list-item>
        <text:list-item>
          <text:p text:style-name="P3">RAZLIKA DOTACIJE NA NAKNADE – u ovom polju je zbirni iznos dotacije za sve časove naknada.</text:p>
        </text:list-item>
      </text:list>
      <text:p text:style-name="P2"/>
      <text:p text:style-name="P2"><draw:frame draw:style-name="fr1" draw:name="графика3" text:anchor-type="paragraph" svg:width="6.6453in" svg:height="5.0654in" draw:z-index="2"><draw:image xlink:href="Pictures/1000020100000640000003843DE94BB7.png" xlink:type="simple" xlink:show="embed" xlink:actuate="onLoad"/></draw:frame><text:soft-page-break/></text:p>
      <text:p text:style-name="P2"><text:tab/>Minuli rad je obračunat i na iznose dotacija na osnovnu zaradu i na iznose dotacija na dodatke.</text:p>
      <text:p text:style-name="P2"/>
      <text:p text:style-name="P2"><text:tab/>Ukoliko menjate unos časova nakon dotacije ili neki drugi podatak iz već urađenog obračuna ili parametara, iskoristite opciju BRISANJE DOTACIJE, pa ponovite sve opisane korake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20-11-09T10:27:02.89</meta:creation-date>
    <meta:document-statistic meta:table-count="0" meta:image-count="5" meta:object-count="0" meta:page-count="4" meta:paragraph-count="17" meta:word-count="357" meta:character-count="2093"/>
    <dc:date>2020-11-09T13:25:27.35</dc:date>
    <dc:creator>Jozef Brnić</dc:creator>
    <meta:editing-duration>PT5M44S</meta:editing-duration>
    <meta:editing-cycles>1</meta:editing-cycles>
    <meta:generator>OpenOffice/4.1.1$Win32 OpenOffice.org_project/411m6$Build-9775</meta:generator>
  </office:meta>
</office:document-meta>
</file>