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ела1" style:family="table">
      <style:table-properties style:width="6.6931in" table:align="left"/>
    </style:style>
    <style:style style:name="Табела1.A" style:family="table-column">
      <style:table-column-properties style:column-width="6.6931in"/>
    </style:style>
    <style:style style:name="Табела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able_20_Contents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Табела1" table:style-name="Табела1">
        <table:table-column table:style-name="Табела1.A"/>
        <table:table-row>
          <table:table-cell table:style-name="Табела1.A1" office:value-type="string">
            <text:h text:style-name="Heading_20_1" text:outline-level="1">ZAKON O DOPRINOSIMA ZA OBAVEZNO SOCIJALNO OSIGURANJE </text:h>
            <text:p text:style-name="P2">("Sl. glasnik RS", br. 84/2004, 61/2005, 62/2006, 5/2009, 52/2011, 101/2011, 7/2012 - usklađeni din. izn., 8/2013 - usklađeni din. izn., 47/2013, 108/2013, 6/2014 - usklađeni din. izn., 57/2014, 68/2014 - dr. zakon, 5/2015 - usklađeni din. izn., 112/2015, 5/2016 - usklađeni din. izn., 7/2017 - usklađeni din. izn., 113/2017 i 7/2018 - usklađeni din. izn.)</text:p>
          </table:table-cell>
        </table:table-row>
      </table:table>
      <text:p text:style-name="Text_20_body"> </text:p>
      <text:p text:style-name="Text_20_body"/>
      <text:p text:style-name="Text_20_body">VIII OBRAČUNAVANJE, UTVRĐIVANJE I PLAĆANJE DOPRINOSA </text:p>
      <text:p text:style-name="P1">Član 52</text:p>
      <text:p text:style-name="Text_20_body">Ako se zarada isplaćuje u delovima, a prvi deo zarade je manji od najniže mesečne osnovice doprinosa, poslodavac je dužan da prilikom isplate prvog dela zarade, obračuna i plati doprinose na najnižu mesečnu osnovicu doprinos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09-14T12:56:33.07</meta:creation-date>
    <meta:document-statistic meta:table-count="1" meta:image-count="0" meta:object-count="0" meta:page-count="1" meta:paragraph-count="6" meta:word-count="105" meta:character-count="696"/>
    <dc:date>2018-09-14T13:00:59.57</dc:date>
    <dc:creator>Jozef Brnić</dc:creator>
    <meta:editing-duration>PT4M27S</meta:editing-duration>
    <meta:editing-cycles>1</meta:editing-cycles>
    <meta:generator>OpenOffice/4.1.1$Win32 OpenOffice.org_project/411m6$Build-9775</meta:generator>
  </office:meta>
</office:document-meta>
</file>