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start" style:justify-single-word="false"/>
      <style:text-properties fo:font-weight="normal" style:font-weight-asian="normal" style:font-weight-complex="normal"/>
    </style:style>
    <style:style style:name="P4" style:family="paragraph" style:parent-style-name="Standard">
      <style:paragraph-properties fo:line-height="100%" fo:text-align="start" style:justify-single-word="false"/>
      <style:text-properties fo:font-weight="bold" style:font-weight-asian="bold" style:font-weight-complex="bold"/>
    </style:style>
    <style:style style:name="P5" style:family="paragraph" style:parent-style-name="Standard">
      <style:paragraph-properties fo:line-height="100%"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RAČUN NAKNADA</text:p>
      <text:p text:style-name="P1">NA OSNOVU DVANAESOMESEČNOG PROSEKA</text:p>
      <text:p text:style-name="P1"/>
      <text:p text:style-name="P2"><text:tab/>Prvi korak u obrčunu naknada je arhiviranje zarada koje su vam potrebne za obračun. Pogledate uputstvo za ARHIVA ZARADA. Ovaj korak je neophodan bez obzira koje naknade obračunavate. Kada formirate odgovarajuću arhivu, dvanaest meseci koji prethode obračunu koji radite, kliknite na dugme: </text:p>
      <text:p text:style-name="P1"/>
      <text:p text:style-name="P2"><text:tab/><text:span text:style-name="T1">SALDO ZA NAKNADE</text:span> – Dobićete pregled podataka o zaradi i naknadama zarada po času za sve zaposlene. Klikom na crveni krstić za zatvaranje tabele, dobijate pregled zarada po satu za period koji ste obuhvatili arhivom zarada i možete ga štampti. Zatim kliknite na dugme </text:p>
      <text:p text:style-name="P2"/>
      <text:p text:style-name="P4"><text:tab/>IZLAZ. </text:p>
      <text:p text:style-name="P3"/>
      <text:p text:style-name="P2"><text:span text:style-name="T2"><text:tab/>U </text:span><text:span text:style-name="T1">PARAMETRIMA 2</text:span><text:span text:style-name="T2"> izaberite VRSTU OBRAČUNA i MESEC za koji radite obračun, unesite zaposlene i časove u platni spisak, unesite časove naknada na karticama F7, a zatim pređite na </text:span></text:p>
      <text:p text:style-name="P3"><text:tab/></text:p>
      <text:p text:style-name="P2"><text:span text:style-name="T1"><text:tab/>OBRAČUN NAKNADA –</text:span><text:span text:style-name="T2"> Otvorili ste tabelu EVIDENCIJA RADNIKA. Ispod tabele su dugmad GORE, DOLE, ZADNJI i PRVI koji služe za kretanje kroz tabelu. Dugme DODAJ+ služi za dodavanje reda ukoliko je to potrebno. Kliknite sada na dugme</text:span></text:p>
      <text:p text:style-name="P3"/>
      <text:p text:style-name="P2"><text:span text:style-name="T2"><text:tab/></text:span><text:span text:style-name="T1">PRENOS IZ ARHIVE – </text:span><text:span text:style-name="T2">Time ste preneli podatke koje ste arhivirali. Ukoliko radite BRUTO obračune DOBILI STE BRUTO podatak cene rada po času , ukoliko radite NETO obračune DOBILI STE NETO podatak cene rada po času. Utvrdite da li na spisku svi zaposleni imaju iznos veći od propisane minimalne zarade i obratite pažnju na one kojima radite obračun naknade za bolovanje 65% do 30 ili preko 30 dana. Program automatski obračunava 65% cene rada po času i taj iznos unosi u karticu zaposlenog. Sada kliknite na dugme: <text:s text:c="3"/></text:span></text:p>
      <text:p text:style-name="P3"><text:s/></text:p>
      <text:p text:style-name="P2"><text:span text:style-name="T1"><text:tab/>OBRAČUN NAKNADA – </text:span><text:span text:style-name="T2">Dobijeni podaci automatski su preneti u prethodno formiran platni spisak. Sada pređite u PLATNI SPISAK obračuna zarade koja sadrži časove naknada. Na karticama F7 možete utvrditi da su časovi naknada obračunati. </text:span></text:p>
      <text:p text:style-name="P2"><text:span text:style-name="T2"><text:tab/></text:span><text:span text:style-name="T1">Ukoliko radite obračun zarada</text:span><text:span text:style-name="T2">, kada kliknete na dugme za obračun, unesite cenu rada, a u ponuđeno polje OBRAČUNATI NAKNADE unesite veliko slovo </text:span><text:span text:style-name="T1">N da biste zadržali već obračunate i unete iznose iz obračuna naknada.</text:span><text:span text:style-name="T2"> Kada završite obračun ČASOVI NAKNADA kod svakog zaposlenog kod koga ste uneli broj časova naknada biće obračunati na osnovu cene rada po času </text:span><text:span text:style-name="T1">iz obračuna naknada</text:span><text:span text:style-name="T2">, a ostali časovi biće </text:span><text:span text:style-name="T1">obračunati po ceni rada koju ste uneli u toku samog obračuna.</text:span></text:p>
      <text:p text:style-name="P2"><text:span text:style-name="T1"><text:tab/>Ukoliko radite OBRAČUN BOLOVANJA PREKO 30 DANA - </text:span><text:span text:style-name="T2">kada kliknete na dugme za obračun, cena rada je nebitna, zato što u kartici zaposlenog nemate časove po učinku, a u ponuđeno polje OBRAČUNATI NAKNADE unesite veliko slovo </text:span><text:span text:style-name="T1">N da biste zadržali već obračunate i unete iznose iz obračuna naknada za časove bolovanja. Obračunat iznos za časove bolovanja preko 30 dana obavezno još jednom uporedite sa minimalnom zaradom.</text:span></text:p>
      <text:p text:style-name="P2"><text:span text:style-name="T1"/></text:p>
      <text:p text:style-name="P2"><text:span text:style-name="T1"><text:tab/>Za obrasce bolovanja preko 30 dana postoji posebno uputst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zef Brnić</meta:initial-creator>
    <meta:creation-date>2018-04-11T13:19:54.57</meta:creation-date>
    <dc:date>2022-04-08T13:37:26.17</dc:date>
    <dc:creator>Jozef Brnić</dc:creator>
    <meta:editing-duration>PT7H30M53S</meta:editing-duration>
    <meta:editing-cycles>8</meta:editing-cycles>
    <meta:generator>OpenOffice/4.1.1$Win32 OpenOffice.org_project/411m6$Build-9775</meta:generator>
    <meta:document-statistic meta:table-count="0" meta:image-count="0" meta:object-count="0" meta:page-count="1" meta:paragraph-count="14" meta:word-count="430" meta:character-count="2704"/>
  </office:meta>
</office:document-meta>
</file>