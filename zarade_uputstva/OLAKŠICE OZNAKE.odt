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ff6600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11111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ff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ff3333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ff3333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1c1c1c" fo:font-size="10pt" style:font-size-asian="10pt" style:font-size-complex="10pt"/>
    </style:style>
    <style:style style:name="P9" style:family="paragraph" style:parent-style-name="Default" style:list-style-name="">
      <style:paragraph-properties style:text-autospace="none"/>
    </style:style>
    <style:style style:name="T1" style:family="text">
      <style:text-properties fo:color="#000000" style:font-name="Times New Roman" fo:font-size="8.5pt" style:font-name-asian="Arial1" style:font-size-asian="8.5pt" style:font-name-complex="Arial1" style:font-size-complex="8.5pt"/>
    </style:style>
    <style:style style:name="T2" style:family="text">
      <style:text-properties fo:color="#000000" style:font-name="Times New Roman" style:font-name-asian="Arial1" style:font-name-complex="Arial1"/>
    </style:style>
    <style:style style:name="T3" style:family="text">
      <style:text-properties fo:color="#000000" style:font-name="Times New Roman" style:font-name-asian="Arial1" style:font-name-complex="Arial1"/>
    </style:style>
    <style:style style:name="T4" style:family="text">
      <style:text-properties fo:color="#000000" style:font-name="Arial1" fo:font-size="8.5pt" style:font-name-asian="Arial1" style:font-size-asian="8.5pt" style:font-name-complex="Arial1" style:font-size-complex="8.5pt"/>
    </style:style>
    <style:style style:name="T5" style:family="text">
      <style:text-properties fo:color="#000000" style:font-name="Arial1" style:font-name-asian="Arial1" style:font-name-complex="Arial1"/>
    </style:style>
    <style:style style:name="T6" style:family="text">
      <style:text-properties fo:color="#000000" style:text-line-through-style="none" style:font-name="Arial1" fo:font-size="8.5pt" style:text-underline-style="none" style:font-name-asian="Arial1" style:font-size-asian="8.5pt" style:font-name-complex="Arial1" style:font-size-complex="8.5pt"/>
    </style:style>
    <style:style style:name="T7" style:family="text">
      <style:text-properties style:font-name="Times New Roman" style:font-name-asian="Arial1" style:font-name-complex="Arial1"/>
    </style:style>
    <style:style style:name="T8" style:family="text">
      <style:text-properties fo:color="#ff6600"/>
    </style:style>
    <style:style style:name="T9" style:family="text">
      <style:text-properties fo:color="#0000ff" style:font-name="Times New Roman" style:font-name-asian="Arial1" style:font-name-complex="Arial1"/>
    </style:style>
    <style:style style:name="T10" style:family="text">
      <style:text-properties fo:color="#1c1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LAKŠICE </text:p>
      <text:p text:style-name="P1"/>
      <text:p text:style-name="P1"><text:tab/>Oznaka olakšice je deo ŠIFRE PRIHODA u tabeli EVIDENCIJA RADNIKA. </text:p>
      <text:p text:style-name="P1"><text:tab/>Oznaku olakšice unosite u polje OZNOLAKS. Sve oznake evidentirane su u programu u istoj tabeli kroz dugme UPUTSTVO ZA PPP PD.</text:p>
      <text:p text:style-name="P1"/>
      <text:p text:style-name="P1"><text:s/>OZNOLAKS = oznaka olakšice.</text:p>
      <text:p text:style-name="P1"><text:tab/></text:p>
      <text:p text:style-name="P1">00 <text:s/>- bez poreske olakšice.</text:p>
      <text:p text:style-name="P2"/>
      <text:p text:style-name="P7">Sledeće oznake olakšica nisu više u u upotrebi:</text:p>
      <text:p text:style-name="P1"/>
      <text:p text:style-name="P3">01 <text:s/>- poreska olakšica pripravnika mladjeg od 30 godina - nije više u upotrebi.</text:p>
      <text:p text:style-name="P3">02 <text:s/>- poreska olakšica lica mlađja od 30 godina - nije više u upotrebi.</text:p>
      <text:p text:style-name="P3"/>
      <text:p text:style-name="P4">Olakšica za zaposlene invalide:</text:p>
      <text:p text:style-name="P3"/>
      <text:p text:style-name="P1">03 <text:s/>- poreska olakšica zaposleni invalidi.</text:p>
      <text:p text:style-name="P1"/>
      <text:p text:style-name="P1"><text:tab/><text:span text:style-name="T2">Zarada i druga primanja koja imaju karakter zarade iz čl. 13, 14, 14a i 14b Zakona, osim lične zarade <text:tab/>preduzetnika, novozaposlenog lica sa invaliditetom, uključujući zaposlenog u privrednom društvu čiji je <text:tab/>osnivač, odnosno član sa pravom poslodavca na olakšicu za zapošljavanje po Zakonu i Zakonu o doprinosima <text:tab/>za obavezno socijalno osiguranje ("Službeni glasnik RS", br. 84/04, 61/05, 62/06, 5/09, 52/11, 101/11, 47/13, <text:tab/>108/13, 57/14, 68/14 - dr. zakon, 112/15, 113/17, 95/18, 86/19, 153/20, 44/21 i 118/21 - Zakon o doprinosima).</text:span></text:p>
      <text:p text:style-name="P1"><text:span text:style-name="T2"><text:tab/></text:span></text:p>
      <text:p text:style-name="P1"><text:span text:style-name="T2"><text:tab/>Pored oznake olakšice 03, potrebno je popuniti kolone: UMANJENJE slovima: IN i kolonu DOPUMANJ u <text:tab/>koju unosite procenat olakšice = 100.</text:span></text:p>
      <text:p text:style-name="P1"><text:span text:style-name="T2"><text:tab/>Cela šifra prihoda za zaposlenog invalida je 1 07 101 03 0. </text:span></text:p>
      <text:p text:style-name="P1"><text:span text:style-name="T2"/></text:p>
      <text:p text:style-name="P7"><text:span text:style-name="T7">Sledeće oznake olakšica nisu više u u upotrebi:</text:span></text:p>
      <text:p text:style-name="P1"><text:span text:style-name="T2"/></text:p>
      <text:p text:style-name="P3">04 <text:s/>- poreska olakšica starije od 45 a mlađe od 50 godina - nije više u upotrebi,</text:p>
      <text:p text:style-name="P3">05 <text:s/>- poreska olakšica starije od 50 godina - nije više u upotrebi,</text:p>
      <text:p text:style-name="P3">06 <text:s/>- subvencija mlađi od 30 i stariji od 45 godina - nije više u upotrebi,</text:p>
      <text:p text:style-name="P3">07 <text:s/>- subvencija stariji od 30 i mlađi od 45 godina - nije više u upotrebi,</text:p>
      <text:p text:style-name="P1"/>
      <text:p text:style-name="P1"><text:tab/>Za sledeće olakšice u program unosite samo oznaku olakšice. Doprinosi se obračunavaju i plaćaju, a olakšica <text:tab/>se ostvaruje kroz ZAHTEV O POVRAĆAJU.</text:p>
      <text:p text:style-name="P1"/>
      <text:p text:style-name="P1">08 <text:s/>- pravo na povraćaj 65% plaćenog poreza i plaćenih doprinosa,</text:p>
      <text:p text:style-name="P1"><text:s text:c="6"/><text:tab/><text:span text:style-name="T2">Zarada i druga primanja koja imaju karakter zarade iz čl. 13, 14, 14a i 14b Zakona, osim lične zarade <text:tab/>preduzetnika, novozaposlenog lica, uključujući zaposlenog u privrednom društvu čiji je osnivač, odnosno <text:tab/>član, <text:tab/>sa pravom poslodavca na povraćaj 65% plaćenog poreza na zaradu i plaćenih doprinosa za novozaposleno lice <text:tab/>po članu 21v Zakona i članu 45. Zakona o doprinosima. </text:span></text:p>
      <text:p text:style-name="P1"><text:span text:style-name="T2"/></text:p>
      <text:p text:style-name="P1">09 <text:s/>- pravo na povraćaj 70% plaćenog poreza i plaćenih doprinosa</text:p>
      <text:p text:style-name="P1"><text:s text:c="6"/><text:tab/><text:span text:style-name="T2">Zarada i druga primanja koja imaju karakter zarade iz čl. 13, 14, 14a i 14b Zakona, osim lične zarade <text:tab/>preduzetnika, novozaposlenog lica, uključujući zaposlenog u privrednom društvu čiji je osnivač, odnosno član, <text:tab/>sa pravom poslodavca na povraćaj 70% plaćenog poreza na zaradu i plaćenih doprinosa za novozaposleno lice <text:tab/>po članu 21v Zakona i članu 45. Zakona o doprinosima. </text:span></text:p>
      <text:p text:style-name="P1"><text:span text:style-name="T2"/></text:p>
      <text:p text:style-name="P1">10 <text:s/>- pravo na povraćaj 75% plaćenog poreza i plaćenih doprinosa.</text:p>
      <text:p text:style-name="P1"><text:s text:c="5"/><text:tab/><text:span text:style-name="T2">Zarada i druga primanja koja imaju karakter zarade iz čl. 13, 14, 14a i 14b Zakona, osim lične zarade <text:tab/>preduzetnika, novozaposlenog lica, uključujući zaposlenog u privrednom društvu čiji je osnivač, odnosno član, <text:tab/>sa pravom poslodavca na povraćaj 75% plaćenog poreza na zaradu i plaćenih doprinosa za novozaposleno lice <text:tab/>po članu 21v Zakona i članu 45. Zakona o doprinosima.</text:span></text:p>
      <text:p text:style-name="P1"><text:span text:style-name="T2"/></text:p>
      <text:p text:style-name="P1">11 <text:s/>- pravo na povraćaj 75% plaćenog poreza i plaćenih doprinosa</text:p>
      <text:p text:style-name="P1"><text:s text:c="6"/><text:tab/><text:span text:style-name="T2">Zarada i druga primanja koja imaju karakter zarade iz čl. 13, 14, 14a i 14b Zakona, osim lične zarade <text:tab/>preduzetnika, novozaposlenog lica u mikro i malom pravnom licu i kod preduzetnika, uključujući zaposlenog u <text:tab/>privrednom društvu (mikro i malo pravno lice) čiji je osnivač, odnosno član, sa pravom poslodavca na povraćaj <text:tab/>75% plaćenog poreza na zaradu i plaćenih doprinosa za novozaposleno lice po članu 21d Zakona i članu 45v </text:span></text:p>
      <text:p text:style-name="P1"><text:span text:style-name="T2"><text:tab/>Zakona o doprinosima. </text:span></text:p>
      <text:p text:style-name="P1"><text:soft-page-break/><text:span text:style-name="T2"><text:tab/></text:span><text:span text:style-name="T9">Sledeće oznake olakšica KORISTI ISKLJUČIVO PORESKA UPRAVA KADA PREDAJE PPP PD NAKON ODOBRENJA VAŠEG ZAHTEVA ZA POVRAĆAJ. OVE ŠIFRE SE NE KORISTE U PROGRAMU.</text:span></text:p>
      <text:p text:style-name="P5"><text:span text:style-name="T7"/></text:p>
      <text:p text:style-name="P5">18 <text:s/>- pravo na povraćaj 65% plaćenog poreza na zaradu i plaćenih doprinosa,</text:p>
      <text:p text:style-name="P5"><text:s text:c="6"/>za novozaposleno lice po članu 21v Zakona i članu 45. Zakona o doprinosima,</text:p>
      <text:p text:style-name="P5">19 <text:s/>- pravo na povraćaj 70% plaćenog poreza na zaradu i plaćenih doprinosa,</text:p>
      <text:p text:style-name="P5"><text:s text:c="6"/>za novozaposleno lice po članu 21v Zakona i članu 45. Zakona o doprinosima,</text:p>
      <text:p text:style-name="P5">20 <text:s/>- pravo na povraćaj 75% plaćenog poreza na zaradu i plaćenih doprinosa,</text:p>
      <text:p text:style-name="P5"><text:s text:c="6"/>za novozaposleno lice po članu 21v Zakona i članu 45. Zakona o doprinosima,</text:p>
      <text:p text:style-name="P5">21 <text:s/>- pravo na povraćaj 75% plaćenog poreza na zaradu i plaćenih doprinosa</text:p>
      <text:p text:style-name="P5"><text:s text:c="6"/>za novozaposleno lice po članu 21d Zakona i članu 45v Zakona o doprinosima.</text:p>
      <text:p text:style-name="P5"/>
      <text:p text:style-name="P7"><text:span text:style-name="T7">Sledeće oznake olakšica nisu više u u upotrebi:</text:span></text:p>
      <text:p text:style-name="P1"><text:span text:style-name="T8"/></text:p>
      <text:p text:style-name="P1"><text:span text:style-name="T8">22 <text:s/>- pravo na poresko oslobođenje u skladu sa članom 21đ Zakona i članom 45g - nije više u upotrebi.</text:span></text:p>
      <text:p text:style-name="P3"><text:s text:c="6"/><text:tab/><text:span text:style-name="T7">Zarada i druga primanja koja imaju karakter zarade iz čl. 13, 14, 14a i 14b Zakona osnivača pravnog lica koji <text:tab/>je zasnovao radni odnos u tom licu, odnosno lična zarada preduzetnika, zarada zaposlenog koji je zasnovao <text:tab/>radni odnos kod novoosnovanog pravnog lica, odnosno novoosnovanog preduzetnika, sa pravom na poresko <text:tab/>oslobođenje u skladu sa članom 21đ Zakona i članom 45g Zakona o doprinosima, isplaćena zaključno sa 16. <text:tab/>decembrom 2019. godine.</text:span></text:p>
      <text:p text:style-name="P6">23 <text:s/>- pravo na oslobođenje u skladu sa clanom 21đ Zakona i članom 45g Zakona o doprinosima,</text:p>
      <text:p text:style-name="P6"><text:s text:c="6"/>u primeni počev od 1. januara 2019. godine - nije više u upotrebi.</text:p>
      <text:p text:style-name="P6"/>
      <text:p text:style-name="P6"><text:tab/><text:span text:style-name="T10">Oznake za olakšice sa umanjenjima: </text:span></text:p>
      <text:p text:style-name="P8"/>
      <text:p text:style-name="P1">24 <text:s/>- pravo na umanjenje za 70% osnovice poreza na zaradu i doprinosa</text:p>
      <text:p text:style-name="P1"><text:s text:c="5"/><text:tab/><text:span text:style-name="T2">Zarada i druga primanja koja imaju karakter zarade iz čl. 13, 14, 14a i 14b Zakona, osim lične zarade <text:tab/>preduzetnika, novonastanjenog obveznika sa pravom na umanjenje za 70% osnovice poreza na zaradu i <text:tab/>doprinosa po članu 15v Zakona. </text:span></text:p>
      <text:p text:style-name="P1">25 <text:s/>- zarada osnivaca novoosnovanog privrednog društva koje obavlja inovacionu delatnost,</text:p>
      <text:p text:style-name="P1"><text:s text:c="4"/><text:tab/><text:span text:style-name="T2">Zarada i druga primanja koja imaju karakter zarade iz čl. 13, 14, 14a i 14b Zakona, osnivača novoosnovanog <text:tab/>privrednog društva koje obavlja inovacionu delatnost, sa pravom na oslobođenje u skladu sa članom 21e <text:tab/>Zakona i članom 45d Zakona o doprinosima, </text:span></text:p>
      <text:p text:style-name="P1">26 <text:s/>70% poreza i 100 % doprinosa za PIO za period 01.01. - 31.12.2020. godine,</text:p>
      <text:p text:style-name="P1">27 <text:s/>65% poreza i 95% doprinosa za PIO za period 01.01. - 31.12.2021. godine,</text:p>
      <text:p text:style-name="P1">28 <text:s/>60% poreza i 85% doprinosa za PIO za period 01.01. - 31.12.2022. godine.</text:p>
      <text:p text:style-name="P1">29 Zarada kvalifikovanog novozaposlenog lica, sa oslobodjenjem od placanja 60% poreza i 85% doprinosa za PIO</text:p>
      <text:p text:style-name="P1"><text:s text:c="5"/>od 1. januara 2022. godine do 31. decembra 2022. godine.</text:p>
      <text:p text:style-name="P1">30 Zarada kvalifikovanog novozaposlenog lica, sa oslobodjenjem od placanja 57% poreza i 82% doprinosa za PIO</text:p>
      <text:p text:style-name="P1"><text:s text:c="5"/>od 1. januara 2022. godine do 31. decembra 2022. godine.</text:p>
      <text:p text:style-name="P1">31 Zarada kvalifikovanog novozaposlenog lica, sa oslobodjenjem od placanja 50% poreza i 75% doprinosa za PIO</text:p>
      <text:p text:style-name="P1"><text:s text:c="5"/>od 1. januara 2023. godine do 31. decembra 2023. godine.</text:p>
      <text:p text:style-name="P1">32 Zarada kvalifikovanog novozaposlenog lica, sa oslobodjenjem od placanja 47% poreza i 72% doprinosa za PIO</text:p>
      <text:p text:style-name="P1"><text:s text:c="5"/>od 1. januara 2023. godine do 31. decembra 2023. godine.</text:p>
      <text:p text:style-name="P1">33 Zarada kvalifikovanog novozaposlenog lica, sa oslobodjenjem od placanja 40% poreza i 65% doprinosa za PIO</text:p>
      <text:p text:style-name="P1"><text:s text:c="5"/>od 1. januara 2024. godine do 31. decembra 2024. godine.</text:p>
      <text:p text:style-name="P1">34 Zarada kvalifikovanog novozaposlenog lica, sa oslobodjenjem od placanja 37% poreza i 62% doprinosa za PIO</text:p>
      <text:p text:style-name="P1"><text:s text:c="5"/>od 1. januara 2024. godine do 31. decembra 2024. godine.</text:p>
      <text:p text:style-name="P1">35 Zarada kvalifikovanog novozaposlenog lica, sa oslobodjenjem od placanja 30% poreza i 55% doprinosa za PIO</text:p>
      <text:p text:style-name="P1"><text:s text:c="5"/>od 1. januara 2025. godine do 31. decembra 2025. godine.</text:p>
      <text:p text:style-name="P1">36 Zarada kvalifikovanog novozaposlenog lica, sa oslobodjenjem od placanja 27% poreza i 52% doprinosa za PIO</text:p>
      <text:p text:style-name="P1"><text:s text:c="5"/>od 1. januara 2025. godine do 31. decembra 2025. godine</text:p>
      <text:p text:style-name="P1">37 Zarada novozaposlenog lica, sa oslobodjenjem od placanja 70% poreza i 100% doprinosa za PIO</text:p>
      <text:p text:style-name="P1"><text:s text:c="5"/>od 1. marta 2022. godine.</text:p>
      <text:p text:style-name="P1">38 Zarada zaposlenog, sa oslobodjenjem od placanja 70% poreza i 100% doprinosa za PIO</text:p>
      <text:p text:style-name="P1"><text:s text:c="5"/>od 1. marta 2022. godin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22-05-31T12:05:45.64</meta:creation-date>
    <meta:document-statistic meta:table-count="0" meta:image-count="0" meta:object-count="0" meta:page-count="2" meta:paragraph-count="72" meta:word-count="1234" meta:character-count="7672"/>
    <dc:date>2022-05-31T16:19:25.93</dc:date>
    <dc:creator>Jozef Brnić</dc:creator>
    <meta:editing-duration>PT1M50S</meta:editing-duration>
    <meta:editing-cycles>1</meta:editing-cycles>
    <meta:generator>OpenOffice/4.1.1$Win32 OpenOffice.org_project/411m6$Build-9775</meta:generator>
  </office:meta>
</office:document-meta>
</file>