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language="zxx" fo:country="non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00e5ad"/>
    </style:style>
    <style:style style:name="P6" style:family="paragraph" style:parent-style-name="Standard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zxx" fo:country="none"/>
    </style:style>
    <style:style style:name="T3" style:family="text">
      <style:text-properties fo:language="zxx" fo:country="none" fo:font-weight="bold" style:font-weight-asian="bold" style:font-weight-complex="bold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RADA MANJA OD NAJNIŽE OSNOVICE ILI </text:p>
      <text:p text:style-name="P1">VEĆA OD NAJVIŠE OSNOVICE</text:p>
      <text:p text:style-name="P1"/>
      <text:p text:style-name="P2"><text:tab/>Obračun raditi isključivo u BRUTO OBRAČUNU. Moja preporuka je da se koristi CENA RADA i <text:span text:style-name="T2">KOEFICIJENT</text:span> 1, a ne FIKSNA ZARADA zbog obračuna naknada, minulog rada i eventualnog bolovanja do 30 dana. Ukoliko je dogovorena MINIMALNA ZARADA, svakog meseca se vrši preračun CENE RADA shodno broju časova u mesecu.</text:p>
      <text:p text:style-name="P2"><text:tab/></text:p>
      <text:p text:style-name="P1"/>
      <text:p text:style-name="P2"><text:tab/>Koristiti formulu za preračun neta na bruto:</text:p>
      <text:p text:style-name="P2"/>
      <text:p text:style-name="P2"><text:s text:c="66"/>NETO – UPO x SP + SD</text:p>
      <text:p text:style-name="P2"><text:tab/><text:tab/><text:tab/><text:tab/>BRUTO = ----------------------------------</text:p>
      <text:p text:style-name="P2"><text:s text:c="86"/>0,9</text:p>
      <text:p text:style-name="P2"/>
      <text:p text:style-name="P2"><text:tab/>NETO – UGOVORENA NETO ZARADA za dati procenat angažovanja </text:p>
      <text:p text:style-name="P2"><text:tab/>UPO – NEOPOREZIVI IZNOS ZARADE ( UMANJENJE PORESKE OSNOVICE ) </text:p>
      <text:p text:style-name="P2"><text:tab/>SP – STOPA POREZA </text:p>
      <text:p text:style-name="P2">IZNOS PORSKOG OSLOBOĐENJA JE PROPORCIONALAN RADNOM ANGAŽOVANJU</text:p>
      <text:p text:style-name="P2"><text:tab/>SD – IZNOS DOPRINOSA <text:s/>NA TERET ZAPOSLENOG OBRAČUNATIH NA NAJNIŽU <text:s text:c="2"/>OSNOVICU ( 19.9 % ) ili NA NAJVIŠU OSNOVICU SHODNO VAŠEM SLUČAJU.</text:p>
      <text:p text:style-name="P2"><text:tab/></text:p>
      <text:p text:style-name="P2"><text:tab/>Dobijeni bruto iznos podelite sa časovima radnog angažovanja zaposlenog da bi ste dobili bruto iznos po času i pomnožite sa ukupnim brojem časova rada za dati mesec. Taj iznos koristite za bruto obračun kao cenu rada sa koeficijentom 1, za dati procenat angažovanja. U obračun unosite časove shodno procentu angažovanja. </text:p>
      <text:p text:style-name="P2"><text:tab/>U evidenciji zaposlenih unesite podatke u polja: MFP3PROC – procenat angažovanja, MFP8 - oznaka 1 i ROPNR - oznaka 1.</text:p>
      <text:p text:style-name="P2"/>
      <text:p text:style-name="P2">PRIMER : <text:span text:style-name="T2">Radnik po ugovoru radi 30</text:span><text:span text:style-name="T1">% </text:span><text:span text:style-name="T2">radnog vremena za 8000 dinara. Obračun radimo za mesec koji ima 168 radnih časova. </text:span></text:p>
      <text:p text:style-name="P3"/>
      <text:p text:style-name="P2"><text:span text:style-name="T2"><text:tab/><text:tab/>PROCENAT ANGAŽOVANJA =</text:span> <text:span text:style-name="T2">3</text:span>0<text:span text:style-name="T1">% </text:span><text:span text:style-name="T2">.</text:span></text:p>
      <text:p text:style-name="P2"><text:span text:style-name="T2"><text:s/><text:tab/><text:tab/></text:span><text:span text:style-name="T1">NETO </text:span><text:span text:style-name="T2">= 8 000,00</text:span></text:p>
      <text:p text:style-name="P2"><text:span text:style-name="T2"><text:tab/><text:tab/>ČASOVI RADA = 168 x 30</text:span><text:span text:style-name="T1">% </text:span><text:span text:style-name="T2">= <text:s/>50,4</text:span></text:p>
      <text:p text:style-name="P2"><text:span text:style-name="T2"><text:tab/><text:tab/>UPO x SP x 30</text:span><text:span text:style-name="T1">% </text:span><text:span text:style-name="T2">= 16 300 x 10</text:span><text:span text:style-name="T1">% </text:span><text:span text:style-name="T2"><text:s/>x 30</text:span><text:span text:style-name="T1">% <text:s/></text:span><text:span text:style-name="T2">=</text:span><text:span text:style-name="T1"> <text:s/>489</text:span><text:span text:style-name="T2">,00</text:span><text:span text:style-name="T1"> </text:span></text:p>
      <text:p text:style-name="P2"><text:span text:style-name="T2"><text:tab/><text:tab/></text:span><text:span text:style-name="T3">VAŽEĆA NAJNIŽA OSNOVICA </text:span><text:span text:style-name="T2">= 25 801,00<text:tab/><text:tab/><text:tab/></text:span></text:p>
      <text:p text:style-name="P2"><text:tab/><text:tab/><text:span text:style-name="T2">SD = 25 801,00 x 19,9</text:span><text:span text:style-name="T1">% <text:s/></text:span><text:span text:style-name="T2">= </text:span><text:s/>5 134,399</text:p>
      <text:p text:style-name="P2"/>
      <text:p text:style-name="P2"/>
      <text:p text:style-name="P2"><text:tab/><text:tab/><text:tab/><text:span text:style-name="T2">8 000,00 – 489,00 + 5 134,399</text:span></text:p>
      <text:p text:style-name="P3"><text:tab/>BRUTO = <text:s/>------------------------------------------ = 14 050,44</text:p>
      <text:p text:style-name="P3"><text:tab/><text:tab/><text:tab/><text:tab/><text:tab/>0,9</text:p>
      <text:p text:style-name="P3"/>
      <text:p text:style-name="P3"><text:tab/>ZA KOEFICIJENT = 1</text:p>
      <text:p text:style-name="P3"/>
      <text:p text:style-name="P3"><text:tab/><text:tab/><text:tab/><text:tab/><text:tab/><text:tab/>14 050,44</text:p>
      <text:p text:style-name="P3"><text:tab/>CENA RADA ZA OBRAČUN = ------------------------- x 168 = 46 834,81</text:p>
      <text:p text:style-name="P2"><text:s text:c="64"/><text:tab/> <text:s text:c="5"/><text:span text:style-name="T2">50,4</text:span></text:p>
      <text:p text:style-name="P2"/>
      <text:p text:style-name="P2"/>
      <text:p text:style-name="P5"><text:s text:c="12"/></text:p>
      <text:p text:style-name="P5"><text:soft-page-break/><text:s text:c="53"/>ZARADA MANJA OD NAJNIŽE OSNOVICE ILI </text:p>
      <text:p text:style-name="P1">VEĆA OD NAJVIŠE OSNOVICE</text:p>
      <text:p text:style-name="P1"/>
      <text:p text:style-name="P2"><text:tab/>Obračun raditi isključivo u BRUTO OBRAČUNU. Moja preporuka je da se koristi CENA RADA i <text:span text:style-name="T2">KOEFICIJENT</text:span> 1, a ne FIKSNA ZARADA zbog obračuna naknada, minulog rada i eventualnog bolovanja do 30 dana. Ukoliko je dogovorena MINIMALNA ZARADA, svakog meseca se vrši preračun CENE RADA shodno broju časova u mesecu.</text:p>
      <text:p text:style-name="P2"><text:tab/></text:p>
      <text:p text:style-name="P1"/>
      <text:p text:style-name="P2"><text:tab/>Koristiti formulu za preračun neta na bruto:</text:p>
      <text:p text:style-name="P2"/>
      <text:p text:style-name="P2"><text:s text:c="66"/>NETO – UPO x SP + SD</text:p>
      <text:p text:style-name="P2"><text:tab/><text:tab/><text:tab/><text:tab/>BRUTO = ----------------------------------</text:p>
      <text:p text:style-name="P2"><text:s text:c="86"/>0,9</text:p>
      <text:p text:style-name="P2"/>
      <text:p text:style-name="P2"><text:tab/>NETO – UGOVORENA NETO ZARADA za dati procenat angažovanja </text:p>
      <text:p text:style-name="P2"><text:tab/>UPO – NEOPOREZIVI IZNOS ZARADE ( UMANJENJE PORESKE OSNOVICE ) </text:p>
      <text:p text:style-name="P2"><text:span text:style-name="T4">ZA NEPUNO RADNO VREME UTVRDITI PROPORCIONALNO OSLOBOĐENJE PREMA NOMINALNIM ČASOVIMA RADA ZA DATI MESEC</text:span> <text:span text:style-name="T4">I ČASOVIMA PO UČINKU.</text:span></text:p>
      <text:p text:style-name="P2"><text:tab/>SP – STOPA POREZA </text:p>
      <text:p text:style-name="P2">IZNOS PORSKOG OSLOBOĐENJA JE PROPORCIONALAN RADNOM ANGAŽOVANJU</text:p>
      <text:p text:style-name="P2"><text:tab/>SD – IZNOS DOPRINOSA <text:s/>NA TERET ZAPOSLENOG OBRAČUNATIH NA NAJNIŽU <text:s text:c="2"/>OSNOVICU ( 19.9 % ) ili NA NAJVIŠU OSNOVICU SHODNO VAŠEM SLUČAJU.</text:p>
      <text:p text:style-name="P2"><text:span text:style-name="T5">ZA NEPUNO RADNO VREME UTVRDITI </text:span><text:span text:style-name="T6">PROPORCIONALNU NAJVIŠU OSNOVICU</text:span><text:span text:style-name="T5"> PREMA NOMINALNIM ČASOVIMA RADA ZA DATI MESEC I ČASOVIMA PO UČINKU ako bruto za nepuno radno vreme prelazi najvišu osnovicu.</text:span><text:tab/></text:p>
      <text:p text:style-name="P2"><text:tab/>Dobijeni bruto iznos podelite sa časovima radnog angažovanja zaposlenog da bi ste dobili bruto iznos po času i pomnožite sa ukupnim brojem časova rada za dati mesec. Taj iznos koristite za bruto obračun kao cenu rada sa koeficijentom 1, za dati procenat angažovanja. U obračun unosite časove shodno procentu angažovanja. </text:p>
      <text:p text:style-name="P2"><text:tab/>U evidenciji zaposlenih unesite podatke u polja: MFP3PROC – procenat angažovanja, MFP8 - oznaka 1 i ROPNR - oznaka 1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zef Brnić</meta:initial-creator>
    <meta:editing-duration>PT4H19M59S</meta:editing-duration>
    <meta:editing-cycles>11</meta:editing-cycles>
    <meta:generator>LibreOffice/7.5.0.3$Windows_X86_64 LibreOffice_project/c21113d003cd3efa8c53188764377a8272d9d6de</meta:generator>
    <dc:date>2023-11-21T15:55:20.945000000</dc:date>
    <meta:document-statistic meta:table-count="0" meta:image-count="0" meta:object-count="0" meta:page-count="2" meta:paragraph-count="48" meta:word-count="530" meta:character-count="3803" meta:non-whitespace-character-count="2778"/>
  </office:meta>
</office:document-meta>
</file>