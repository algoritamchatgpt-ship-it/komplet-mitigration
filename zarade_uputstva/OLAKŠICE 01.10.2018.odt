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line-height="150%"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fo:font-style="italic"/>
    </style:style>
    <style:style style:name="P5"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ŠIFRA PRIHODA:</text:p>
      <text:p text:style-name="P1"><text:s text:c="2"/>101 22 0</text:p>
      <text:p text:style-name="P1"><text:s/></text:p>
      <text:p text:style-name="P1"><text:s/></text:p>
      <text:p text:style-name="P1">Član 45g <text:s/>ZAKONA O DOPRINOSIMA</text:p>
      <text:p text:style-name="Text_20_body">Poslodavac - novoosnovano pravno lice, kao i novoosnovani preduzetnik, koji je upisan u registar nadležnog organa, odnosno organizacije, može da ostvari pravo na oslobođenje od plaćanja doprinosa na teret zaposlenog i na teret poslodavca po osnovu zarade osnivača, odnosno po osnovu lične zarade preduzetnika, kao i po osnovu zarade zaposlenih i to najviše za devet novozaposlenih lica sa kojima je zasnovao radni odnos.</text:p>
      <text:p text:style-name="Text_20_body">Pravo na oslobođenje iz stava 1. ovog člana po osnovu zarade osnivača može da se ostvari ukoliko je osnivač, odnosno svaki od osnivača ako ih je više, zasnovao radni odnos u tom pravnom licu, odnosno po osnovu zarade za najviše devet novozaposlenih kod pravnog lica odnosno preduzetnika, ukoliko je lice prijavljeno na obavezno socijalno osiguranje u Centralni registar obaveznog socijalnog osiguranja i u periodu od najmanje šest meseci neprekidno pre dana osnivanja pravnog lica odnosno zasnivanja radnog odnosa kod poslodavca kod Nacionalne službe za zapošljavanje bilo prijavljeno kao nezaposleni, ili je u periodu od 12 meseci pre dana osnivanja odnosno zasnivanja radnog odnosa kod poslodavca steklo srednje, više ili visoko obrazovanje.</text:p>
      <text:p text:style-name="Text_20_body">Pravo na oslobođenje iz stava 1. ovog člana, poslodavac može da ostvari za zarade osnivača i zaposlenog odnosno lične zarade preduzetnika isplaćene u periodu od 12 meseci od dana kada je osnovano pravno lice, odnosno registrovan preduzetnik, čiji zbir pojedinačno za svako lice u periodu korišćenja olakšice nije viši od trostrukog iznosa prosečne godišnje zarade u godini koja prethodi godini u kojoj je osnovano pravno lice, odnosno registrovan preduzetnik.</text:p>
      <text:p text:style-name="Text_20_body">Pravo na olakšicu prestaje po isteku perioda iz stava 3. ovog člana, odnosno na dan kada se izvrši isplata zarade osnivača i zaposlenog odnosno lične zarade preduzetnika, koja u zbiru sa ostalim zaradama za to lice isplaćenim od početka ostvarivanja prava na olakšicu, tj. od dana osnivanja pravnog lica, odnosno registrovanja preduzetnika, prelazi iznos iz stava 3. ovog člana, i poslodavac je dužan da obračuna i plati doprinose po osnovu zarade odnosno lične zarade na onaj deo te zarade odnosno lične zarade, koji kao deo zbira sa prethodno isplaćenim zaradama odnosno ličnim zaradama, je viši od iznosa iz stava 3. ovog člana, kao i da za naredne zarade isplaćene tim licima obračunava i plaća doprinose u skladu sa zakonom.</text:p>
      <text:p text:style-name="Text_20_body">Zarada osnivača i zaposlenog, odnosno lična zarada preduzetnika, iz stava 3. ovog člana, za koju može da se ostvari oslobođenje je iznos koji u sebi sadrži pripadajući porez i doprinose koji bi se plaćali iz zarade da se ne primenjuje oslobođenje.</text:p>
      <text:p text:style-name="Text_20_body">Oslobođenje iz stava 1. ovog člana lice koje je osnivač, odnosno preduzetnik može da ostvari samo jednom kao novoosnovani subjekt, i to u svojstvu ili kao osnivač ili kao preduzetnik.</text:p>
      <text:p text:style-name="Text_20_body">Pravo na oslobođenje iz stava 1. ovog člana poslodavac ostvaruje pod sledećim uslovima:</text:p>
      <text:p text:style-name="Text_20_body">1) da je svaki član - osnivač novoosnovanog pravnog lica zasnovao radni odnos sa pravnim licem i da je prijavljen na obavezno socijalno osiguranje u Centralni registar obaveznog socijalnog osiguranja;</text:p>
      <text:p text:style-name="Text_20_body">2) da je novoosnovani preduzetnik prijavljen na obavezno socijalno osiguranje u Centralni registar obaveznog socijalnog osiguranja;</text:p>
      <text:p text:style-name="Text_20_body">3) da je poslodavac zaključio ugovor o radu sa novozaposlenim licima u skladu sa zakonom kojim se uređuju radni odnosi i da je ta lica prijavio na obavezno socijalno osiguranje u Centralni registar obaveznog socijalnog osiguranja;</text:p>
      <text:p text:style-name="Text_20_body"><text:soft-page-break/>4) da u periodu za koji ostvaruje pravo na oslobođenje to pravo može da ostvari za najviše devet novozaposlenih koji ispunjavaju uslove;</text:p>
      <text:p text:style-name="Text_20_body">5) da su osnivači novoosnovanog pravnog lica, kao i preduzetnik, u periodu od najmanje šest meseci neprekidno pre dana osnivanja pravnog lica, odnosno registrovanja preduzetnika, kod Nacionalne službe za zapošljavanje bili prijavljeni kao nezaposleni ili da su u periodu od 12 meseci pre dana osnivanja, odnosno registrovanja stekli srednje, više ili visoko obrazovanje, u skladu sa zakonom.</text:p>
      <text:p text:style-name="Text_20_body">Oslobođenje iz ovog člana može da ostvari poslodavac - pravno lice, odnosno preduzetnik, koji je osnovan, odnosno registrovan zaključno sa 31. decembrom 2020. godine.</text:p>
      <text:p text:style-name="Text_20_body">Doprinos za penzijsko i invalidsko osiguranje u periodu za koji se koristi oslobođenje, može da se plaća za osnivače i članove koji su zasnovali radni odnos u pravnom licu, odnosno preduzetnik može da plaća za sebe, odnosno može da se plaća za novozaposlene, u skladu sa zakonom kojim se uređuje penzijsko i invalidsko osiguranje.</text:p>
      <text:p text:style-name="Text_20_body">Doprinos za obavezno zdravstveno osiguranje plaća se na način kao za lica za koja se sredstva za uplatu doprinosa obezbeđuju u budžetu Republike u skladu sa zakonom kojim se uređuju doprinosi za obavezno socijalno osiguranje.</text:p>
      <text:p text:style-name="Text_20_body">Poslodavac koji za određeno lice koristi oslobođenje iz ovog člana, osim u skladu sa odredbom zakona kojim se uređuje porez na dohodak građana koja se odnosi na istu vrstu olakšice, po osnovu zasnivanja radnog odnosa sa tim licem nema pravo da za to lice ostvari druge olakšice.</text:p>
      <text:p text:style-name="Text_20_body"/>
      <text:p text:style-name="Text_20_body"/>
      <text:p text:style-name="P1">Član 52 <text:s/>ZAKONA O DOPRINOSIMA</text:p>
      <text:p text:style-name="Text_20_body">Ako se zarada isplaćuje u delovima, a prvi deo zarade je manji od najniže mesečne osnovice doprinosa, poslodavac je dužan da prilikom isplate prvog dela zarade, obračuna i plati doprinose na najnižu mesečnu osnovicu doprinosa.</text:p>
      <text:p text:style-name="Text_20_body"/>
      <text:p text:style-name="Text_20_body"/>
      <text:p text:style-name="P3">ZAKON O PREZU NA DOHODAK</text:p>
      <text:p text:style-name="P2">Poreska olakšica za zapošljavanje novih lica i lica sa invaliditetom</text:p>
      <text:p text:style-name="Text_20_body"/>
      <text:p text:style-name="P4"/>
      <text:p text:style-name="Text_20_body"><text:bookmark text:name="clan_21v"/>Član 21v</text:p>
      <text:p text:style-name="Text_20_body">Poslodavac - pravno lice, preduzetnik, preduzetnik paušalac ili preduzetnik poljoprivrednik, koji zaposli novo lice ima pravo na povraćaj dela plaćenog poreza na zaradu za novozaposleno lice, isplaćenu zaključno sa 31. decembrom 2019. godine.</text:p>
      <text:p text:style-name="Text_20_body">Novozaposlenim licem iz stava 1. ovog člana smatra se lice sa kojim je poslodavac zaključio ugovor o radu u skladu sa zakonom kojim se uređuju radni odnosi, koje je prijavio na obavezno socijalno osiguranje u Centralni registar obaveznog socijalnog osiguranja i koje je pre zasnivanja radnog odnosa kod Nacionalne službe za zapošljavanje bilo bez prekida prijavljeno kao nezaposleno najmanje šest meseci, a lice koje se smatra pripravnikom najmanje tri meseca.</text:p>
      <text:p text:style-name="Text_20_body">Novozaposlenim licem iz stava 1. ovog člana ne smatra se lice koje je pre zasnivanja radnog odnosa bilo zaposleno kod poslodavca koji je povezano lice sa poslodavcem kod koga zasniva radni odnos, odnosno kod poslodavca koji bi, da nije prestao da postoji, bio povezano lice sa poslodavcem kod koga novozaposleno lice zasniva radni odnos, nezavisno od toga da li je postojao prekid radnog <text:soft-page-break/>odnosa.</text:p>
      <text:p text:style-name="Text_20_body">Poresku olakšicu iz stava 1. ovog člana može ostvariti poslodavac ako se zasnivanjem radnog odnosa sa novozaposlenim licem poveća broj zaposlenih kod poslodavca u odnosu na broj zaposlenih na dan 31. marta 2014. godine.</text:p>
      <text:p text:style-name="Text_20_body">Poresku olakšicu iz stava 1. ovog člana može da koristi i poslodavac koji započne obavljanje delatnosti posle 31. marta 2014. godine.</text:p>
      <text:p text:style-name="Text_20_body">Poslodavac ima pravo na povraćaj plaćenog poreza iz stava 1. ovog člana, i to:</text:p>
      <text:p text:style-name="Text_20_body">1) 65% ako je zasnovao radni odnos sa najmanje jednim, a najviše sa devet novozaposlenih lica;</text:p>
      <text:p text:style-name="Text_20_body">2) 70% ako je zasnovao radni odnos sa najmanje 10, a najviše sa 99 novozaposlenih lica;</text:p>
      <text:p text:style-name="Text_20_body">3) 75% ako je zasnovao radni odnos sa najmanje 100 novozaposlenih lica.</text:p>
      <text:p text:style-name="Text_20_body">Povraćaj plaćenog poreza iz stava 6. ovog člana vrši se u skladu sa zakonom kojim se uređuju poreski postupak i poreska administracija, u roku od 15 dana od dana podnošenja zahteva za povraćaj nadležnom poreskom organu.</text:p>
      <text:p text:style-name="Text_20_body">Poslodavac koji za određeno lice koristi bilo koju vrstu podsticaja koji su uređeni odgovarajućim zakonom, osim u skladu sa odredbom zakona kojim se uređuju doprinosi za obavezno socijalno osiguranje koja se odnosi na istu vrstu olakšice, po osnovu zasnivanja radnog odnosa sa tim licem nema pravo da za to lice ostvari poresku olakšicu iz ovog člana.</text:p>
      <text:p text:style-name="Text_20_body">Poresku olakšicu iz ovog člana ne mogu ostvariti državni organi i organizacije, Zaštitnik građana, Poverenik za zaštitu ravnopravnosti, Državna revizorska institucija, Poverenik za informacije od javnog značaja i zaštitu podataka o ličnosti, Agencija za borbu protiv korupcije, Republička komisija za zaštitu prava u postupcima javnih nabavki, Komisija za zaštitu konkurencije, Komisija za hartije od vrednosti, Fiskalni savet, Republička radiodifuzna agencija, Agencija za energetiku Republike Srbije i druge javne agencije, javna preduzeća, javne službe i drugi direktni ili indirektni budžetski korisnici, odnosno korisnici javnih sredstava.</text:p>
      <text:p text:style-name="Text_20_body"><text:bookmark text:name="clan_21g"/>Član 21g</text:p>
      <text:p text:style-name="Text_20_body">Poslodavac koji na neodređeno vreme zaposli lice sa invaliditetom u skladu sa zakonom koji uređuje sprečavanje diskriminacije lica sa invaliditetom, za koje odgovarajućom pravno-medicinski validnom dokumentacijom dokaže invalidnost, oslobađa se obaveze plaćanja obračunatog i obustavljenog poreza iz zarade tog lica, za period od tri godine od dana zasnivanja radnog odnosa.</text:p>
      <text:p text:style-name="Text_20_body">Novozaposlenim licem sa invaliditetom iz stava 1. ovog člana smatra se lice sa kojim je poslodavac zaključio ugovor o radu u skladu sa zakonom koji uređuje rad i koje je prijavio na obavezno socijalno osiguranje kod nadležnih organizacija za obavezno socijalno osiguranje.</text:p>
      <text:p text:style-name="Text_20_body">Novozaposlenim licem sa invaliditetom iz stava 1. ovog člana neće se smatrati lice koje je pre zasnivanja radnog odnosa bilo zaposleno kod poslodavca koji je osnivač ili povezano lice sa poslodavcem kod koga zasniva radni odnos, nezavisno od toga da li je postojao prekid radnog odnosa.</text:p>
      <text:p text:style-name="Text_20_body">Poresku olakšicu iz ovog člana ne mogu ostvarivati državni organi i organizacije, javna preduzeća, javne službe i drugi direktni ili indirektni budžetski korisnici.</text:p>
      <text:p text:style-name="Text_20_body">Poslodavci koji za određeno lice koriste ili su koristili olakšicu kod plaćanja poreza na zarade po drugom pravnom osnovu u skladu sa odgovarajućim propisom, ne mogu za isto lice ostvarivati poresku olakšicu iz ovog člana.</text:p>
      <text:p text:style-name="Text_20_body">Način i postupak primene odredaba ovog člana bliže uređuje ministar.</text:p>
      <text:p text:style-name="Text_20_body"><text:bookmark text:name="clan_21d"/>Član 21d</text:p>
      <text:p text:style-name="Text_20_body">Poslodavac - pravno lice koje se, u smislu zakona kojim se uređuje računovodstvo, razvrstava u <text:soft-page-break/>mikro i mala pravna lica, kao i preduzetnik, preduzetnik paušalac ili preduzetnik poljoprivrednik, koji zasnuje radni odnos sa najmanje dva nova lica, ima pravo na povraćaj 75% plaćenog poreza na zaradu za novozaposleno lice, isplaćenu zaključno sa 31. decembrom 2019. godine.</text:p>
      <text:p text:style-name="Text_20_body">Novozaposlenim licem iz stava 1. ovog člana smatra se lice sa kojim je poslodavac zaključio ugovor o radu u skladu sa zakonom kojim se uređuju radni odnosi, koje je prijavio na obavezno socijalno osiguranje u Centralni registar obaveznog socijalnog osiguranja i koje je pre zasnivanja radnog odnosa kod Nacionalne službe za zapošljavanje bilo bez prekida prijavljeno kao nezaposleno najmanje šest meseci, a lice koje se smatra pripravnikom najmanje tri meseca.</text:p>
      <text:p text:style-name="Text_20_body">Novozaposlenim licem iz stava 1. ovog člana ne smatra se lice koje je pre zasnivanja radnog odnosa bilo zaposleno kod poslodavca koji je povezano lice sa poslodavcem kod koga zasniva radni odnos, odnosno kod poslodavca koji bi, da nije prestao da postoji, bio povezano lice sa poslodavcem kod koga novozaposleno lice zasniva radni odnos, nezavisno od toga da li je postojao prekid radnog odnosa.</text:p>
      <text:p text:style-name="Text_20_body">Poslodavac koji od 1. januara 2016. godine zasnuje radni odnos sa jednim novozaposlenim, pa u narednom periodu zasnuje radni odnos i sa drugim novozaposlenim licem, može da koristi poresku olakšicu za prvog novozaposlenog tek po zasnivanju radnog odnosa sa drugim novozaposlenim licem, s tim da pravo na povraćaj plaćenog poreza za prvog novozaposlenog može da ostvari za zaradu koju je tom licu isplatio za mesec u kome je stekao uslov za korišćenje poreske olakšice.</text:p>
      <text:p text:style-name="Text_20_body">Poresku olakšicu iz stava 1. ovog člana može da ostvari poslodavac ako se zasnivanjem radnog odnosa sa novozaposlenim licem poveća broj zaposlenih najmanje za dva u odnosu na broj zaposlenih koji je poslodavac imao na dan 31. oktobra 2015. godine.</text:p>
      <text:p text:style-name="Text_20_body">Ako je u periodu od 31. oktobra 2015. godine do 31. decembra 2015. godine poslodavac povećao broj zaposlenih u odnosu na broj zaposlenih na dan 31. oktobra 2015. godine, poresku olakšicu za novozaposlene sa kojima je zasnovao radni odnos od 1. januara 2016. godine može da koristi počev od meseca u kome je stekao uslov za korišćenje poreske olakšice.</text:p>
      <text:p text:style-name="Text_20_body">Ako je u periodu od 31. oktobra 2015. godine do 31. decembra 2015. godine poslodavac smanjio broj zaposlenih u odnosu na broj zaposlenih na dan 31. oktobra 2015. godine, poresku olakšicu za novozaposlene sa čijim zasnivanjem radnog odnosa poveća broj zaposlenih u odnosu na broj koji bi bio da nije smanjio broj zaposlenih u periodu od 31. oktobra 2015. godine do 31. decembra 2015. godine, može da koristi počev od meseca u kome je stekao uslov za korišćenje poreske olakšice.</text:p>
      <text:p text:style-name="Text_20_body">Poresku olakšicu iz stava 1. ovog člana može da koristi i poslodavac koji započne obavljanje delatnosti posle 31. oktobra 2015. godine.</text:p>
      <text:p text:style-name="Text_20_body">Povraćaj plaćenog poreza iz stava 1. ovog člana vrši se u skladu sa zakonom kojim se uređuju poreski postupak i poreska administracija, u roku od 15 dana od dana podnošenja zahteva za povraćaj nadležnom poreskom organu.</text:p>
      <text:p text:style-name="Text_20_body">Poslodavac koji za određeno lice koristi bilo koju vrstu podsticaja koji su uređeni odgovarajućim zakonom, osim u skladu sa odredbom zakona kojim se uređuju doprinosi za obavezno socijalno osiguranje koja se odnosi na istu vrstu olakšice, po osnovu zasnivanja radnog odnosa sa tim licem nema pravo da za to lice ostvari poresku olakšicu iz ovog člana.</text:p>
      <text:p text:style-name="Text_20_body">Poresku olakšicu iz ovog člana ne mogu ostvariti državni organi i organizacije, javne agencije, javna preduzeća, javne službe i drugi direktni ili indirektni budžetski korisnici, odnosno korisnici javnih sredstava.</text:p>
      <text:p text:style-name="Text_20_body"><text:bookmark text:name="clan_21�"/>Član 21đ</text:p>
      <text:p text:style-name="Text_20_body">Poslodavac - novoosnovano pravno lice, kao i novoosnovani preduzetnik, koji je upisan u registar nadležnog organa, odnosno organizacije, može da ostvari pravo na oslobođenje od plaćanja poreza po osnovu zarade osnivača, odnosno po osnovu lične zarade preduzetnika, kao i po osnovu zarade zaposlenih i to najviše za devet novozaposlenih lica sa kojima je zasnovao radni odnos.</text:p>
      <text:p text:style-name="Text_20_body"><text:soft-page-break/>Pravo na poresko oslobođenje iz stava 1. ovog člana po osnovu zarade osnivača može da se ostvari ukoliko je osnivač, odnosno svaki od osnivača ako ih je više, zasnovao radni odnos u tom pravnom licu, odnosno po osnovu zarade za najviše devet novozaposlenih kod pravnog lica odnosno preduzetnika, ukoliko je lice prijavljeno na obavezno socijalno osiguranje u Centralni registar obaveznog socijalnog osiguranja i u periodu od najmanje šest meseci neprekidno pre dana osnivanja pravnog lica odnosno zasnivanja radnog odnosa kod poslodavca kod Nacionalne službe za zapošljavanje bilo prijavljeno kao nezaposleni ili je u periodu od 12 meseci pre dana osnivanja odnosno zasnivanja radnog odnosa kod poslodavca steklo srednje, više ili visoko obrazovanje.</text:p>
      <text:p text:style-name="Text_20_body">Pravo na poresko oslobođenje iz stava 1. ovog člana, poslodavac može da ostvari za zarade osnivača i zaposlenog, odnosno lične zarade preduzetnika isplaćene u periodu od 12 meseci od dana kada je osnovano pravno lice, odnosno registrovan preduzetnik, čiji zbir pojedinačno za svako lice u periodu korišćenja olakšice nije viši od trostrukog iznosa prosečne godišnje zarade u godini koja prethodi godini u kojoj je osnovano pravno lice, odnosno registrovan preduzetnik.</text:p>
      <text:p text:style-name="Text_20_body">Pravo na poresku olakšicu prestaje po isteku perioda iz stava 3. ovog člana, odnosno na dan kada se izvrši isplata zarade osnivača i zaposlenog odnosno lične zarade preduzetnika, koja u zbiru sa ostalim zaradama za to lice isplaćenim od početka ostvarivanja prava na poresku olakšicu, tj. od dana osnivanja pravnog lica, odnosno registrovanja preduzetnika, prelazi neoporezivi iznos iz stava 3. ovog člana, i poslodavac je dužan da obračuna i plati porez na zaradu odnosno ličnu zaradu na onaj deo te zarade odnosno lične zarade, koji kao deo zbira sa prethodno isplaćenim zaradama odnosno ličnim zaradama, je viši od neoporezivog iznosa iz stava 3. ovog člana, kao i da za naredne zarade isplaćene tim licima obračunava i plaća porez u skladu sa zakonom.</text:p>
      <text:p text:style-name="Text_20_body">Zarada osnivača i zaposlenog, odnosno lična zarada preduzetnika, iz stava 3. ovog člana, za koju može da se ostvari poresko oslobođenje je iznos koji u sebi sadrži pripadajući porez i doprinose za obavezno socijalno osiguranje koji bi se plaćali iz zarade da se ne primenjuje poresko oslobođenje.</text:p>
      <text:p text:style-name="Text_20_body">Poresko oslobođenje iz stava 1. ovog člana lice koje je osnivač, odnosno preduzetnik može da ostvari samo jednom kao novoosnovani subjekt, i to u svojstvu ili kao osnivač ili kao preduzetnik.</text:p>
      <text:p text:style-name="Text_20_body">Pravo na poresko oslobođenje iz stava 1. ovog člana poslodavac ostvaruje pod sledećim uslovima:</text:p>
      <text:p text:style-name="Text_20_body">1) da je svaki član - osnivač novoosnovanog pravnog lica zasnovao radni odnos sa pravnim licem i da je prijavljen na obavezno socijalno osiguranje u Centralni registar obaveznog socijalnog osiguranja;</text:p>
      <text:p text:style-name="Text_20_body">2) da je novoosnovani preduzetnik prijavljen na obavezno socijalno osiguranje u Centralni registar obaveznog socijalnog osiguranja;</text:p>
      <text:p text:style-name="Text_20_body">3) da je poslodavac zaključio ugovor o radu sa novozaposlenim licima u skladu sa zakonom kojim se uređuju radni odnosi i da je ta lica prijavio na obavezno socijalno osiguranje u Centralni registar obaveznog socijalnog osiguranja;</text:p>
      <text:p text:style-name="Text_20_body">4) da u periodu za koji ostvaruje pravo na oslobođenje to pravo može da ostvari za najviše devet novozaposlenih koji ispunjavaju uslove;</text:p>
      <text:p text:style-name="Text_20_body">5) da su osnivači novoosnovanog pravnog lica, kao i preduzetnik, u periodu od najmanje šest meseci neprekidno pre dana osnivanja pravnog lica, odnosno registrovanja preduzetnika, kod Nacionalne službe za zapošljavanje bili prijavljeni kao nezaposleni ili da su u periodu od 12 meseci pre dana osnivanja, odnosno registrovanja stekli srednje, više ili visoko obrazovanje, u skladu sa zakonom.</text:p>
      <text:p text:style-name="Text_20_body">Poresko oslobođenje iz ovog člana može da ostvari poslodavac - pravno lice, odnosno preduzetnik, koji je osnovan, odnosno registrovan zaključno sa 31. decembrom 2020. godine.</text:p>
      <text:p text:style-name="Text_20_body">Poslodavac koji za određeno lice koristi oslobođenje iz ovog člana, osim u skladu sa odredbom zakona kojim se uređuju doprinosi za obavezno socijalno osiguranje koja se odnosi na istu vrstu olakšice, po osnovu zasnivanja radnog odnosa sa tim licem nema pravo da za to lice ostvari druge <text:soft-page-break/>poreske olakši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18-11-02T14:54:00.16</meta:creation-date>
    <dc:date>2018-12-18T12:55:48.47</dc:date>
    <dc:creator>Jozef Brnić</dc:creator>
    <meta:editing-duration>PT25M54S</meta:editing-duration>
    <meta:editing-cycles>2</meta:editing-cycles>
    <meta:generator>OpenOffice/4.1.1$Win32 OpenOffice.org_project/411m6$Build-9775</meta:generator>
    <meta:document-statistic meta:table-count="0" meta:image-count="0" meta:object-count="0" meta:page-count="6" meta:paragraph-count="72" meta:word-count="2774" meta:character-count="17953"/>
  </office:meta>
</office:document-meta>
</file>