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a948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a948" style:font-weight-asian="bold" style:font-weight-complex="bold"/>
    </style:style>
    <style:style style:name="T5" style:family="text">
      <style:text-properties fo:font-weight="bold" officeooo:rsid="001ff4c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ef9c1"/>
    </style:style>
    <style:style style:name="T8" style:family="text">
      <style:text-properties officeooo:rsid="001ff4c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ZNAKE POLJA U TABELI </text:p>
      <text:p text:style-name="P3">EVIDENCIJA ZAPOSLENIH</text:p>
      <text:p text:style-name="P3"/>
      <text:p text:style-name="P3"/>
      <text:p text:style-name="P3"/>
      <text:p text:style-name="P1"><text:tab/>Za unos podataka kliknite prvo na dugme <text:span text:style-name="T3">OTVORI TABELU</text:span>.</text:p>
      <text:p text:style-name="P1"/>
      <text:list text:style-name="L1">
        <text:list-item>
          <text:p text:style-name="P4"><text:span text:style-name="T3"><text:s/><text:tab/>BROJ</text:span> – Redni broj pod kojim je radnik uveden u evidenciju ( klikom na plus otvara se sledeći broj ).</text:p>
        </text:list-item>
        <text:list-item>
          <text:p text:style-name="P4"><text:span text:style-name="T3"><text:s/><text:tab/>IME I PREZIME</text:span> – Uneti ime i prezime</text:p>
        </text:list-item>
        <text:list-item>
          <text:p text:style-name="P4"><text:span text:style-name="T3"><text:s/><text:tab/>VRSTAID</text:span> – Identifikacioni broj za PPP – PD tj. šifra dokumenta za kontrolu identiteta primaoca prihoda. Šifra <text:s/>1 – za JMBG, šifra - 2 za ibegličku legitimaciju, šifra 3 – za pasoš, šifra 4 – posebna oznaka za slučajeve odobrene od PU, šifra 9 – ostalo.</text:p>
        </text:list-item>
        <text:list-item>
          <text:p text:style-name="P4"><text:span text:style-name="T3"><text:s/><text:tab/>PREBIVAL</text:span> – šifra opštine u kojoj radnik živi. Podatak iz šifrarnika opština PU.</text:p>
        </text:list-item>
        <text:list-item>
          <text:p text:style-name="P4"><text:span text:style-name="T3"><text:s/><text:tab/>MATICNIBR</text:span> – <text:span text:style-name="T7">Uneti </text:span>JMBG radnika.</text:p>
        </text:list-item>
        <text:list-item>
          <text:p text:style-name="P4"><text:span text:style-name="T3"><text:s/><text:tab/>KATALOG </text:span>– Uvek je oznaka 1 kod svih vrsta prihoda.</text:p>
        </text:list-item>
        <text:list-item>
          <text:p text:style-name="P4"><text:span text:style-name="T4"><text:s/><text:tab/>V</text:span><text:span text:style-name="T3">RSTAPRIM</text:span> – Šifra vrste primaoca iz kataloga PU.</text:p>
        </text:list-item>
        <text:list-item>
          <text:p text:style-name="P4"><text:span text:style-name="T3"><text:s/><text:tab/>OZNVRPRIH</text:span> – Šifra vrste prihoda iz kataloga.</text:p>
        </text:list-item>
        <text:list-item>
          <text:p text:style-name="P4"><text:span text:style-name="T3"><text:s/><text:tab/>OZNOLAKS</text:span> – Šifra olakšice iz kataloga PU.</text:p>
        </text:list-item>
        <text:list-item>
          <text:p text:style-name="P4"><text:s/><text:tab/><text:span text:style-name="T3">OZNBEN</text:span> – Šifra beneficije iz kataloga PU.</text:p>
        </text:list-item>
        <text:list-item>
          <text:p text:style-name="P4"><text:s text:c="2"/><text:tab/><text:span text:style-name="T4">S</text:span><text:span text:style-name="T3">TARTBOD</text:span> – Koeficijent radnog mesta.</text:p>
        </text:list-item>
        <text:list-item>
          <text:p text:style-name="P4"><text:span text:style-name="T4"><text:s/><text:tab/>S</text:span><text:span text:style-name="T3">TAZ</text:span> – Broj godina radnog staža. Može se uneti i automatski korišćenjem dugmeta SREDI RADNI STAŽ, ukoliko je unet datum u polje POČETNI DATUM MINULOG RADA.</text:p>
        </text:list-item>
        <text:list-item>
          <text:p text:style-name="P4"><text:s/><text:tab/><text:span text:style-name="T3">VRSTA</text:span> – Vrsta isplate. Za redovnu zaradu polje ostaje prazno. Za bolovanje preko 30 dana unosi se <text:s text:c="2"/>slovo B. Za porodiljsko bolovanje unosi se slovo P. Za penzionera unosi se slovo R. Za invalida unosi se slovo I. Za ugovor o delu unosi se slovo U.</text:p>
        </text:list-item>
        <text:list-item>
          <text:p text:style-name="P4"><text:s/><text:tab/><text:span text:style-name="T3">GRUPA</text:span> – Oznaka grupe ( 1, 2, 3.... ) zaposlenih ukoliko postoji potreba za grupisanjem radnika, prema različitim parametrima za obračun zarade <text:span text:style-name="T3">za isti mesec u okviru jednog obračuna odnosno jednog platnog spiska</text:span>. Ova opcija se koristi za grupe zaposlenih koje imaju različitu cenu rada. Ukoliko obeležite grupe u ovoj opciji, pri unosu radnika u platni spisak ne popunjavate polje Grupa 1, ostaje grupa 0 da bi ste sve grupe uneli u platni spisak istovremeno. Kada radite obračun obeležite polje GRUPA shodno ceni rada za određenu grupu. </text:p>
        </text:list-item>
        <text:list-item>
          <text:p text:style-name="P4"><text:s text:c="14"/><text:span text:style-name="T3">GRUPA1</text:span> - Oznaka grupe zaposlenih ukoliko postoji potreba za grupisanjem radnika, prema različitim parametrima za obračun zarade za isti mesec <text:span text:style-name="T3">kroz različite obračune odnosno više platnih spiskova. </text:span><text:span text:style-name="T6">Ukoliko radite dva potpuno nezavisna obračuna zarada, koji su iste vrste, za isti mesec, za dve grupe zaposlenih. Obeležićete zaposlene iz jedne grupe oznakom 1, a <text:s/>zaposlene iz druge grupe oznakom 2 i radićete dva obračuna iste vrste za isti mesec. U PARAMETRIMA 2 za GRUPU 1 mesec npr. januar obeležite brojem 1, a pri unosu radnika u platni spisak polje GRUPA 1 obeležite takođe brojem jedan. <text:s/>Za drugu grupu u PARAMETRIMA 2 mesec januar obeležite brojem 13, a pri unosu radnika u platni spisak polje GRUPA 1 obeležite brojem 2. Na taj način ste razdvojili obračun za januar po grupama iz iste evidencije zaposlenih. NAPOMENA – ukoliko pri unosu zaposlenih u polju GRUPA 1 ne unesete oznaku iz kolone GRUPE 1 u platni spisak ćete uneti sve zaposlene bez obzira što ste ih u ovoj koloni razvrstali u grupe.</text:span></text:p>
        </text:list-item>
        <text:list-item>
          <text:p text:style-name="P4"><text:span text:style-name="T3"><text:s/><text:tab/>STEPEN</text:span> – Stepen stručne spreme.</text:p>
        </text:list-item>
        <text:list-item>
          <text:p text:style-name="P4"><text:span text:style-name="T3"><text:s/><text:tab/>BENPROC</text:span> – Procenat beneficiranog radnog staža.</text:p>
        </text:list-item>
        <text:list-item>
          <text:p text:style-name="P5"><text:s/><text:tab/><text:span text:style-name="T3">MFP3PROC</text:span> – procent angažovanja primaoca prihoda kod isplatioca u odnosu na puno radno vreme – unosi se podatak samo ako je procenat angažoovanja manji od <text:soft-page-break/>100% .</text:p>
        </text:list-item>
        <text:list-item>
          <text:p text:style-name="P5"><text:span text:style-name="T3"><text:s text:c="12"/>MFP6</text:span> – Ukupno plaćeni doprinosi u dobrovoljni penzioni fond ili plaćene premije dobrovoljnog zdravstvenog osiguranja.</text:p>
        </text:list-item>
        <text:list-item>
          <text:p text:style-name="P4"><text:s/><text:tab/><text:span text:style-name="T3">MFP7</text:span> - <text:s/>Primenjena stopa poreza kod nerezidenta ako je zaključen ugovor o izbegavanju dvostrukog oporezivanja.</text:p>
        </text:list-item>
        <text:list-item>
          <text:p text:style-name="P4"><text:s/><text:tab/><text:span text:style-name="T3">MFP8NEPUN</text:span> – Oznaka 1 ako je primalac priihoda zaposlen sa nepunim radnim vremenom samo kod jednog poslodavca.</text:p>
        </text:list-item>
        <text:list-item>
          <text:p text:style-name="P4"><text:s/><text:tab/><text:span text:style-name="T3">MFP9NAJOSN</text:span> – Oznaka 1 ako se umanjuje osnovica doprinosa tako da se ukupan zbir izjednači sa najvišom osnovicom.</text:p>
        </text:list-item>
        <text:list-item>
          <text:p text:style-name="P4"><text:s/><text:tab/><text:span text:style-name="T3">MFP10DVEZ</text:span> – Oznaka 1 ako se u istom periodu za jednog primaoca prijavljuju i zarada i naknada zarade pod bilo kojom vrtom prihoda.</text:p>
        </text:list-item>
        <text:list-item>
          <text:p text:style-name="P4"><text:s/><text:tab/><text:span text:style-name="T3">ŠIFRA</text:span> – Šifra partnera, odnosno broj, pod kojim ste uneli podatke o tekućem računu radnika na koji uplaćujete njegovu zaradu, u šiframa partnera.</text:p>
        </text:list-item>
        <text:list-item>
          <text:p text:style-name="P4"><text:s/><text:tab/><text:span text:style-name="T3">PARTIJA</text:span> – Broj tekućeg računa radnika.</text:p>
        </text:list-item>
        <text:list-item>
          <text:p text:style-name="P4"><text:s/><text:tab/><text:span text:style-name="T3">SAMSIF</text:span> – Šifra opštine kojoj se samodoprinos uplaćuje. Iz prethodno popunjenog šifrarnika samosoprinosa.</text:p>
        </text:list-item>
        <text:list-item>
          <text:p text:style-name="P4"><text:s/><text:tab/><text:span text:style-name="T3">SAMOPROC</text:span> – Procenat samodoprinosa.</text:p>
        </text:list-item>
        <text:list-item>
          <text:p text:style-name="P4"><text:span text:style-name="T3"><text:s/><text:tab/>PREVOZ</text:span> - * ( zvezdica ) je oznaka da se radniku plaća prevoz, da bi ste u delu za obračun prevoza mogli automatski da preuzmete podatke za radnike kojima ga plaćate.</text:p>
        </text:list-item>
        <text:list-item>
          <text:p text:style-name="P4"><text:s/><text:tab/><text:span text:style-name="T3">BRISANJE</text:span> - * ( zvezdica ) <text:s/>je oznaka za radnika kome je prestao radni odnos. Ukoliko ga tako obeležite nećete više moći da ga unesete na platni spisak.</text:p>
        </text:list-item>
        <text:list-item>
          <text:p text:style-name="P4"><text:s/><text:tab/><text:span text:style-name="T3">PJ</text:span> – Slovna oznaka za mesto stanovanja iz šifrarnika opština PU.</text:p>
        </text:list-item>
        <text:list-item>
          <text:p text:style-name="P4"><text:s/><text:tab/><text:span text:style-name="T3">PROCUMANJ </text:span>– Koristi se za obračun zarada sa olakšicom, unosi se procenat olakšice.</text:p>
        </text:list-item>
        <text:list-item>
          <text:p text:style-name="P4"><text:s/><text:tab/><text:span text:style-name="T3">UMANJENJE</text:span> - <text:s/>Koristi se za obračun zarada sa olakšicom, unosi se oznaka: <text:s text:c="23"/>Z1- za olakšicu za PIO doprinose <text:s text:c="91"/>45 - za olakšicu za doprinose NA TERT FIRME za zaposlene starije od 45 godina <text:s text:c="21"/>50 - za olakšicu za doprinose NA TERT FIRME za zaposlene starije od 50 godina <text:s text:c="20"/>PR - za olakšicu za doprinose NA TERT FIRME za zaposlene PRIPRAVNIKE <text:s text:c="18"/>30 - za olakšicu za doprinose NA TERT FIRME za zaposlene mlađe od 30 godina <text:s text:c="15"/>IN - za olakšicu za doprinose NA TERT FIRME za zaposlene INVALIDE</text:p>
        </text:list-item>
        <text:list-item>
          <text:p text:style-name="P4"><text:s/><text:tab/><text:span text:style-name="T3">PORUMANJ</text:span> - Koristi se za obračun zarada sa olakšicom, unosi se procenat olakšice.</text:p>
        </text:list-item>
        <text:list-item>
          <text:p text:style-name="P4"><text:s/><text:tab/><text:span text:style-name="T3">DOPUMANJ</text:span> - Koristi se za obračun zarada sa olakšicom ZA DOPRINOSE NA TERET FIRME, unosi se procenat olakšice.</text:p>
        </text:list-item>
        <text:list-item>
          <text:p text:style-name="P4"><text:s/><text:tab/><text:span text:style-name="T3">PIOUMANJR</text:span> - Koristi se za obračun zarada sa olakšicom, unosi se procenat olakšice.</text:p>
        </text:list-item>
        <text:list-item>
          <text:p text:style-name="P4"><text:s/><text:tab/><text:span text:style-name="T3">PIOUMANJF</text:span> - Koristi se za obračun zarada sa olakšicom, unosi se procenat olakšice.</text:p>
        </text:list-item>
        <text:list-item>
          <text:p text:style-name="P4"><text:span text:style-name="T3"><text:s/><text:tab/>PREZIME</text:span> – <text:s/>Obavezan unos prezimena radnika bez korišćenja slova sa kvržicama.</text:p>
        </text:list-item>
        <text:list-item>
          <text:p text:style-name="P4"><text:s/><text:tab/><text:span text:style-name="T3">IME</text:span> - <text:s/>Obavezan unos imena radnika bez korišćenja slova sa kvržicama.</text:p>
        </text:list-item>
        <text:list-item>
          <text:p text:style-name="P4"><text:s/><text:tab/><text:span text:style-name="T3">MP</text:span> – Unosi se slovna oznaka za mesto stanovanja iz šifrarnika opština PU.</text:p>
        </text:list-item>
        <text:list-item>
          <text:p text:style-name="P4"><text:s/><text:tab/><text:span text:style-name="T3">POŠTA</text:span> – Poštanski broj adrese radnika.</text:p>
        </text:list-item>
        <text:list-item>
          <text:p text:style-name="P4"><text:s/><text:tab/><text:span text:style-name="T3">MESTO</text:span> – Naziv mesta stanovanja radnika.</text:p>
        </text:list-item>
        <text:list-item>
          <text:p text:style-name="P4"><text:s/><text:tab/><text:span text:style-name="T3">ADRESA</text:span> – Ulica i broj u kojoj radnik stanuje.</text:p>
        </text:list-item>
        <text:list-item>
          <text:p text:style-name="P4"><text:s/><text:tab/><text:span text:style-name="T3">TELEFON</text:span> – Broj telefona radnika.</text:p>
        </text:list-item>
        <text:list-item>
          <text:p text:style-name="P5"><text:s/><text:tab/><text:span text:style-name="T3">EVIDBROJ</text:span> - <text:s/>Evidencioni broj, popunjavaju one firme koje već imaju evidenciju zaposlenih u papirnoj formi i žele da zadrže iste evidencione brojeve.</text:p>
        </text:list-item>
        <text:list-item>
          <text:p text:style-name="P5"><text:s/><text:tab/><text:span text:style-name="T3">FONDZ</text:span> - Trenutno se ne koristi, ostaviti nepopunjeno – stari porez na fond zarada.</text:p>
        </text:list-item>
        <text:list-item>
          <text:p text:style-name="P4"><text:soft-page-break/><text:s/><text:tab/><text:span text:style-name="T3">KASA</text:span> – Članarina kasa.</text:p>
        </text:list-item>
        <text:list-item>
          <text:p text:style-name="P4"><text:s/><text:tab/><text:span text:style-name="T3">KASARATA</text:span> – Rata za kasu.</text:p>
        </text:list-item>
        <text:list-item>
          <text:p text:style-name="P4"><text:s/><text:tab/><text:span text:style-name="T3">SIND1PROC</text:span> – Procenat obustave za članstvo u sindikatu.</text:p>
        </text:list-item>
        <text:list-item>
          <text:p text:style-name="P4"><text:s/><text:tab/><text:span text:style-name="T3">SIND2PROC</text:span> - <text:s/>Procenat obustave za članstvo u drugom sindikatu, ukoliko je radnik član dva sindikata.</text:p>
        </text:list-item>
        <text:list-item>
          <text:p text:style-name="P4"><text:s text:c="12"/><text:span text:style-name="T3">SOLPROC</text:span> – Procenat obustave za solidarnost.</text:p>
        </text:list-item>
        <text:list-item>
          <text:p text:style-name="P4"><text:s/><text:tab/><text:span text:style-name="T3">DNEVNICA</text:span> – <text:s/>Trenutno se ne koristi, ostaviti nepopunjeno.</text:p>
        </text:list-item>
        <text:list-item>
          <text:p text:style-name="P4"><text:s/><text:tab/><text:span text:style-name="T3">ALIMPROC</text:span> – Procenat obustave za alimentaciju iz sudskog rešenja.</text:p>
        </text:list-item>
        <text:list-item>
          <text:p text:style-name="P4"><text:s/><text:tab/><text:span text:style-name="T3">DATMIN</text:span> – Datum zaposlenja iz ugovora o radu.</text:p>
        </text:list-item>
        <text:list-item>
          <text:p text:style-name="P4"><text:s/><text:tab/><text:span text:style-name="T3">DAN</text:span> – Unosi se broj dana manji od 30 ako postoji prethodni staž u <text:s/>istoj firmi, a postojao je prekid rada. <text:s/></text:p>
        </text:list-item>
        <text:list-item>
          <text:p text:style-name="P4"><text:s/><text:tab/><text:span text:style-name="T3">MESEC</text:span> - Unosi se broj meseci ako postoji prethodni staž u <text:s/>istoj firmi, a postojao je prekid rada. <text:s/></text:p>
        </text:list-item>
        <text:list-item>
          <text:p text:style-name="P4"><text:s/><text:tab/><text:span text:style-name="T3">GODINA</text:span>- Unosi se broj godina ako postoji prethodni staž u <text:s/>istoj firmi, a postojao je prekid rada.</text:p>
        </text:list-item>
        <text:list-item>
          <text:p text:style-name="P4"><text:s/><text:tab/><text:span text:style-name="T3">MTR</text:span> – Mesto troškova. </text:p>
        </text:list-item>
        <text:list-item>
          <text:p text:style-name="P4"><text:s/><text:tab/><text:span text:style-name="T3">M4MES</text:span> – Broj meseci rada za M4 obrazac.</text:p>
        </text:list-item>
        <text:list-item>
          <text:p text:style-name="P4"><text:s/><text:tab/><text:span text:style-name="T3">M4DAN</text:span> – Broj dana rada manji od 30 za M4 obrazac.</text:p>
        </text:list-item>
        <text:list-item>
          <text:p text:style-name="P4"><text:s/><text:tab/>TOPLI – <text:s/>Trenutno se ne koristi, ostaviti nepopunjeno.</text:p>
        </text:list-item>
        <text:list-item>
          <text:p text:style-name="P4"><text:s/><text:tab/><text:span text:style-name="T3">ROPNR</text:span> –<text:span text:style-name="T1"> </text:span><text:span text:style-name="T2">Unosi se oznaka 1 ukoliko je zaposleni angažovan sa nepunim radnim vremenom kod jednog poslodavca.</text:span></text:p>
        </text:list-item>
        <text:list-item>
          <text:p text:style-name="P4"><text:s/><text:tab/><text:span text:style-name="T3">DATNEZAP</text:span> – Datum do kada je radnik sa nepunim radnim vremenom bio nezaposlen.</text:p>
        </text:list-item>
        <text:list-item>
          <text:p text:style-name="P4"><text:s/><text:tab/><text:span text:style-name="T3">DATUGOVOR</text:span> – Datum ugovora sa sa radnikom sa nepunim radnim vremenom.</text:p>
        </text:list-item>
        <text:list-item>
          <text:p text:style-name="P4"><text:s/><text:tab/><text:span text:style-name="T3">DATPRI</text:span> – Datum prijema radnika sa nepunim radnim vremenom ili datum početka porodiljsog bolovanja kod porodilja.</text:p>
        </text:list-item>
        <text:list-item>
          <text:p text:style-name="P4"><text:s/><text:tab/><text:span text:style-name="T3">DATZASNIV</text:span> – Datum zaposlenja radnika sa nepunim radnim vremenom.</text:p>
        </text:list-item>
        <text:list-item>
          <text:p text:style-name="P4"><text:s/><text:tab/><text:span text:style-name="T3">UGOVDAT0</text:span> – Datum zasnivanja radnog odnosa sa pripravnikom.</text:p>
        </text:list-item>
        <text:list-item>
          <text:p text:style-name="P4"><text:s/><text:tab/><text:span text:style-name="T3">UGOVDAT1</text:span> – Datum do kada traje ugovor sa pripravnikom.</text:p>
        </text:list-item>
        <text:list-item>
          <text:p text:style-name="P4"><text:span text:style-name="T3"><text:s/><text:tab/>PRODDAT0</text:span> – Datum od kada se ugovor sa pripravnikom produžava, ukoliko se produžava.</text:p>
        </text:list-item>
        <text:list-item>
          <text:p text:style-name="P4"><text:s/><text:tab/><text:span text:style-name="T3">PRODDAT1</text:span> – Datum do kada se ugovor sa pripravnikom produžava.</text:p>
        </text:list-item>
        <text:list-item>
          <text:p text:style-name="P4"><text:s/><text:tab/><text:span text:style-name="T3">PRIPRAV</text:span> - * ( zvezdica ) ukoliko je radnik pripravnik.</text:p>
        </text:list-item>
        <text:list-item>
          <text:p text:style-name="P4"><text:s/><text:tab/><text:span text:style-name="T3">ZADACI</text:span> – Opis radnog zadatka pripravnika koji se ocenjuje.</text:p>
        </text:list-item>
        <text:list-item>
          <text:p text:style-name="P4"><text:s/><text:tab/><text:span text:style-name="T3">OCENA</text:span> – Ocena pripravnika ( <text:s/>A, B ili C ).</text:p>
        </text:list-item>
        <text:list-item>
          <text:p text:style-name="P4"><text:span text:style-name="T3"><text:s/><text:tab/>POROLAKS</text:span> – Broj poreske olakšice, ukoliko zaposleni ima poresku olakšicu. </text:p>
        </text:list-item>
        <text:list-item>
          <text:p text:style-name="P4"><text:s/><text:tab/><text:span text:style-name="T3">RODITELJ</text:span> – Ime roditelja zaposlenog.</text:p>
        </text:list-item>
        <text:list-item>
          <text:p text:style-name="P4"><text:s/><text:tab/><text:span text:style-name="T3">KOLKOR</text:span> – Količnik korekcije.Trenutno se ne koristi, ostaviti nepopunjeno.</text:p>
        </text:list-item>
        <text:list-item>
          <text:p text:style-name="P4"><text:s/><text:tab/><text:span text:style-name="T3">DINSAT</text:span> - Trenutno se ne koristi, ostaviti nepopunjeno.</text:p>
        </text:list-item>
        <text:list-item>
          <text:p text:style-name="P4"><text:s/><text:tab/><text:span text:style-name="T3">DINSAT2</text:span> - Trenutno se ne koristi, ostaviti nepopunjeno.</text:p>
        </text:list-item>
        <text:list-item>
          <text:p text:style-name="P4"><text:s/><text:tab/><text:span text:style-name="T3">DINSAT3</text:span> - Trenutno se ne koristi, ostaviti nepopunjeno.</text:p>
        </text:list-item>
        <text:list-item>
          <text:p text:style-name="P4"><text:s/><text:tab/><text:span text:style-name="T3">DINSATSVE</text:span> - Trenutno se ne koristi, ostaviti nepopunjeno.</text:p>
        </text:list-item>
        <text:list-item>
          <text:p text:style-name="P4"><text:s/><text:tab/><text:span text:style-name="T3">CASSAT1</text:span> - Trenutno se ne koristi, ostaviti nepopunjeno.</text:p>
        </text:list-item>
        <text:list-item>
          <text:p text:style-name="P4"><text:s/><text:tab/><text:span text:style-name="T3">CASSAT2</text:span> - Trenutno se ne koristi, ostaviti nepopunjeno.</text:p>
        </text:list-item>
        <text:list-item>
          <text:p text:style-name="P4"><text:s/><text:tab/><text:span text:style-name="T3">CASSAT3</text:span> - Trenutno se ne koristi, ostaviti nepopunjeno.</text:p>
        </text:list-item>
        <text:list-item>
          <text:p text:style-name="P4"><text:s/><text:tab/>CASSATSVE - Trenutno se ne koristi, ostaviti nepopunjeno.</text:p>
        </text:list-item>
        <text:list-item>
          <text:p text:style-name="P4"><text:s/><text:tab/><text:span text:style-name="T3">LBOBROJ</text:span> – Lični broj osiguranika iz zdravstvene knjižice. Obavezan unos za <text:tab/>OZ 7 <text:s/>NOVI</text:p>
        </text:list-item>
        <text:list-item>
          <text:p text:style-name="P4"><text:s/><text:tab/><text:span text:style-name="T3">ZKBROJ</text:span> – Broj zdravstvene knjižice.</text:p>
        </text:list-item>
        <text:list-item>
          <text:p text:style-name="P4"><text:s/><text:tab/><text:span text:style-name="T3">STIMIN</text:span> – Iznos minimalne stimulacije.</text:p>
        </text:list-item>
        <text:list-item>
          <text:p text:style-name="P4"><text:s/><text:tab/><text:span text:style-name="T3">STIMGOD</text:span> – Iznos godišnje stimulacije.</text:p>
        </text:list-item>
        <text:list-item>
          <text:p text:style-name="P4"><text:s/><text:tab/><text:span text:style-name="T3">STIM1</text:span> – <text:s/>Unosite preračunat <text:span text:style-name="T3">iznos stimulacije </text:span><text:span text:style-name="T5">KOJI JE DEFINISAN U </text:span><text:soft-page-break/><text:span text:style-name="T5">ODLUCI O STIMULACIJI</text:span>, a procenat se unosi <text:span text:style-name="T8">KADA URADITE OBRAČUN I UTVRDITE PROCENAT VAŠEG IZNOSA STIMULACIJE U ODNOSU NA IZNOS ZARADE U POLJU UKUPNO, </text:span>direktno u obračunu, kroz karticu F7, u polje STIMULAC 1.</text:p>
        </text:list-item>
        <text:list-item>
          <text:p text:style-name="P4"><text:s/><text:tab/><text:span text:style-name="T3">STIM2</text:span> – Unosite unosite preračunat <text:span text:style-name="T3">iznos stimulacije</text:span> 2, a procenat se unosi direktno u obračunu, kroz karticu F7, u polje STIMULAC 2.</text:p>
        </text:list-item>
        <text:list-item>
          <text:p text:style-name="P4"><text:s/><text:tab/><text:span text:style-name="T3">STIM3</text:span> – Unosite unosite preračunat <text:span text:style-name="T3">iznos stimulacije</text:span> 3 <text:s/>procenat se unosi direktno u obračunu, kroz karticu F7, u polje STIMULAC 3.</text:p>
        </text:list-item>
        <text:list-item>
          <text:p text:style-name="P4"><text:s/><text:tab/><text:span text:style-name="T3">DESTIM1</text:span> - <text:span text:style-name="T3">Iznos destimulacije</text:span> 1 <text:s/>procenat se unosi direktno u obračunu.</text:p>
        </text:list-item>
        <text:list-item>
          <text:p text:style-name="P4"><text:s/><text:tab/><text:span text:style-name="T3">DESTIM2</text:span> - <text:span text:style-name="T3">Iznos destimulacije</text:span> 2 <text:s/>procenat se unosi direktno u obračunu.</text:p>
        </text:list-item>
        <text:list-item>
          <text:p text:style-name="P4"><text:s/><text:tab/><text:span text:style-name="T3">DESTIM3</text:span> - <text:span text:style-name="T3">Iznos destimulacije</text:span> 3 <text:s/>procenat se unosi direktno u obračunu.</text:p>
        </text:list-item>
        <text:list-item>
          <text:p text:style-name="P4"><text:s/><text:tab/><text:span text:style-name="T3">RMESTO</text:span> – Naziv radnog mesta – OBAVEZNO POPUNITI kod porodilja – ovaj podatak prenosi u obrasce POTVRDA <text:s/>i <text:s/>REŠENJE.</text:p>
        </text:list-item>
        <text:list-item>
          <text:p text:style-name="P4"><text:s/><text:tab/><text:span text:style-name="T3">DATOSIG0</text:span> - Datum zaposlenja.</text:p>
        </text:list-item>
        <text:list-item>
          <text:p text:style-name="P4"><text:s/><text:tab/><text:span text:style-name="T3">DATOSIG1</text:span> – Datum zaposlenja.</text:p>
        </text:list-item>
        <text:list-item>
          <text:p text:style-name="P4"><text:s/><text:tab/><text:span text:style-name="T3">SKOSPREMA</text:span> – Školska sprema.</text:p>
        </text:list-item>
        <text:list-item>
          <text:p text:style-name="P4"><text:s/><text:tab/><text:span text:style-name="T3">NAPOMENA</text:span> <text:s/>- Email – adresa – neophodan unos za slanje isplatnih listića,</text:p>
          <text:p text:style-name="P4">OZ-7. Unos ovog podatka je u okviru KARTICE F7.</text:p>
        </text:list-item>
        <text:list-item>
          <text:p text:style-name="P4"><text:s/><text:tab/><text:span text:style-name="T3">OSNOVOS</text:span> – Osnov osiguranja.</text:p>
        </text:list-item>
        <text:list-item>
          <text:p text:style-name="P5"><text:span text:style-name="T3">M4GRAD</text:span> <text:s/>- <text:s/>Slovna oznaka grada iz šifrarnika PU.</text:p>
        </text:list-item>
        <text:list-item>
          <text:p text:style-name="P5"><text:span text:style-name="T3">REGSOC</text:span> – Registarski broj firme u RFZO-u.</text:p>
        </text:list-item>
        <text:list-item>
          <text:p text:style-name="P4"><text:span text:style-name="T3">PRIPUG</text:span> – Broj ugovora sa pripravnikom.</text:p>
        </text:list-item>
        <text:list-item>
          <text:p text:style-name="P4"><text:span text:style-name="T3">PRIPDAT</text:span> – Datum ugovora sa pripravnikom.</text:p>
        </text:list-item>
        <text:list-item>
          <text:p text:style-name="P4"><text:span text:style-name="T3">RADNOMES</text:span> – Radno mesto pripravnika ili kod porodilja. OBAVEZNO <text:tab/>POPUNITI– ovaj podatak prenosi u obrasce POTVRDA <text:s/>i <text:s/>REŠENJE..</text:p>
        </text:list-item>
        <text:list-item>
          <text:p text:style-name="P4"><text:span text:style-name="T3">OBUCBRNR</text:span> – Broj neradnih dana u godini.</text:p>
        </text:list-item>
        <text:list-item>
          <text:p text:style-name="P4"><text:span text:style-name="T3">OBUCPP</text:span> – Broj plaćenih dana praznika.</text:p>
        </text:list-item>
        <text:list-item>
          <text:p text:style-name="P4"><text:span text:style-name="T3">SANITARNI</text:span> – Datum poslednjeg sanitarnog pregleda.</text:p>
        </text:list-item>
        <text:list-item>
          <text:p text:style-name="P4"><text:span text:style-name="T3">BOLOVANJ</text:span> – Broj dana bolovanja.</text:p>
        </text:list-item>
        <text:list-item>
          <text:p text:style-name="P4"><text:span text:style-name="T3">GODUK</text:span> – Broj dana godišnjeg odmora.</text:p>
        </text:list-item>
        <text:list-item>
          <text:p text:style-name="P4"><text:span text:style-name="T3">GODISKOR</text:span> – Broj iskorišćenih dana godišnjeg odmora.</text:p>
        </text:list-item>
        <text:list-item>
          <text:p text:style-name="P4"><text:span text:style-name="T3">GODNE</text:span> – Broj neiskorišćenih dana godišnjeg odmora.</text:p>
        </text:list-item>
        <text:list-item>
          <text:p text:style-name="P4"><text:span text:style-name="T3">IDBRO</text:span>J – ID broj.</text:p>
        </text:list-item>
        <text:list-item>
          <text:p text:style-name="P4"><text:span text:style-name="T3">LDPROFC </text:span>- </text:p>
        </text:list-item>
        <text:list-item>
          <text:p text:style-name="P4"><text:span text:style-name="T3">LDSEKTOR</text:span> -</text:p>
        </text:list-item>
        <text:list-item>
          <text:p text:style-name="P4"><text:span text:style-name="T3">LDPODSE</text:span> - </text:p>
        </text:list-item>
        <text:list-item>
          <text:p text:style-name="P4"><text:span text:style-name="T3">LDLOKAC </text:span>-</text:p>
        </text:list-item>
        <text:list-item>
          <text:p text:style-name="P4"><text:span text:style-name="T3">LDLOKACP</text:span> -</text:p>
        </text:list-item>
        <text:list-item>
          <text:p text:style-name="P4"><text:span text:style-name="T3">DOK</text:span> -</text:p>
        </text:list-item>
        <text:list-item>
          <text:p text:style-name="P4"><text:span text:style-name="T3">NAPOMENA2</text:span> - Napomena</text:p>
        </text:list-item>
        <text:list-item>
          <text:p text:style-name="P4"><text:span text:style-name="T3">NAPOMENA3</text:span> - Napomena</text:p>
        </text:list-item>
        <text:list-item>
          <text:p text:style-name="P4"><text:span text:style-name="T3">NAP4</text:span> - Napomena</text:p>
        </text:list-item>
        <text:list-item>
          <text:p text:style-name="P4"><text:span text:style-name="T3">POL</text:span> – Uneti oznaku pola.</text:p>
        </text:list-item>
        <text:list-item>
          <text:p text:style-name="P4"><text:span text:style-name="T3">DRZAVA</text:span> – Skraćenica naziva države.</text:p>
        </text:list-item>
        <text:list-item>
          <text:p text:style-name="P4"><text:span text:style-name="T3">OPŠTINA</text:span> – Skraćenica naziva opštine.</text:p>
        </text:list-item>
        <text:list-item>
          <text:p text:style-name="P4"><text:span text:style-name="T3">SPREMA</text:span> – Stručna sprema.</text:p>
        </text:list-item>
        <text:list-item>
          <text:p text:style-name="P4"><text:span text:style-name="T3">OPSTINAR</text:span> – Skraćenica za opštinu rada.</text:p>
        </text:list-item>
        <text:list-item>
          <text:p text:style-name="P4"><text:span text:style-name="T3">VRSTAZAP</text:span> – Vrsta radnog odnosa.</text:p>
        </text:list-item>
        <text:list-item>
          <text:p text:style-name="P4"><text:span text:style-name="T3">TIPSLUZB</text:span> – Tip službenika.</text:p>
        </text:list-item>
        <text:list-item>
          <text:p text:style-name="P4"><text:span text:style-name="T3">PLATNAGR</text:span> – Platna grupa.</text:p>
        </text:list-item>
        <text:list-item>
          <text:p text:style-name="P4"><text:span text:style-name="T3">GODNAPRED</text:span> – Broj godina napredovanja.</text:p>
        </text:list-item>
        <text:list-item>
          <text:p text:style-name="P4"><text:span text:style-name="T3">GRNAMEST</text:span> – Grupa nameštenika.</text:p>
        </text:list-item>
        <text:list-item>
          <text:p text:style-name="P4"><text:soft-page-break/><text:span text:style-name="T3">SIFRAZANIM</text:span> – Šifra zanimanja.</text:p>
        </text:list-item>
        <text:list-item>
          <text:p text:style-name="P4"><text:span text:style-name="T3">PROCANGA</text:span> – Procenat angažovanja.</text:p>
        </text:list-item>
        <text:list-item>
          <text:p text:style-name="P4"><text:span text:style-name="T3">STAZJUBIL</text:span> – Staz za jubilarnu nagradu.</text:p>
        </text:list-item>
        <text:list-item>
          <text:p text:style-name="P4"><text:span text:style-name="T3">BENSTAZ</text:span> – Beneficirani radni staž.</text:p>
        </text:list-item>
        <text:list-item>
          <text:p text:style-name="P4"><text:span text:style-name="T3">MINPROC</text:span> – Procenat minulog rada.</text:p>
        </text:list-item>
        <text:list-item>
          <text:p text:style-name="P4"><text:span text:style-name="T3">KOEF</text:span> – Koeficijent radnog mesta.</text:p>
        </text:list-item>
        <text:list-item>
          <text:p text:style-name="P4"><text:span text:style-name="T3">KOEFDOD</text:span> - Koeficijent dodatni.</text:p>
        </text:list-item>
        <text:list-item>
          <text:p text:style-name="P4"><text:span text:style-name="T3">KOEFUKUP</text:span> – Koeficijent ukupni.</text:p>
        </text:list-item>
        <text:list-item>
          <text:p text:style-name="P4"><text:span text:style-name="T3">OSNOVICA</text:span> – Osnovica zarade.</text:p>
        </text:list-item>
        <text:list-item>
          <text:p text:style-name="P4"><text:span text:style-name="T3">OSNOVICABRUT</text:span> – Osnovica bruto.</text:p>
        </text:list-item>
        <text:list-item>
          <text:p text:style-name="P4"><text:span text:style-name="T3">PROCUVE</text:span> – Procenat uvećanja.</text:p>
        </text:list-item>
        <text:list-item>
          <text:p text:style-name="P4"><text:span text:style-name="T3">KOSOVO</text:span> – Naknada za zaposlene na Kosovu.</text:p>
        </text:list-item>
        <text:list-item>
          <text:p text:style-name="P4"><text:span text:style-name="T3">DATZAPOS</text:span> – Datum ZAPOSLENJA – važno je popuniti kod porodilja. <text:s text:c="3"/></text:p>
        </text:list-item>
        <text:list-item>
          <text:p text:style-name="P4"><text:span text:style-name="T3">DATOTKAZ</text:span> – Datum završetka angažovanja.</text:p>
        </text:list-item>
        <text:list-item>
          <text:p text:style-name="P4"><text:span text:style-name="T3">SIFRAORG</text:span> – Šifra orgsnizacione jedinice.</text:p>
        </text:list-item>
        <text:list-item>
          <text:p text:style-name="P4"><text:span text:style-name="T3">IZVORFIN</text:span> – Izvor finansiranja.</text:p>
        </text:list-item>
        <text:list-item>
          <text:p text:style-name="P4"><text:span text:style-name="T3">GRUPAVIRM</text:span> -Oznaka grupe virmana.</text:p>
        </text:list-item>
        <text:list-item>
          <text:p text:style-name="P4"><text:span text:style-name="T3">PRNETO</text:span> – Prenet neto.</text:p>
        </text:list-item>
        <text:list-item>
          <text:p text:style-name="P4"><text:span text:style-name="T3">IDBR</text:span> – ID broj.</text:p>
        </text:list-item>
      </text:list>
      <text:p text:style-name="P2"><text:s text:c="3"/></text:p>
      <text:p text:style-name="P3">NAZIV I FUNKCIJA DUGMADI SPOD TABELE EVIDENCIJE ZAPOSLENIH</text:p>
      <text:p text:style-name="P1"/>
      <text:p text:style-name="P1"/>
      <text:list text:style-name="L2">
        <text:list-item>
          <text:p text:style-name="P6"><text:span text:style-name="T3">DOLE </text:span>– Klikom na dugme kroz tabelu se krećete na dole pri pregledu tabele.</text:p>
        </text:list-item>
        <text:list-item>
          <text:p text:style-name="P6"><text:span text:style-name="T3">GORE</text:span> - Klikom na dugme kroz tabelu se krećete na gore pri pregledu tabele.</text:p>
        </text:list-item>
        <text:list-item>
          <text:p text:style-name="P6"><text:span text:style-name="T3">ZADNJI</text:span> – Klikom na dugme dolazite do kraja tabele pri pregledu.</text:p>
        </text:list-item>
        <text:list-item>
          <text:p text:style-name="P6"><text:span text:style-name="T3">PRVI</text:span> - Klikom na dugme dolazite do vrha tabele pri pregledu.</text:p>
        </text:list-item>
        <text:list-item>
          <text:p text:style-name="P6"><text:span text:style-name="T3">DODAJ +</text:span> - Klikom na dugme otvarate tabelu opšti podaci radnika za unos novog radnika.</text:p>
        </text:list-item>
        <text:list-item>
          <text:p text:style-name="P6"><text:span text:style-name="T3">TRŽI <text:s/>IME <text:s/>F4</text:span> – Klikom na dugme otvarate pretraživač zaposlenih po imenu i prezimenu.</text:p>
        </text:list-item>
        <text:list-item>
          <text:p text:style-name="P6"><text:span text:style-name="T3">TRAŽI <text:s/>EVID. BROJ F5</text:span> - Klikom na dugme otvarate pretraživač zaposlenih po evidencionom broju. </text:p>
        </text:list-item>
        <text:list-item>
          <text:p text:style-name="P6"><text:span text:style-name="T3">TRAŽI <text:s/>ŠIFRU <text:s/>F6</text:span> - Klikom na dugme otvarate pretraživač zaposlenih po šifri. </text:p>
        </text:list-item>
        <text:list-item>
          <text:p text:style-name="P6"><text:span text:style-name="T3">KOPIRAJ RED</text:span> – Klikom na dugme kopirate poslednji red.</text:p>
        </text:list-item>
        <text:list-item>
          <text:p text:style-name="P6"><text:span text:style-name="T3">SREDI RADNI STAŽ</text:span> – Klikom na dugme preračunava se staž od datuma zaposlenja do da<text:span text:style-name="T3">tuma kada radite sređivanje staža.</text:span></text:p>
        </text:list-item>
        <text:list-item>
          <text:p text:style-name="P6"><text:span text:style-name="T3">UNESI REG. BROJ <text:s/>PIO</text:span> – Klikom na dugme unosite registarski broj PIO fonda kod svih zaposlenih iz tabele GRADOVI ukoliko ste je popunili. </text:p>
        </text:list-item>
        <text:list-item>
          <text:p text:style-name="P6"><text:span text:style-name="T3">PODESI ZA 2014</text:span> – Klikom na dugme unosite šifre za PPP – PD ukoliko ih niste uneli ručno.</text:p>
        </text:list-item>
        <text:list-item>
          <text:p text:style-name="P6"><text:span text:style-name="T3">UPUTSTVO ZA PPP-PD</text:span> – Klikom na dugme otvarate PODATKE ZA POPUNJAVANJE POLJA ŠIFARA PRIHODA ZA PPP – PD.</text:p>
        </text:list-item>
        <text:list-item>
          <text:p text:style-name="P6"><text:span text:style-name="T3"><text:s/>PREGLED KOLONE</text:span> – Prvo kliknete na belo polje ispred dugmeta, a zatim na kolonu koju <text:s/>hoćete da pregledate i dobićete pregled koji možete i da štampate. <text:s/></text:p>
        </text:list-item>
        <text:list-item>
          <text:p text:style-name="P6"><text:span text:style-name="T3">SPISAK 1</text:span> – Klikom na dugme dobićete spisak zaposlenih sa podacima za kadrovsku evidenciju.</text:p>
        </text:list-item>
        <text:list-item>
          <text:p text:style-name="P6"><text:span text:style-name="T3">KARTICA F7</text:span> - <text:s/>Klikom na dugme otvarate tabelu opšti podaci radnika, služi za pregled, izmene ili unos novih podataka.</text:p>
        </text:list-item>
        <text:list-item>
          <text:p text:style-name="P6"><text:span text:style-name="T3">MESTA TROŠKOVA</text:span> – Klikom na dugme otvarate TABELU TROŠKOVA 1 <text:s/>koju formirate sami prema potrebi. Da bi ste unosili podatke kliknite na dugme dodaj, a zatim otvori.</text:p>
        </text:list-item>
        <text:list-item>
          <text:p text:style-name="P6"><text:span text:style-name="T3">GRUPE F9</text:span> – Klikom na dugme otvarate tabelu GRUPE RADNIKA 1 u koju unosite podatke ukoliko postoji potreba za grupisanjem radnika, prema različitim parametrima za <text:soft-page-break/>obračun zarade – isti mesec različiti platni spiskovi.</text:p>
        </text:list-item>
        <text:list-item>
          <text:p text:style-name="P6"><text:span text:style-name="T3">KARTICA PRPRAVNIKA</text:span> – Klikom na dugme otvarate tabelu PODACI O PRIPRAVNIKU koja služi za unos, pregled ili izmenu podataka.</text:p>
        </text:list-item>
        <text:list-item>
          <text:p text:style-name="P6"><text:span text:style-name="T3">IZVEŠTAJ O PRIPRAVNICIMA</text:span> – Klikom na dugme otvarate obrazac Izveštaj o stručnom osposobljavanju. </text:p>
        </text:list-item>
        <text:list-item>
          <text:p text:style-name="P6"><text:span text:style-name="T3">REGISTAR ZAPOSLENIH</text:span> – Klikom na dugme otvarate tabelu REGISTAR ZAPOSLENIH koja služi za unos, pregled i izmenu podataka o zaposlenima.</text:p>
        </text:list-item>
        <text:list-item>
          <text:p text:style-name="P6"><text:span text:style-name="T3">OTVORI TABELU</text:span> – Klikom na dugme otvarate celu tabelu ukoliko hoćete da unosite ili menjate podatke direktno u tabeli – kroz kolone.</text:p>
        </text:list-item>
        <text:list-item>
          <text:p text:style-name="P6"><text:span text:style-name="T3">EXPORT U EXCEL </text:span>- <text:s/>Izvoz u excel.</text:p>
        </text:list-item>
        <text:list-item>
          <text:p text:style-name="P6"><text:span text:style-name="T3">SPISAK ZA ZZO</text:span> <text:s/>- Klikom na dugme otvarate obrazac Spisak osiguranika za RFZO.</text:p>
        </text:list-item>
        <text:list-item>
          <text:p text:style-name="P7">IZLAZ – <text:span text:style-name="T6">izlaz iz tabe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zef Brnić</meta:initial-creator>
    <meta:creation-date>2018-02-05T12:38:58.08</meta:creation-date>
    <dc:date>2024-12-16T14:20:59.376000000</dc:date>
    <meta:editing-duration>P2DT11H31M25S</meta:editing-duration>
    <meta:editing-cycles>30</meta:editing-cycles>
    <meta:generator>LibreOffice/7.5.0.3$Windows_X86_64 LibreOffice_project/c21113d003cd3efa8c53188764377a8272d9d6de</meta:generator>
    <meta:document-statistic meta:table-count="0" meta:image-count="0" meta:object-count="0" meta:page-count="6" meta:paragraph-count="181" meta:word-count="2254" meta:character-count="14557" meta:non-whitespace-character-count="12027"/>
  </office:meta>
</office:document-meta>
</file>