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RADA INVALIDA SA OLAKŠICOM PO ČLANU 45B</text:p>
      <text:p text:style-name="P1"/>
      <text:p text:style-name="P1">ŠIFRA PRIHODA - 1 01 101 030 </text:p>
      <text:p text:style-name="P1"/>
      <text:p text:style-name="P2"><text:tab/>Podrazumeva da poslodavac ima ugovor sa NSZ. Poslodavac ne plaća porez, a obavezu za doprinose na teret firme, preuzima NSZ po ugovoru – PRVA OPCIJA. Ili Poreska uprava po šifri olakšice 03 automatski zadužuje NSZ – DRUGA OPCIJA. </text:p>
      <text:p text:style-name="P2"/>
      <text:p text:style-name="P2"><text:tab/>PRVA OPCIJA:</text:p>
      <text:p text:style-name="P2"/>
      <text:p text:style-name="P2"><text:tab/>U programu se obračun radi kao normalna zarada, a u EVIDENCIJI ZAPOSLENIH se izvrše dodatna obeležavanja za olakšicu.ŠIFRA PRIHODA - 1 01 101 030 i kolone.</text:p>
      <text:p text:style-name="P2"/>
      <text:p text:style-name="P2">U SLEDEĆE KOLONE UNOSITE PODATKE:</text:p>
      <text:p text:style-name="P2"><text:tab/>PROCUMANJ = 100</text:p>
      <text:p text:style-name="P2"><text:tab/>UMANJENJE <text:s/>= IN</text:p>
      <text:p text:style-name="P2"><text:tab/>PORUMANJ <text:s text:c="3"/>= 100</text:p>
      <text:p text:style-name="P2"><text:tab/>DOPUMANJF <text:s text:c="2"/>= 100</text:p>
      <text:p text:style-name="P2"/>
      <text:p text:style-name="P2"><text:tab/>Nema potrebe raditi poseban obračun. Neto iznos se brutira kao obična zarada.</text:p>
      <text:p text:style-name="P2"/>
      <text:p text:style-name="P2"><text:s/><text:span text:style-name="T1">NAPOMENA – NETO JE UMANJEN ZA IZNOS NEPLAĆENOG POREZA.</text:span></text:p>
      <text:p text:style-name="P2"><text:span text:style-name="T1"/></text:p>
      <text:p text:style-name="P2"><text:span text:style-name="T1"><text:tab/></text:span><text:span text:style-name="T2">DRUGA OPCIJA:</text:span></text:p>
      <text:p text:style-name="P2"><text:span text:style-name="T2"/></text:p>
      <text:p text:style-name="P2"><text:span text:style-name="T2"><text:tab/>U programu se obračun radi kao obračun za invalide VRSTA 4 u PARAMETRIMA 2. Prilagoditi PARAMETRE I – procenti za obračun za INVALIDE RADA. U EVIDENCIJI ZAPOSLENIH uneti u polje VRSTA slovio I, a u polje PORUMANJ <text:s/>uneti 100.</text:span></text:p>
      <text:p text:style-name="P2"><text:span text:style-name="T1"/></text:p>
      <text:p text:style-name="P2"><text:span text:style-name="T1">NAPOMENA – NETO JE UVEĆAN ZA IZNOS NEPLAĆENOG POREZA.</text:span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8-10-24T13:59:19.51</meta:creation-date>
    <dc:date>2019-05-22T14:55:26.81</dc:date>
    <dc:creator>Jozef Brnić</dc:creator>
    <meta:editing-duration>PT1H57M51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68" meta:character-count="997"/>
  </office:meta>
</office:document-meta>
</file>