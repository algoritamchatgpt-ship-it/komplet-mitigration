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4" style:family="paragraph" style:parent-style-name="Standard" style:master-page-name="">
      <style:paragraph-properties fo:margin-left="-0.467cm" fo:margin-right="0cm" fo:line-height="100%" fo:text-align="start" style:justify-single-word="false" fo:text-indent="0cm" style:auto-text-indent="false" style:page-number="auto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5" style:family="paragraph" style:parent-style-name="Standard" style:master-page-name="">
      <style:paragraph-properties fo:margin-left="-0.243cm" fo:margin-right="0cm" fo:line-height="100%" fo:text-align="start" style:justify-single-word="false" fo:text-indent="0cm" style:auto-text-indent="false" style:page-number="auto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loext:opacity="0%" style:font-name="Times New Roman" fo:font-size="12pt" fo:font-weight="bold" fo:background-color="transparent" style:font-name-asian="Times New Roman" style:font-weight-asian="bold" style:font-name-complex="Times New Roman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loext:opacity="0%" style:font-name="Times New Roman" fo:font-size="12pt" fo:font-weight="bold" fo:background-color="transparent" style:font-name-asian="Times New Roman" style:font-weight-asian="bold" style:font-name-complex="Times New Roman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loext:opacity="0%" style:font-name="Times New Roman" fo:font-size="11pt" fo:font-weight="normal" fo:background-color="transparent" style:font-name-asian="Times New Roman" style:font-size-asian="11pt" style:font-name-complex="Times New Roman" style:font-size-complex="11pt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loext:opacity="0%" style:font-name="Times New Roman1" fo:font-size="12pt" fo:font-weight="normal" fo:background-color="transparent" style:font-name-asian="Times New Roman" style:font-size-asian="12pt" style:font-name-complex="Times New Roman" style:font-size-complex="12pt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loext:opacity="0%" style:font-name="Times New Roman1" fo:font-size="12pt" fo:font-weight="normal" fo:background-color="transparent" style:font-name-asian="Times New Roman" style:font-name-complex="Times New Roman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loext:opacity="0%" style:font-name="Times New Roman1" fo:font-size="11pt" fo:font-weight="bold" fo:background-color="transparent" style:font-name-asian="Calibri" style:font-weight-asian="bold" style:font-name-complex="Calibri" style:font-weight-complex="bold"/>
    </style:style>
    <style:style style:name="P14" style:family="paragraph" style:parent-style-name="Standard">
      <style:paragraph-properties fo:line-height="100%" fo:text-align="start" style:justify-single-word="false"/>
      <style:text-properties style:font-name="Times New Roman1" fo:font-size="12pt" style:font-size-asian="12pt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fo:font-weight="bold"/>
    </style:style>
    <style:style style:name="P16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</style:style>
    <style:style style:name="P17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18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19" style:family="paragraph" style:parent-style-name="Standard" style:list-style-name="L3" style:master-page-name="">
      <style:paragraph-properties fo:line-height="100%" fo:text-align="start" style:justify-single-word="false" style:page-number="auto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20" style:family="paragraph" style:parent-style-name="Standard" style:list-style-name="L3">
      <style:paragraph-properties fo:line-height="100%" fo:text-align="start" style:justify-single-word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21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T1" style:family="text">
      <style:text-properties style:use-window-font-color="true" loext:opacity="0%" style:font-name="Times New Roman" fo:font-size="12pt" fo:font-weight="normal" fo:background-color="transparent" loext:char-shading-value="0" style:font-name-asian="Times New Roman" style:font-name-complex="Times New Roman"/>
    </style:style>
    <style:style style:name="T2" style:family="text">
      <style:text-properties style:use-window-font-color="true" loext:opacity="0%" style:font-name="Times New Roman" fo:font-size="12pt" fo:font-weight="normal" fo:background-color="transparent" loext:char-shading-value="0" style:font-name-asian="Times New Roman" style:font-weight-asian="normal" style:font-name-complex="Times New Roman" style:font-weight-complex="normal"/>
    </style:style>
    <style:style style:name="T3" style:family="text">
      <style:text-properties style:use-window-font-color="true" loext:opacity="0%" style:font-name="Times New Roman" fo:font-size="12pt" fo:font-weight="normal" fo:background-color="transparent" loext:char-shading-value="0" style:font-name-asian="Times New Roman" style:font-size-asian="12pt" style:font-name-complex="Times New Roman" style:font-size-complex="12pt"/>
    </style:style>
    <style:style style:name="T4" style:family="text">
      <style:text-properties style:use-window-font-color="true" loext:opacity="0%" style:font-name="Times New Roman" fo:font-size="12pt" fo:language="zxx" fo:country="none" fo:font-weight="normal" fo:background-color="transparent" loext:char-shading-value="0" style:font-name-asian="Times New Roman" style:font-name-complex="Times New Roman"/>
    </style:style>
    <style:style style:name="T5" style:family="text">
      <style:text-properties style:use-window-font-color="true" loext:opacity="0%" style:font-name="Times New Roman" fo:font-size="12pt" fo:font-weight="bold" fo:background-color="transparent" loext:char-shading-value="0" style:font-name-asian="Times New Roman" style:font-weight-asian="bold" style:font-name-complex="Times New Roman" style:font-weight-complex="bold"/>
    </style:style>
    <style:style style:name="T6" style:family="text">
      <style:text-properties style:use-window-font-color="true" loext:opacity="0%" style:font-name="Times New Roman" fo:font-size="12pt" fo:background-color="transparent" loext:char-shading-value="0" style:font-name-asian="Times New Roman" style:font-weight-asian="bold" style:font-name-complex="Times New Roman" style:font-weight-complex="bold"/>
    </style:style>
    <style:style style:name="T7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8" style:family="text">
      <style:text-properties style:use-window-font-color="true" loext:opacity="0%" fo:font-weight="normal" fo:background-color="transparent" loext:char-shading-value="0" style:font-name-asian="Times New Roman" style:font-name-complex="Times New Roman"/>
    </style:style>
    <style:style style:name="T9" style:family="text">
      <style:text-properties style:use-window-font-color="true" loext:opacity="0%" style:font-name="Times New Roman1" fo:font-size="12pt" fo:font-weight="normal" fo:background-color="transparent" loext:char-shading-value="0" style:font-name-asian="Times New Roman" style:font-size-asian="12pt" style:font-name-complex="Times New Roman" style:font-size-complex="12pt"/>
    </style:style>
    <style:style style:name="T10" style:family="text">
      <style:text-properties style:use-window-font-color="true" loext:opacity="0%" style:font-name="Times New Roman1" fo:font-size="12pt" fo:font-weight="normal" fo:background-color="transparent" loext:char-shading-value="0" style:font-name-asian="Times New Roman" style:font-name-complex="Times New Roman"/>
    </style:style>
    <style:style style:name="T11" style:family="text">
      <style:text-properties style:use-window-font-color="true" loext:opacity="0%" style:font-name="Times New Roman1" fo:font-size="12pt" fo:font-weight="bold" fo:background-color="transparent" loext:char-shading-value="0" style:font-name-asian="Times New Roman" style:font-weight-asian="bold" style:font-name-complex="Times New Roman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Times New Roman"/>
    </style:style>
    <style:style style:name="T14" style:family="text">
      <style:text-properties style:font-size-asian="12pt" style:font-size-complex="12pt"/>
    </style:style>
    <style:style style:name="T15" style:family="text">
      <style:text-properties fo:color="#ff0066" loext:opacity="100%"/>
    </style:style>
    <style:style style:name="T16" style:family="text">
      <style:text-properties fo:color="#ff0066" loext:opacity="100%" fo:font-style="italic" style:font-style-asian="italic" style:font-style-complex="italic"/>
    </style:style>
    <style:style style:name="T17" style:family="text">
      <style:text-properties fo:color="#66ff66" loext:opacity="100%"/>
    </style:style>
    <style:style style:name="T18" style:family="text">
      <style:text-properties fo:color="#66ff66" loext:opacity="100%" fo:font-style="italic" style:font-style-asian="italic" style:font-style-complex="italic"/>
    </style:style>
    <style:style style:name="T19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loext:num-list-format="%1%" text:bullet-char="•">
        <style:list-level-properties text:space-before="1.27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space-before="1.27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loext:num-list-format="%1%" text:bullet-char="•">
        <style:list-level-properties text:space-before="1.27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KREDITI</text:p>
      <text:p text:style-name="P10"><text:tab/></text:p>
      <text:p text:style-name="P5"><text:tab/><text:tab/><text:tab/><text:span text:style-name="T12">EVIDENCIJA KREDITA</text:span></text:p>
      <text:p text:style-name="P9"/>
      <text:p text:style-name="P4"><text:tab/><text:span text:style-name="T12">Sadržaj tabele:</text:span></text:p>
      <text:p text:style-name="P10"/>
      <text:list text:style-name="L1">
        <text:list-item>
          <text:p text:style-name="P16"><text:span text:style-name="T5">KREDIT</text:span><text:span text:style-name="T1"> – Redni broj kredita.</text:span></text:p>
        </text:list-item>
        <text:list-item>
          <text:p text:style-name="P17"><text:span text:style-name="T12">BROJ</text:span> – Broj pod kojim je radnik koji ima kredit zaveden u evidenciji zaposlenih. </text:p>
        </text:list-item>
        <text:list-item>
          <text:p text:style-name="P16"><text:span text:style-name="T5">ŠIFRA</text:span><text:span text:style-name="T1"> – Šifra partnera. Banka ili firma na čiji račun se uplaćuju rate kredita.</text:span></text:p>
        </text:list-item>
        <text:list-item>
          <text:p text:style-name="P16"><text:span text:style-name="T5">PARTIJA</text:span><text:span text:style-name="T1"> – Partija uplatnog računa za uplatu rata kredita.</text:span></text:p>
        </text:list-item>
        <text:list-item>
          <text:p text:style-name="P17"><text:span text:style-name="T12">IZNOS</text:span> – Ukupan iznos kredita.</text:p>
        </text:list-item>
        <text:list-item>
          <text:p text:style-name="P17"><text:span text:style-name="T12">KOLIKO</text:span> – Broj rata kredita.</text:p>
        </text:list-item>
        <text:list-item>
          <text:p text:style-name="P17"><text:span text:style-name="T12">PRVARATA</text:span> – Iznos prve rate.</text:p>
        </text:list-item>
        <text:list-item>
          <text:p text:style-name="P17"><text:span text:style-name="T12">OSTALERATE</text:span> – Iznos ostalih rata.</text:p>
        </text:list-item>
        <text:list-item>
          <text:p text:style-name="P17"><text:span text:style-name="T12">ZAODBITAK</text:span> – <text:span text:style-name="T12">*</text:span> ( zvezdica ) oznaka da je kredit aktivan</text:p>
        </text:list-item>
        <text:list-item>
          <text:p text:style-name="P16"><text:span text:style-name="T5">AKTIVRATA</text:span><text:span text:style-name="T1"> - <text:s/>Iznos rate koju unosite u obračun, u</text:span><text:span text:style-name="T4">koliko radite samo jednu isplatu i sve kredite unosite kroz jednu isplatu. Ukoliko radite više isplata ovo je kolona u koju unosite rate kredita za konačnu isplatu. Kada prenosite podatke u platni spisak za prenos kredita koristite opciju ŽELIM PRENOS KREDITA.</text:span></text:p>
        </text:list-item>
        <text:list-item>
          <text:p text:style-name="P17"><text:span text:style-name="T12">AKONTRATA</text:span> – Iznos rate koja se obračunava kroz akontaciju ( prvu isplatu ), u sučaju da nekim radnicima kredit obustavljate samo kroz prvu isplatu zarade, a ne kroz konačnu isplatu. U tom slučaju kada prenosite podatke u platni spisak za prenos kredita koristite opciju ŽELIM PRENOS AKONTACIJE.</text:p>
        </text:list-item>
        <text:list-item>
          <text:p text:style-name="P17"><text:span text:style-name="T12">OSTATAK</text:span> – Iznos preostalog duga. Automatski se popunjava nakon RASKNJIŽAVANJA PLATE ili AKONTACIJE.</text:p>
        </text:list-item>
        <text:list-item>
          <text:p text:style-name="P17"><text:span text:style-name="T12">ODBIJENO</text:span> – Inzos odbijenih rata. Automatski se popunjava nakon RASKNJIŽAVANJA PLATE ili AKONTACIJE.</text:p>
        </text:list-item>
        <text:list-item>
          <text:p text:style-name="P17"><text:span text:style-name="T12">EVIDENCIONIBROJ</text:span> - Evidencioni broj. Automatski se popunjava unosom šifre zaposlenog, ukoliko ste uneli evidencioni broj zaposlenog na kartici u EVIDENCIJI RADNIKA, nakon SREĐIVANJA KREDITA.</text:p>
        </text:list-item>
        <text:list-item>
          <text:p text:style-name="P17"><text:span text:style-name="T12">MODELO</text:span>- Unosi se model odobrenja za nalog za prenos – virman. <text:s text:c="2"/></text:p>
        </text:list-item>
        <text:list-item>
          <text:p text:style-name="P17"><text:span text:style-name="T12">DATUM DOKUMENTA</text:span> – Datum: ugovora, kreditnog ugovora, administrativne zabrane...</text:p>
        </text:list-item>
        <text:list-item>
          <text:p text:style-name="P17"><text:span text:style-name="T12">GRUPA</text:span> - Grupa - Automatsko polje.</text:p>
        </text:list-item>
        <text:list-item>
          <text:p text:style-name="P17"><text:span text:style-name="T12">ARHIVA</text:span> – Automatski označava * ukoliko je kredit otplaćen, nakon RASKNJIŽAVANJA I SREĐIVANJA PLATE ILI AKONTACIJE.</text:p>
        </text:list-item>
        <text:list-item>
          <text:p text:style-name="P17"><text:span text:style-name="T12">ARHIVA2</text:span> – Automatsko polje. <text:s/></text:p>
        </text:list-item>
        <text:list-item>
          <text:p text:style-name="P17"><text:span text:style-name="T12">PRENETO</text:span> – Automatsko polje. <text:s text:c="2"/></text:p>
        </text:list-item>
        <text:list-item>
          <text:p text:style-name="P17"><text:span text:style-name="T12">NUMRED</text:span> - Automatsko polje. <text:s/></text:p>
        </text:list-item>
        <text:list-item>
          <text:p text:style-name="P17"><text:span text:style-name="T12">IDBR</text:span> - Automatsko polje. <text:s/></text:p>
        </text:list-item>
      </text:list>
      <text:p text:style-name="P9"/>
      <text:p text:style-name="P6">FUNKCIJA DUGMADI ISPOD TABELE</text:p>
      <text:p text:style-name="P9"/>
      <text:list text:style-name="L2">
        <text:list-item>
          <text:p text:style-name="P18">DOLE, GORE, ZADNJI I PRVI – Služe za kretanje gore - dole kroz tabelu.</text:p>
        </text:list-item>
        <text:list-item>
          <text:p text:style-name="P18">DODAJ - <text:s/>Klikom na dugme dodajete novi kredit u tabelu.</text:p>
        </text:list-item>
        <text:list-item>
          <text:p text:style-name="P18">TRAŽI PARTNERA F4 – Pretraga kredita po šifri partnera. <text:s/></text:p>
        </text:list-item>
        <text:list-item>
          <text:p text:style-name="P18">TRAŽI EVIDENCIONI BROJ F5 – Pretraga kredita po evidencionom broju radnika.</text:p>
        </text:list-item>
        <text:list-item>
          <text:p text:style-name="P18">TRAŽI ŠIFRU F6 <text:s/>- Pretraga kredita po šifri ranika.</text:p>
        </text:list-item>
        <text:list-item>
          <text:p text:style-name="P18">TRAŽI KREDIT – Pretraga kredita po broju kredita.</text:p>
        </text:list-item>
        <text:list-item>
          <text:p text:style-name="P18">JEDAN KREDIT – Pregled podataka za jedan kredit.</text:p>
        </text:list-item>
        <text:list-item>
          <text:p text:style-name="P18">SORTIRANJE – Vraćanje tabele u prvobitni redosled koji se promenio pri pregledu ili <text:soft-page-break/>traženju.</text:p>
        </text:list-item>
        <text:list-item>
          <text:p text:style-name="P18">AKTIVNI KREDITI – Pregled aktivnih kredita.</text:p>
        </text:list-item>
        <text:list-item>
          <text:p text:style-name="P18">RADNICI F7 – Povezivanje sa evidencijom radnika, služi za unos šifre radnika u tabelu.</text:p>
        </text:list-item>
        <text:list-item>
          <text:p text:style-name="P18">PARTNERI F8 – Povezivanje sa evdencijom partnera, služi za unos šifre partnera u tabelu.</text:p>
        </text:list-item>
        <text:list-item>
          <text:p text:style-name="P18">RASKNJIŽAVANJE PLATE – Evidentiranje odbijenih rata kredita iz obračuna, u tabeli i u pregledu otplata.</text:p>
        </text:list-item>
        <text:list-item>
          <text:p text:style-name="P18">RASKNJIŽAVANJE AKONTACIJE - Evidentiranje odbijenih rata kredita iz akontacije, u tabeli i u pregledu otplata.</text:p>
        </text:list-item>
        <text:list-item>
          <text:p text:style-name="P18">SREĐIVANJE KREDITA – Evidentiranje novih kredita – ZADUŽENJA – u pregledu otplata. </text:p>
        </text:list-item>
        <text:list-item>
          <text:p text:style-name="P18">PREGLED OTPLATA – Pregled otplata evidentiranih kredita.</text:p>
        </text:list-item>
      </text:list>
      <text:p text:style-name="P3"><text:s text:c="7"/></text:p>
      <text:list xml:id="list2490346289" text:style-name="L3">
        <text:list-item>
          <text:p text:style-name="P19">KONAČNO <text:s/>I <text:s/>AKONTACIONO – Ispod ovih polja su funkcionalna dugmad koja koristite prema tome da li hoćete pregled kredita koje obračunavate kroz konačnu isplatu ili kroz akontaciju, za mesec koji ste odredili u PARAMETRIMA 2. </text:p>
        </text:list-item>
      </text:list>
      <text:p text:style-name="P10"/>
      <text:list xml:id="list151340463817873" text:continue-numbering="true" text:style-name="L3">
        <text:list-item>
          <text:p text:style-name="P20">SPISAK JEDNE FIRME – Klikom na kredit u tabeli ( bilo koje polje ) zatim na dugme SPISAK JEDNE FIRME dobijate pregled rate kredita. </text:p>
          <text:p text:style-name="P20"/>
        </text:list-item>
      </text:list>
      <text:list text:style-name="L4">
        <text:list-item>
          <text:p text:style-name="P21">SALDO FIRMI – Klikom na dugme dobijate pregled aktivnih rata kredita za sve firme.</text:p>
          <text:p text:style-name="P21"/>
        </text:list-item>
        <text:list-item>
          <text:p text:style-name="P21">SALDO RADNIKA – Klikom na dugme dobijate dobijate pregled aktivnih rata, za sve radnike.</text:p>
          <text:p text:style-name="P21"/>
        </text:list-item>
        <text:list-item>
          <text:p text:style-name="P21">SVE FIRME - Klikom na dugme dobijate dobijate pregled aktivnih rata, za sve firme. <text:s/></text:p>
          <text:p text:style-name="P21"/>
        </text:list-item>
        <text:list-item>
          <text:p text:style-name="P21">LISTIĆI RADNICI – Štampa listića koja se koristi pre obračuna. To je pregled i podsetnik za obračunskog radnika. Uzima u obzir aktivnu ratu, koju tek treba da unesete u obračun i umanjuje saldo za iznos rate.</text:p>
          <text:p text:style-name="P21"/>
        </text:list-item>
        <text:list-item>
          <text:p text:style-name="P21">LISTIĆ RADNIK - Štampa listića. Uvek pre obračuna i rasknjižavanja za zaradu koju obračunavate. </text:p>
        </text:list-item>
      </text:list>
      <text:p text:style-name="P9"/>
      <text:p text:style-name="P9"/>
      <text:p text:style-name="P6">UNOS <text:s/>PODATAKA <text:s/>ZA <text:s/>ZA <text:s/>KREDIT</text:p>
      <text:p text:style-name="P3"><text:tab/></text:p>
      <text:p text:style-name="P3"><text:tab/><text:tab/> </text:p>
      <text:p text:style-name="P1"><text:span text:style-name="T1"><text:tab/><text:tab/>Iz glavnog menija Zarade i <text:s/>druga lična primanja kliktite na dugme </text:span></text:p>
      <text:p text:style-name="P3"><text:span text:style-name="T12"><text:tab/>KREDITI</text:span>. Otvorili ste meni EVIDENCIJA KREDITA. Klikom na dugme plus <text:tab/>otvarate tabelu za unos novog kredita. Kliknite u polje BROJ pa na dugme </text:p>
      <text:p text:style-name="P1"><text:span text:style-name="T5"><text:tab/>RADNICI F7</text:span><text:span text:style-name="T1"> i otvoriće se podmeni </text:span></text:p>
      <text:p text:style-name="P3"><text:tab/>EVIDENCIJA ZAPOSLENIH. Strelicama gore dole, tasterima gore dole, klikom miša <text:tab/>ili na u belom polju ispod tabele ukucajte ime radnika i taster ENTER na tastaturi, da bi <text:tab/>ste pronašli radnika kome evidentirate kredit, a zatim kliknite na izlaz. <text:s/>U polju </text:p>
      <text:p text:style-name="P3"><text:span text:style-name="T12"><text:tab/>BROJ</text:span> sada imate šifru radnika kome evidentirate kredit, a u plavom polju ispod tabele <text:tab/>ubeleženo je njegovo ime i prezime. Sada kliknite mišem u polje </text:p>
      <text:p text:style-name="P3"><text:span text:style-name="T12"><text:tab/>ŠIFRA</text:span> pa na taster </text:p>
      <text:p text:style-name="P1"><text:span text:style-name="T5"><text:tab/>PARTNERI F8</text:span><text:span text:style-name="T1"> i otvoriće vam se podmeni </text:span></text:p>
      <text:p text:style-name="P3"><text:tab/>PARTNERI 1. Na isti način kako ste izabrali radnika izaberite i partnera. </text:p>
      <text:p text:style-name="P1"><text:span text:style-name="T1"><text:tab/><text:tab/>Ukoliko nemate datog partnera, unesite ga. </text:span><text:span text:style-name="T2">Kliknite na </text:span></text:p>
      <text:p text:style-name="P1"><text:soft-page-break/><text:span text:style-name="T2"><text:tab/></text:span><text:span text:style-name="T5">DODAJ</text:span><text:span text:style-name="T2"> i otvoriće se KARTICA FIRME koja sadrži OPŠTE PODATKE, <text:tab/>KOMERCIJALNE PODATKE i OSTALO. Klikom miša otvarate polja za unos <text:tab/>podataka, a popunjavate ih prema vašim potrebama. </text:span></text:p>
      <text:p text:style-name="P1"><text:span text:style-name="T2"><text:tab/></text:span><text:span text:style-name="T5">OBAVEZAN JE UNOS NAZIVA PARTNERA I BROJA ŽIRO RAČUNA.</text:span><text:span text:style-name="T1"> <text:tab/>Kliknite na dugme </text:span></text:p>
      <text:p text:style-name="P1"><text:span text:style-name="T5"><text:tab/>IZLAZ</text:span><text:span text:style-name="T1">. U polju šifra sada imate broj partnera, a u narandžastom polju ispod tabele <text:tab/>vidite njegov naziv i broj računa. Kliknite u polje </text:span></text:p>
      <text:p text:style-name="P3"><text:span text:style-name="T12"><text:tab/>PARTIJA</text:span> i unesite broj partije za uplatu kredita, iz ugovora o kreditu. Na isti način <text:tab/>popunite ostale podatke prema sadržaju tabele. Iznos kredita, broj rata kredita, iznos <text:tab/>prve rate, iznos ostalih rata, za odbitak ( * ), i datum dokumenta. Polje </text:p>
      <text:p text:style-name="P3"><text:span text:style-name="T12"><text:tab/>AKTIVNA RATA</text:span> – popunjavate ili kontrolišete uvek pre unosa podataka u obračun.</text:p>
      <text:p text:style-name="P1"><text:span text:style-name="T5"><text:tab/>AKONTRATA</text:span><text:span text:style-name="T1"> - popunjavate samo u slučaju da imate više isplata zarade za isti mesec <text:tab/>i da odrđene kredite obračunavate kroz prvu isplatu. Kliknite u polje</text:span></text:p>
      <text:p text:style-name="P1"><text:span text:style-name="T1"><text:tab/></text:span><text:span text:style-name="T5">DATDOK</text:span><text:span text:style-name="T1"> – unesite datum. </text:span></text:p>
      <text:p text:style-name="P3"><text:tab/>Ostala polja ne popunjavate. Sada <text:tab/>kliknite na taster </text:p>
      <text:p text:style-name="P1"><text:span text:style-name="T5"><text:tab/>SREĐIVANJE KREDITA</text:span><text:span text:style-name="T1">, pa taster </text:span></text:p>
      <text:p text:style-name="P3"><text:span text:style-name="T12"><text:tab/>PREGLED OTPLATA</text:span>, da bi ste mogli da pratite otplate. </text:p>
      <text:p text:style-name="P1"><text:span text:style-name="T1"><text:tab/></text:span><text:span text:style-name="T5">SREĐIVANJE KREDITA je obavezan korak pri svakom unosu NOVOG kredita.</text:span></text:p>
      <text:p text:style-name="P7"/>
      <text:p text:style-name="P2"/>
      <text:p text:style-name="P15"><text:span text:style-name="T6">OBRAČUN ZARADA SA KREDITIMA</text:span><text:span text:style-name="T7"><text:tab/></text:span></text:p>
      <text:p text:style-name="P10"/>
      <text:p text:style-name="P1"><text:span text:style-name="T7"><text:tab/></text:span><text:span text:style-name="T9">Prvo pregledajte kredite i proverite iznose aktivnih rata. </text:span><text:span text:style-name="T3">Pre unošenja novih kredita obavezno proverite da li ste rasknjižili prethodni obračun.</text:span></text:p>
      <text:p text:style-name="P14"><text:span text:style-name="T8"><text:tab/>Ako imate samo jednu isplatu zarade kao konačnu, podatak o iznosu za obračun unosite <text:tab/>u kolonu AKTIVRATA. </text:span></text:p>
      <text:p text:style-name="P11"><text:tab/>Ako imate više isplata, u kolonu AKTIVRATA unesite iznos rate koja ide kroz konačni <text:tab/>obračun, a u kolonu AKONTRATA unosite iznos rate koja ide kroz akontaciju. UKOLIKO KORISTITE SPISAK AKTIVNIH KREDITA ŠTAMPAJTE KARTICE PRE NEGO ŠTO URADITE OBRAČUN. PROGRAM UZIMA U OBZIR AKTIVNU RATU. OVI PREGLEDI SU PODSETNICI ZA OBRAČUNSKOG RADNIKA.</text:p>
      <text:p text:style-name="P11"><text:tab/><text:span text:style-name="T15">NAŠA PREPORUKA JE DA KARTICE KREDITA ZA ZAPOSLENE ŠTAMPATE IZ <text:s/>PREGLEDA OTPLATA NAKON RASKNJIŽAVANJA KREDITA.</text:span></text:p>
      <text:p text:style-name="P12"><text:span text:style-name="T14"><text:tab/></text:span><text:span text:style-name="T13">Kod svakog obračuna zarada pregledajte PARAMETRE 2. U PARAMETRIMA 2 <text:tab/>obavezno popunite polje REDNI <text:s/>BROJ <text:s/>ISPLATE <text:s/>I KONAČNA ISPLATA u skladu <text:tab/>sa obračunom koji radite. <text:s text:c="3"/><text:tab/></text:span></text:p>
      <text:p text:style-name="P3"><text:tab/>Unos podataka za kredit je automatski. Iz platnog spiska kliknite na dugme </text:p>
      <text:p text:style-name="P3"><text:span text:style-name="T12"><text:tab/>PRENOSI</text:span>, </text:p>
      <text:p text:style-name="P7"><text:tab/>PRENOS KREDITA &gt; IZABERITE JEDNU OD OPCIJA KOJA ODGOVARA VAŠEM OBRAČUNU:</text:p>
      <text:p text:style-name="P3"><text:span text:style-name="T12"><text:tab/> -ŽELIM PRENOS KREDITA <text:s/>ILI </text:span><text:s/><text:span text:style-name="T12">ŽELIM PRENOS AKONTACIJE</text:span></text:p>
      <text:p text:style-name="P3"><text:span text:style-name="T12"><text:tab/>IZLAZ</text:span> i još jednom </text:p>
      <text:p text:style-name="P1"><text:span text:style-name="T5"><text:tab/></text:span><text:span text:style-name="T11">IZLAZ</text:span><text:span text:style-name="T10">. Krediti su sada uneti u platni spisak. Sa obračunom nastavljate standardno.</text:span></text:p>
      <text:p text:style-name="P12"/>
      <text:p text:style-name="P3">NAPOMENA:</text:p>
      <text:p text:style-name="P8"/>
      <text:p text:style-name="P3"><text:tab/>- <text:span text:style-name="T19">Ukoliko radite samo jednu isplatu kao konačnu, za prenos kredita koristite opciju ŽELIM PRENOS <text:s/>KREDITA.</text:span></text:p>
      <text:p text:style-name="P3"/>
      <text:p text:style-name="P13"><text:tab/>- UKOLIKO RADITE VIŠE ISPLATA ZA JEDAN MESEC I IMATE U EVIDENCIJI KREDITA VREDNOSTI RATA U KOLONAMA AKONTRATA I AKTIVRATA, <text:span text:style-name="T15">KADA RADITE PRVU ISPLATU</text:span> - KREDITE UNOSITE KROZ AKONTACIJU BIRAJUĆI OPCIJU <text:span text:style-name="T16">ŽELIM PRENOS AKONTACIJE</text:span>, A <text:span text:style-name="T17">KADA RADITE DRUGU ISPLATU</text:span> NAKON PRENOSA PRVE <text:soft-page-break/>ISPLATE I PRENOSA AKONTACIJE, URADITE PRENOS KREDITA KROZ OPCIJU <text:span text:style-name="T18">ŽELIM PRENOS KREDITA</text:span>.</text:p>
      <text:p text:style-name="P6"/>
      <text:p text:style-name="P6">PRAĆENJE KREDITA</text:p>
      <text:p text:style-name="P9"/>
      <text:p text:style-name="P1"><text:span text:style-name="T1"><text:tab/><text:tab/></text:span><text:span text:style-name="T5">Nakon obračuna zarade</text:span><text:span text:style-name="T1"> iz </text:span></text:p>
      <text:p text:style-name="P3"><text:tab/>GLAVNOG MENIJA ZARADE I DRUGA LIČNA PRIMANJA kliknite na dugme </text:p>
      <text:p text:style-name="P1"><text:span text:style-name="T5"><text:tab/>KREDITI</text:span><text:span text:style-name="T1">. Podrazumeva se da ste pre samog obračuna uradili sve što je potrebno. Sada kliknite na dugme </text:span></text:p>
      <text:p text:style-name="P1"><text:span text:style-name="T5"><text:tab/>RASKNJIŽAVANJE PLATE ILI RASKNJIŽAVANJE AKONTACIJE</text:span><text:span text:style-name="T1"> <text:s/>( podatak <text:tab/>mora da bude isti kao i u PARAMETRIMA 2 za zaradu koju rasknjižavate ). Unesite <text:tab/>datum plaćanja koji ste uneli u PARAMETRIMA 2 kao datum isplate i kliknite na dugme: </text:span></text:p>
      <text:p text:style-name="P3"><text:span text:style-name="T12"><text:tab/>U REDU</text:span>. Sada kliknite na dugme </text:p>
      <text:p text:style-name="P3"><text:span text:style-name="T12"><text:tab/>PREGLED OTPLATA</text:span> - da bi ste videli evidentirane uplate i ostatak dugovanja ili štampali preglede kredita. Rasknjižavanje akontacije ( prve isplate ) <text:span text:style-name="T12">obavezno je pre obračuna konačne isplate</text:span>, ukoliko imate rate kredita koje obračunavate samo kroz akontaciju. Nakon konačnog obračuna neophodno je rasknjižiti i konačni obračun. Veoma je važan redosled radnji za uredno praćenje kredita. Nakon pregleda i rasknjižavanja obavezno uradite SREĐIVANJE KREDITA. Time ćete u tabeli dobiti ispravne podatke za sledeći obračun. Na primer kod kredita koji su kroz poslednji rasknjižen obračun otplaćeni u potpunosti, nakon SREĐIVANJA KREDITA automatski će se obrisati zvezdica u koloni Zaodbitak, automatski će se obrisati <text:s/>podatak iz <text:s/>kolona Aktivrata i Ostatak, automatski će biti uneta * u kolonu Arhiva. </text:p>
      <text:p text:style-name="P3"><text:tab/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Calibri1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6T15:13:40.308000000</dc:date>
    <meta:editing-duration>PT23H30M32S</meta:editing-duration>
    <meta:editing-cycles>15</meta:editing-cycles>
    <meta:generator>LibreOffice/7.5.0.3$Windows_X86_64 LibreOffice_project/c21113d003cd3efa8c53188764377a8272d9d6de</meta:generator>
    <meta:document-statistic meta:table-count="0" meta:image-count="0" meta:object-count="0" meta:page-count="4" meta:paragraph-count="102" meta:word-count="1371" meta:character-count="8864" meta:non-whitespace-character-count="7441"/>
  </office:meta>
</office:document-meta>
</file>