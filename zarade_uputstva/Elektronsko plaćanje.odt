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40000003849F8A163BC3EFD854.png" manifest:media-type="image/png"/>
  <manifest:file-entry manifest:full-path="Pictures/100000000000064000000384EA9BD4544C71AABF.png" manifest:media-type="image/png"/>
  <manifest:file-entry manifest:full-path="Pictures/10000000000006400000038413F3D4022DA0B474.png" manifest:media-type="image/png"/>
  <manifest:file-entry manifest:full-path="Pictures/1000000000000640000003848BA5321922CC498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XT - <text:s/>ZA <text:s/>ASSECO ili HALCOM</text:p>
      <text:p text:style-name="P3">za ZARADE</text:p>
      <text:p text:style-name="P3"/>
      <text:p text:style-name="P1"><text:tab/>PRVI KORAK JE PRILAGOĐAVANJE PODATAKA, unutar programa, koji učestvuju u formiranju TXT fajla.<text:span text:style-name="T1"> </text:span></text:p>
      <text:p text:style-name="P1"/>
      <text:p text:style-name="P1"><text:tab/>U PODACIMA O FIRMI - <text:s/>u poljima TEKUĆI RAČUNI – <text:span text:style-name="T1">svi tekući računi moraju da budu bez crtica i 18 cifara.</text:span></text:p>
      <text:p text:style-name="P2"/>
      <text:p text:style-name="P1"><draw:frame draw:style-name="fr1" draw:name="графика3" text:anchor-type="paragraph" svg:x="0.235cm" svg:y="1.365cm" svg:width="16.6cm" svg:height="18.99cm" draw:z-index="1"><draw:image xlink:href="Pictures/1000000000000640000003849F8A163BC3EFD854.png" xlink:type="simple" xlink:show="embed" xlink:actuate="onLoad" draw:mime-type="image/png"/></draw:frame><text:tab/></text:p>
      <text:p text:style-name="P2"><text:tab/></text:p>
      <text:p text:style-name="P2"><text:tab/></text:p>
      <text:p text:style-name="P2"><text:soft-page-break/><text:tab/>Sve zaposlene koji primaju zaradu preko svog tekućeg računa uvedite u evidenciju partnera. Morate uneti sve neophodne podatke . Na slici dole zaokruženi su neophodni podaci. Broj računa zaposlenog unosite bez crtica sa 18 cifara.</text:p>
      <text:p text:style-name="P2"/>
      <text:p text:style-name="P2"><draw:frame draw:style-name="fr2" draw:name="графика4" text:anchor-type="paragraph" svg:width="16.815cm" svg:height="23.514cm" draw:z-index="2"><draw:image xlink:href="Pictures/10000000000006400000038413F3D4022DA0B474.png" xlink:type="simple" xlink:show="embed" xlink:actuate="onLoad" draw:mime-type="image/png"/></draw:frame></text:p>
      <text:p text:style-name="P1"><text:soft-page-break/><text:span text:style-name="T1"><text:tab/>ŠIFRU </text:span><text:span text:style-name="T2">zaposlenog iz EVIDENCIJE PARTNERA unosite u EVIDENCIJU ZAPOSLENIH. KARTICA F7 u EVIDENCIJI ZAPOSLENIH POLJE </text:span><text:span text:style-name="T1">ŠIFRA BANKE.</text:span></text:p>
      <text:p text:style-name="P2"/>
      <text:p text:style-name="P2"/>
      <text:p text:style-name="P2"><draw:frame draw:style-name="fr2" draw:name="графика6" text:anchor-type="paragraph" svg:width="16.002cm" svg:height="23.745cm" draw:z-index="3"><draw:image xlink:href="Pictures/100000000000064000000384EA9BD4544C71AABF.png" xlink:type="simple" xlink:show="embed" xlink:actuate="onLoad" draw:mime-type="image/png"/></draw:frame></text:p>
      <text:p text:style-name="P1"><text:soft-page-break/><text:span text:style-name="T1"><text:tab/>Nakon izrade obračuna formirjte SPISAK. </text:span><text:span text:style-name="T2">Pređite u <text:s/>XML – TXT formirajte PPP PD prijavu.</text:span></text:p>
      <text:p text:style-name="P1"><text:span text:style-name="T2"><text:tab/></text:span><text:span text:style-name="T1">Nakon predaje PPP PD prijave preuzmite nalog za uplatu poreza i doprinosa sa poreske. </text:span></text:p>
      <text:p text:style-name="P1"><text:span text:style-name="T1"><text:tab/>Sada ste u VIRMANIMA i preuzmite naloge za isplatu zarade, klikom na dugme PREUZIMANJE 2.</text:span><text:span text:style-name="T2"> Datume u nalogu za plaćanje, usaglasite sa datumom plaćanja.</text:span></text:p>
      <text:p text:style-name="P1"><text:span text:style-name="T1"><text:tab/></text:span><text:span text:style-name="T2">Ukoliko u VIRMANIMA ručno pravite nalog za uplatu poreza i doprinosa, </text:span><text:span text:style-name="T1">uvek </text:span><text:span text:style-name="T2">prvo naprvite nalog za uplatu poreza i doprinosa, pa preuzmite naloge za isplatu zarade. <text:s/></text:span></text:p>
      <text:p text:style-name="P1"><text:span text:style-name="T2"><text:tab/>Pređite na </text:span><text:span text:style-name="T1">ELEKTRONSKO PLAĆANJE.</text:span></text:p>
      <text:p text:style-name="P1"><text:span text:style-name="T1"><text:tab/>Brišite sve postojeće pakete i dodajte novi paket. Uđite u tabelu paketa i kliknite na dugme UNOS VIRMANA IZ ZARADA. Izađite iz tabele paketa i kliknite na dugme PREGLED PAKETA. </text:span><text:span text:style-name="T2">Izvršite kontrolu podataka i ukoliko vam je to potrebno odštampajte dokument. </text:span></text:p>
      <text:p text:style-name="P1"><text:span text:style-name="T2"><text:tab/></text:span><text:span text:style-name="T1">Sada kliknite na dugme IZVOZ ZA ASSECO U .TXT FORMATU. ili <text:s/>IZVOZ ZA HALCOM U .TXT FORMATU, shodno tome koju aplikaciju koristi Vaša banka.</text:span></text:p>
      <text:p text:style-name="P2"><draw:frame draw:style-name="fr1" draw:name="графика1" text:anchor-type="paragraph" svg:x="0.326cm" svg:y="0.332cm" svg:width="16.17cm" svg:height="15.076cm" draw:z-index="0"><draw:image xlink:href="Pictures/1000000000000640000003848BA5321922CC498E.png" xlink:type="simple" xlink:show="embed" xlink:actuate="onLoad" draw:mime-type="image/png"/></draw:frame><text:tab/></text:p>
      <text:p text:style-name="P1"><text:span text:style-name="T1"><text:s/><text:tab/>Na ekranu imate, u gornjem desnom uglu, poruku, kao na slici gore. </text:span><text:span text:style-name="T2">Pročitajte poruku i pritisnite broj na naumeričkoj tastaturi.</text:span></text:p>
      <text:p text:style-name="P2"/>
      <text:p text:style-name="P2"><text:tab/>Na EKRANU u gornjem desnom uglu sada imate adresu fomiranog TXT fajla koji treba da unesete u aplikacju banke.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zxx" fo:country="non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zef Brnić</meta:initial-creator>
    <meta:creation-date>2018-12-20T11:31:11.30</meta:creation-date>
    <dc:date>2023-07-10T16:15:01.819000000</dc:date>
    <meta:editing-duration>PT8H40S</meta:editing-duration>
    <meta:editing-cycles>6</meta:editing-cycles>
    <meta:generator>LibreOffice/7.5.0.3$Windows_X86_64 LibreOffice_project/c21113d003cd3efa8c53188764377a8272d9d6de</meta:generator>
    <meta:document-statistic meta:table-count="0" meta:image-count="4" meta:object-count="0" meta:page-count="4" meta:paragraph-count="19" meta:word-count="278" meta:character-count="1764" meta:non-whitespace-character-count="1469"/>
  </office:meta>
</office:document-meta>
</file>