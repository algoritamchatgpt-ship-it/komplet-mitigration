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ARADA ZAPOSLENOG KOJI IMA NEPUNO RADNO </text:p>
      <text:p text:style-name="P1">VREME KOD VIŠE POSLODAVACA</text:p>
      <text:p text:style-name="P1"/>
      <text:p text:style-name="P2"><text:tab/>U EVIDENCIJI ZAPOSLENIH unosite obavezno podatak o procentu radnog angažovanja.</text:p>
      <text:p text:style-name="P2">Utvrdite procentualni iznos minimalne osnovice prema procentu radnog angažovanja. Utvrdite da li je njegova ugovorena neto zarada manja ili veća od utvrđenog iznosa najniže osnovice. </text:p>
      <text:p text:style-name="P2"/>
      <text:p text:style-name="P2"><text:tab/>Ukoliko je neto zarada veća od utvrđenog procentualnog iznosa najniže osnovice bruto izračunavate po formuli: <text:s/></text:p>
      <text:p text:style-name="P2"/>
      <text:p text:style-name="P2"><text:s text:c="70"/>NETO – UPO x SP <text:s/></text:p>
      <text:p text:style-name="P2"><text:tab/><text:tab/><text:tab/><text:tab/>BRUTO = ----------------------------------</text:p>
      <text:p text:style-name="P2"><text:s text:c="82"/>0,701</text:p>
      <text:p text:style-name="P2"/>
      <text:p text:style-name="P2"><text:tab/>Obavezno pre obračuna u PARAMETRIMA 1 izbrisati najnižu osnovicu.</text:p>
      <text:p text:style-name="P2"/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Title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zef Brnić</meta:initial-creator>
    <meta:creation-date>2019-12-26T13:10:51.80</meta:creation-date>
    <meta:document-statistic meta:table-count="0" meta:image-count="0" meta:object-count="0" meta:page-count="1" meta:paragraph-count="10" meta:word-count="78" meta:character-count="728"/>
    <dc:date>2019-12-26T16:43:06.97</dc:date>
    <dc:creator>Jozef Brnić</dc:creator>
    <meta:editing-duration>PT19M24S</meta:editing-duration>
    <meta:editing-cycles>1</meta:editing-cycles>
    <meta:generator>OpenOffice/4.1.1$Win32 OpenOffice.org_project/411m6$Build-9775</meta:generator>
  </office:meta>
</office:document-meta>
</file>