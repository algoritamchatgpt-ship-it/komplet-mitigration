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8B084A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O OBRAČUN</text:p>
      <text:p text:style-name="P1"/>
      <text:p text:style-name="P2"><text:tab/>Klikom na dugme NETO OBRAČUN – otvorili ste podmeni – OBRAČUN ZARADA SA NETA NA BRUTO u koji unosite podatke za vaš obračun – slika dole.</text:p>
      <text:p text:style-name="P2"/>
      <text:p text:style-name="P2"><draw:frame draw:style-name="fr1" draw:name="графика1" text:anchor-type="paragraph" svg:width="6.6929in" svg:height="3.7646in" draw:z-index="0"><draw:image xlink:href="Pictures/1000000000000640000003848B084A8B.png" xlink:type="simple" xlink:show="embed" xlink:actuate="onLoad"/></draw:frame></text:p>
      <text:p text:style-name="P2">Polja popunjavate shodno načinu na koji radite sam obračun.</text:p>
      <text:p text:style-name="P2"/>
      <text:p text:style-name="P2">UNESITE NETO CENU RADA</text:p>
      <text:p text:style-name="P2">OBRAČUNATI NAKNADE</text:p>
      <text:p text:style-name="P2">OBRAČUNATI OD UKUPNE OBAVEZE</text:p>
      <text:p text:style-name="P2">GRUPA</text:p>
      <text:p text:style-name="P2">PO SA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9-01-29T15:06:56.69</meta:creation-date>
    <meta:document-statistic meta:table-count="0" meta:image-count="1" meta:object-count="0" meta:page-count="1" meta:paragraph-count="8" meta:word-count="50" meta:character-count="289"/>
    <dc:date>2019-01-29T15:41:54.49</dc:date>
    <dc:creator>Jozef Brnić</dc:creator>
    <meta:editing-duration>PT19M24S</meta:editing-duration>
    <meta:editing-cycles>1</meta:editing-cycles>
    <meta:generator>OpenOffice/4.1.1$Win32 OpenOffice.org_project/411m6$Build-9775</meta:generator>
  </office:meta>
</office:document-meta>
</file>