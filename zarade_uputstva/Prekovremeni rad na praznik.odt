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-Bold" svg:font-family="Cambria-Bold"/>
    <style:font-face style:name="Mangal1" svg:font-family="Mangal"/>
    <style:font-face style:name="Cambria" svg:font-family="Cambria" style:font-family-generic="roman"/>
    <style:font-face style:name="Cambria-BoldItalic" svg:font-family="Cambria-BoldItalic" style:font-family-generic="script"/>
    <style:font-face style:name="Cambria-Italic" svg:font-family="Cambri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-Bold" fo:font-size="10pt" style:font-name-asian="Cambria-Bold" style:font-size-asian="10pt" style:font-name-complex="Cambria-Bold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-Bold" fo:font-size="10.5pt" fo:font-weight="bold" style:font-name-asian="Cambria-Bold" style:font-size-asian="10.5pt" style:font-weight-asian="bold" style:font-name-complex="Cambria-Bold" style:font-size-complex="10.5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-BoldItalic" fo:font-size="13.5pt" fo:font-style="italic" fo:font-weight="bold" style:font-name-asian="Cambria-BoldItalic" style:font-size-asian="13.5pt" style:font-style-asian="italic" style:font-weight-asian="bold" style:font-name-complex="Cambria-BoldItalic" style:font-size-complex="13.5pt" style:font-style-complex="italic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-Italic" fo:font-size="13pt" fo:font-style="italic" style:font-name-asian="Cambria-Italic" style:font-size-asian="13pt" style:font-style-asian="italic" style:font-name-complex="Cambria-Italic" style:font-size-complex="13pt" style:font-style-complex="italic"/>
    </style:style>
    <style:style style:name="P5" style:family="paragraph" style:parent-style-name="Standard" style:list-style-name="">
      <style:paragraph-properties style:text-autospace="none"/>
      <style:text-properties fo:color="#000000" style:font-name="Cambria-Italic" fo:font-size="13pt" style:font-name-asian="Cambria-Italic" style:font-size-asian="13pt" style:font-name-complex="Cambria-Italic" style:font-size-complex="13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" fo:font-size="10.5pt" style:font-name-asian="Cambria" style:font-size-asian="10.5pt" style:font-name-complex="Cambria" style:font-size-complex="10.5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ffffff" style:font-name="Cambria-Bold" fo:font-size="16pt" fo:font-weight="bold" style:font-name-asian="Cambria-Bold" style:font-size-asian="16pt" style:font-weight-asian="bold" style:font-name-complex="Cambria-Bold" style:font-size-complex="16pt" style:font-weight-complex="bold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style:font-name="Cambria" fo:font-size="12.5pt" style:font-name-asian="Cambria" style:font-size-asian="12.5pt" style:font-name-complex="Cambria" style:font-size-complex="12.5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style:font-name="Cambria-Bold" fo:font-size="16pt" style:font-name-asian="Cambria-Bold" style:font-size-asian="16pt" style:font-name-complex="Cambria-Bold" style:font-size-complex="16pt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0000" style:font-name="Cambria-Bold" fo:font-size="10.5pt" fo:font-weight="bold" style:font-name-asian="Cambria-Bold" style:font-size-asian="10.5pt" style:font-weight-asian="bold" style:font-name-complex="Cambria-Bold" style:font-size-complex="10.5pt" style:font-weight-complex="bold"/>
    </style:style>
    <style:style style:name="T3" style:family="text">
      <style:text-properties fo:color="#ffffff" style:font-name="Cambria-Bold" fo:font-size="16pt" fo:font-weight="bold" style:font-name-asian="Cambria-Bold" style:font-size-asian="16pt" style:font-weight-asian="bold" style:font-name-complex="Cambria-Bold" style:font-size-complex="16pt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ambria" fo:font-size="12.5pt" style:font-name-asian="Cambria" style:font-size-asian="12.5pt" style:font-name-complex="Cambria" style:font-size-complex="12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BRAČUN ZAROBRAČUN ZARADE ZAPOSLENOG KOJI JE RADIOADE ZOOOOJI</text:p>
      <text:p text:style-name="P10"><text:span text:style-name="T4">JE PREKOVREMENO RAOBRAČUN ZARADE ZAPOSLENOG </text:span><text:span text:style-name="T6">OBRAČUN ZARADE ZAPOSLENOG KOJI JE PREKOVREMENO</text:span></text:p>
      <text:p text:style-name="P9"><text:s text:c="41"/>RADIO NA DAN DRŽAVNOG PRAZNIKA<text:span text:style-name="T3">DRŽAVNOG PRAZNIKA</text:span></text:p>
      <text:p text:style-name="P3"/>
      <text:p text:style-name="P5"><text:span text:style-name="T3">DIO NA DAN</text:span></text:p>
      <text:p text:style-name="P7">DRŽAVNOG PRAZNIKA</text:p>
      <text:p text:style-name="P3">Zakon o radu</text:p>
      <text:p text:style-name="P4">član 108</text:p>
      <text:p text:style-name="P1"><text:span text:style-name="T1">• Zaposleni koji je prekovremeno radio na dan državnog praznika</text:span></text:p>
      <text:p text:style-name="P2">ima pravo na zaradu koja predstavlja zbir ostvarene</text:p>
      <text:p text:style-name="P2">osnovne zarade za redovan rad, uvećane zarade za rad na dan</text:p>
      <text:p text:style-name="P2">državnog praznika i uvećane zarade za prekovremeni rad</text:p>
      <text:p text:style-name="P6">“Članom 108. stav 1. tačka 1) Zakona o radu (“Sl. glasnik RS”, br.</text:p>
      <text:p text:style-name="P6">24/2005, 61/2005, 54/2009, 32/2013 i 75/2014 - dalje: Zakon) utvrđeno</text:p>
      <text:p text:style-name="P6">je pravo zaposlenog na uvećanu zaradu u visini utvrđenoj opštim</text:p>
      <text:p text:style-name="P6">aktom i ugovorom o radu, za rad na dan praznika koji je neradni dan</text:p>
      <text:p text:style-name="P6">- najmanje 110% od osnovice, kao i za prekovremeni rad - najmanje</text:p>
      <text:p text:style-name="P6">26% od osnovice (tačka 3).</text:p>
      <text:p text:style-name="P6">Osnovicu za obračun uvećane zarade čini osnovna zarada, pa ukoliko</text:p>
      <text:p text:style-name="P6">se primenjuje uvećanje od 110% za rad na dan praznika, odnosno</text:p>
      <text:p text:style-name="P6">26% za prekovremeni rad, kako je propisano Zakonom, zaposleni ima</text:p>
      <text:p text:style-name="P6">pravo za svaki sat rada u dane praznika na osnovnu zaradu i uvećanje</text:p>
      <text:p text:style-name="P6">od 110%, a ne samo 10% od osnovne zarade, kao i uvećanje od 26% za</text:p>
      <text:p text:style-name="P6">prekovremene sate rada.</text:p>
      <text:p text:style-name="P6">Prema tome, ukupna zarada zaposlenog koji je prekovremeno radio</text:p>
      <text:p text:style-name="P6">na dan državnog praznika predstavlja zbir ostvarene osnovne zarade</text:p>
      <text:p text:style-name="P6">za redovan rad, uvećane zarade za rad na dan državnog praznika</text:p>
      <text:p text:style-name="P6">i uvećane zarade za prekovremeni rad.”</text:p>
      <text:p text:style-name="P8"><text:span text:style-name="T2">(Mišljenje Ministarstva za rad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-Bold" svg:font-family="Cambria-Bold"/>
    <style:font-face style:name="Mangal1" svg:font-family="Mangal"/>
    <style:font-face style:name="Cambria" svg:font-family="Cambria" style:font-family-generic="roman"/>
    <style:font-face style:name="Cambria-BoldItalic" svg:font-family="Cambria-BoldItalic" style:font-family-generic="script"/>
    <style:font-face style:name="Cambria-Italic" svg:font-family="Cambri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1-10-13T12:24:03.99</meta:creation-date>
    <meta:document-statistic meta:table-count="0" meta:image-count="0" meta:object-count="0" meta:page-count="1" meta:paragraph-count="28" meta:word-count="238" meta:character-count="1479"/>
    <dc:date>2021-10-13T16:03:20.05</dc:date>
    <dc:creator>Jozef Brnić</dc:creator>
    <meta:editing-duration>PT3H24M5S</meta:editing-duration>
    <meta:editing-cycles>1</meta:editing-cycles>
    <meta:generator>OpenOffice/4.1.1$Win32 OpenOffice.org_project/411m6$Build-9775</meta:generator>
  </office:meta>
</office:document-meta>
</file>