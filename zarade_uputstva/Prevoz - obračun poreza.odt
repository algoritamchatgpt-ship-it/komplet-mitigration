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UTSTVO ZA OBRAČUN POREZA NA PREVOZ</text:p>
      <text:p text:style-name="P1">ZAPOSLENIH</text:p>
      <text:p text:style-name="P1"/>
      <text:p text:style-name="P2"><text:tab/>U EVIDENCIJI ZAPOSLENIH obeležite kolonu </text:p>
      <text:p text:style-name="P2">PREVOZ - * ZVEZDICOM kod zaposlenih kojima plaćate prevoz. Možete i kroz tabelu uneti ovaj podatak - kliknite na dugme OTVORI TABELU i u kolonu PREVOZ unesite * ZVEZDICU <text:s/>kod zaposlenih kojima plaćate prevoz. U PARMETRIMA 2 izaberite mesec za koji radite obračun prevoza. Obavezno u parametrima dva polje KONAČNA ISPLATA D/N MORA DA BUDE PRAZNO. Kliknite na dugme </text:p>
      <text:p text:style-name="P2">PREVOZ – Kolona sasvim desno četvrto dugme na dole. Pred vama je sada prazna tabela za obračun prevoza. Ispod tabele su funkcionalni dugmići za unos porataka i obračun. Kliknite na dugme </text:p>
      <text:p text:style-name="P2">PRUZMI IZ SPISKA<text:tab/>- Preuzeli ste zaposlene koje ste u evidenciji zaposlenih obeležili zvezdicom u koloni prevoz. Kliknite sada na dugme </text:p>
      <text:p text:style-name="P2">POPUNJAVANJE – Otvorili ste pomoćnu tabelu POPUNJAVANJE KOLONE POPUNJAVANJE PODATAKA. Popunite polja datim redosledom. </text:p>
      <text:p text:style-name="P2">DANA U MESECU – Broj dana za koji zaposlenim plaćate prevoz.</text:p>
      <text:p text:style-name="P2">DNEVNA KARTA – Cena karte za jedan dan.</text:p>
      <text:p text:style-name="P2">NEOPOREZIVO – Trenutno važeći neoporezivi iznos za prevoz zaposlenih.</text:p>
      <text:p text:style-name="P2">DATUM – Datum obračuna.</text:p>
      <text:p text:style-name="P2">MESEC – Broj meseca za koji radite obračun prevoza.</text:p>
      <text:p text:style-name="P2">NAZIV - Naziv meseca za koji radite obračun prevoza.</text:p>
      <text:p text:style-name="P2"><text:tab/>Sada kliknite na dugme </text:p>
      <text:p text:style-name="P2">UNOS - pa kliknite mišem na </text:p>
      <text:p text:style-name="P2">ŠIFRA PRIHODA i potvrdite enterom na tastaturi. Sada kliknite mišem na</text:p>
      <text:p text:style-name="P2">BROJ - prvog zaposlenog u spisku i potvrdite unos podataka tasterom </text:p>
      <text:p text:style-name="P2">ENTER - do kraja spiska. </text:p>
      <text:p text:style-name="P2"/>
      <text:p text:style-name="P2"><text:tab/>Ukoliko vam broj dana ili cena karte nije ista za sve zaposlene, iznos korigujte u tabeli direktnim unosom – svaki unos potvrdite tasterom ENTER.</text:p>
      <text:p text:style-name="P2"/>
      <text:p text:style-name="P2"><text:tab/>Pronađite sada kolonu </text:p>
      <text:p text:style-name="P2">ISPLATA - i unesite redni broj isplate kod svih zaposlenih. </text:p>
      <text:p text:style-name="P2"><text:tab/>Završili ste obračun. </text:p>
      <text:p text:style-name="P2"/>
      <text:p text:style-name="P2"><text:tab/>Sada ispod tabele pronađite dugme </text:p>
      <text:p text:style-name="P2">SAČUVAJ – samo kliknite na dugme da bi ste obračun preneli u arhivu prevoza. Ovaj korak je neophodan da bi ste mogli da preuzmete podatke u PPP – PD. </text:p>
      <text:p text:style-name="P2">ARHIVA – DEARHIVA – OVO DUGME SLUŽI ZA PONIŠTAVANJE ARHIVE – Ukoliko ste sačuvali odnosno arhivirali obračun koji hoćete da izmenite ili dopunite prvo kliknite na dugme ARHIVA – DEARHIVA <text:s/>pa onda radite izmene i dopune. Ne zaboravite da sačuvate obračun nakon izmene ili dpopune.</text:p>
      <text:p text:style-name="P2"/>
      <text:p text:style-name="P2"><text:tab/>Sada kliknite na dugme</text:p>
      <text:p text:style-name="P2"><text:s/></text:p>
      <text:p text:style-name="P2">IZLAZ. Sada kliknite na dugme</text:p>
      <text:p text:style-name="P2"><text:s/></text:p>
      <text:p text:style-name="P2"><text:span text:style-name="T1">SPISAK</text:span> da formirate spisak za isplatu prevoza zaposlenih. Ukoliko je tabela spiska popunjena prvo kliknite na dugme </text:p>
      <text:p text:style-name="P2">BRIŠI, a zatim na dugme </text:p>
      <text:p text:style-name="P2">PRENOS PREVOZA. </text:p>
      <text:p text:style-name="P2"><text:tab/>Ukoliko zaposlenima prevoz isplaćujete na tekuće tačune, iz ovog spiska ćete kasnije povući <text:soft-page-break/>podatke za naloge za isplatu. Pre prenosa naloga za isplatu u PARAMETRIMA 1, obrišite podatak u polju konačna isplata. Zaposleni moraju imati šifre partnera, a te šifre moraju da budu unete u evidencuju zaposlenih. </text:p>
      <text:p text:style-name="P1"/>
      <text:p text:style-name="P1">PRIJAVA PPP – PD </text:p>
      <text:p text:style-name="P1">za prevoz</text:p>
      <text:p text:style-name="P1"/>
      <text:p text:style-name="P2"><text:tab/>Izađite u GLAVNI MENI i kliknite na dugme </text:p>
      <text:p text:style-name="P2">IV XML-TXT zatim na dugme </text:p>
      <text:p text:style-name="P2">1.XML ZATI zatim na dugme</text:p>
      <text:p text:style-name="P2">PORESKA PRIJAVA PPP-PD i otvodili ste </text:p>
      <text:p text:style-name="P2">PODMENI PPP-PD sada kliknite na dugme </text:p>
      <text:p text:style-name="P2">PARAMETRI i popunite potrebne podatke. Redni broj isplate i mesec moraju da budu isti kao i u obračunu prevoza. Polja broj dana i fond sati ne popunjavate. Kliknite sada na </text:p>
      <text:p text:style-name="P2">IZLAZ pa na dugme PORESKA PRIJAVA PPP-PD. Sada ste u tabeli </text:p>
      <text:p text:style-name="P2">PREUZIMANJE ZARADA I PPP-PD . Ukoliko je tabela popunjena kliknite na dugme </text:p>
      <text:p text:style-name="P2">BRIŠI SVE, pa na dugme </text:p>
      <text:p text:style-name="P2">PARAMETRI PRENOSA. Ukoliko je tabela prazna kliknite na dugme </text:p>
      <text:p text:style-name="P2">PARAMETRI PRENOSA. Otvoili ste tabelu </text:p>
      <text:p text:style-name="P2">PARAMETRI PRENOSA. Kliknite na dugme </text:p>
      <text:p text:style-name="P2">BRIŠI SVE pa na dugme </text:p>
      <text:p text:style-name="P2">DODAJ SVE . Sada u tabeli kliknite na red </text:p>
      <text:p text:style-name="P2">PREVOZ RADNIKA i unesite podatak </text:p>
      <text:p text:style-name="P2">ISPLATA - <text:s/>broj isplate i </text:p>
      <text:p text:style-name="P2">MESEC – broj meseca. Ovi podaci moraju da budu isti kao u obračunu prevoza. Kliknite na </text:p>
      <text:p text:style-name="P2">KRSIĆ da bi ste se vratili u tabelu PREUZIMANJE ZARADA I PPP-PD. Kliknite na dugme PREUZMI ZARADE. Dobili ste podatke iz obračuna prevoza. Sada kliknite na dugme </text:p>
      <text:p text:style-name="P2">NAPRAVI XML i predajte prijavu.</text:p>
      <text:p text:style-name="P2"/>
      <text:p text:style-name="P2"><text:tab/>Nakon preuzimanja naloga za uplatu poreza sa poreske u VIRMANIMA preuzmite naloge za isplatu prevoza. 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02-20T11:33:11.28</meta:creation-date>
    <dc:date>2022-03-10T16:23:20.92</dc:date>
    <dc:creator>Jozef Brnić</dc:creator>
    <meta:editing-duration>PT7H11M3S</meta:editing-duration>
    <meta:editing-cycles>7</meta:editing-cycles>
    <meta:generator>OpenOffice/4.1.1$Win32 OpenOffice.org_project/411m6$Build-9775</meta:generator>
    <meta:printed-by>Jozef Brnić</meta:printed-by>
    <meta:print-date>2018-10-26T11:22:03</meta:print-date>
    <meta:document-statistic meta:table-count="0" meta:image-count="0" meta:object-count="0" meta:page-count="2" meta:paragraph-count="56" meta:word-count="623" meta:character-count="3810"/>
  </office:meta>
</office:document-meta>
</file>