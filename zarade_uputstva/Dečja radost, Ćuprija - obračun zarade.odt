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ČJA RADOST OBRAČUN ZARADE </text:p>
      <text:p text:style-name="P1"/>
      <text:p text:style-name="P1"/>
      <text:p text:style-name="P2"><text:tab/>Neto obračun.</text:p>
      <text:p text:style-name="P2"><text:tab/>U prvoj isplati obračun radite sa polovinom radnog vremena i punom cenom rada – da bi ste imali proporcionalan obračun doprinosa ( izbegavanje obračuna doprinosa na najnižu osnovicu ). </text:p>
      <text:p text:style-name="P2"><text:tab/>Za obračunavanje naknada koristite programsku opciju OBRAČUN NAKNADA.</text:p>
      <text:p text:style-name="P2"><text:tab/>Minuli rad <text:s/>na primanja – oznaka 2 u <text:s/>PARAMETRIMA 1.</text:p>
      <text:p text:style-name="P2"><text:tab/>Za zaposlene koji imaju manju zaradu od minimalne po ugovoru – <text:s/>koristite dotaciju. U programu ne postoji opcija u kojoj možete automatski da obračunate minuli rad na dotaciju.</text:p>
      <text:p text:style-name="P2"><text:tab/>Kada radite prvi obračun u <text:s/>PARAMETRIMA 1 ostaje ubeležen procent minulog rada 0.4% i oznaka 2 <text:s/>- <text:s/>obračun minulog rada na primanja i obavezno neto iznos minimalne zarade za mesec za koji radite obračun – NETO OBRAČUN &gt; DODAJ MINULI RAD. OBAVEZNO uraditi dotaciju zbog radnika koji primaju minimalnu zaradu. Nakon dodavanja dotacije – PRENOSI &gt; DOTACIJA &gt; SVI RADNICI &gt; IZLAZ - ponoviti obračun. Ručno obračunati minuli rad na <text:span text:style-name="T1">minimalnu zaradu</text:span> kod svih zaposlenih koji imaju dotaciju i uneti taj iznos kroz karticu F7 u polje minuli rad. Ukoliko radnici koji primaju minimalnu zaradu nemaju staž njihov obračun će biti dobar nakon dodavanja dotacije. Zatim u <text:s/>PARAMETRIMA 1 obrisati procent minulog rada i ukucati 0 – minuli rad na start oznaka 0, pa tek onda ponoviti obračun - NETO OBRAČUN &gt; DODAJ MINULI RAD.</text:p>
      <text:p text:style-name="P2"/>
      <text:p text:style-name="P1">DRUGI OBRAČUN</text:p>
      <text:p text:style-name="P1"/>
      <text:p text:style-name="P1"/>
      <text:p text:style-name="P2"><text:tab/>Kada radite drugi obračun – prvo vratite parametre - u PARAMETRIMA 1 <text:s/>ubeležiti procent minulog rada 0.4% i oznaku 2 <text:s/>- <text:s/>obračun minulog rada na primanja i obavezno neto iznos minimalne zarade. Zatim prenos - PRENOSI &gt; PRENOS ZARADE II ISPLATA &gt; ŽELIM PRENOS &gt; PRENOS AKONTACIJE &gt; <text:s/>ŽELIM PRENOS. Uneti kredite i obustave, korigovati časove rada, dopunskog rada, noćnog rada, naknada, korigovati topli obrok i regres ako ga ima.</text:p>
      <text:p text:style-name="P2">Uraditi obračun - NETO OBRAČUN &gt; DODAJ MINULI RAD. OBAVEZNO uraditi dotaciju zbog radnika koji primaju minimalnu zaradu. Nakon dodavanja dotacije – PRENOSI &gt; DOTACIJA &gt; SVI RADNICI &gt; IZLAZ - ponoviti obračun. Ručno obračunati minuli rad na minimalnu zaradu kod svih zaposlenih koji imaju dotaciju i uneti taj iznos minulog rada ručno kroz karticu F7. Ukoliko radnici koji primaju minimalnu zaradu nemaju staž njihov obračun će biti dobar nakon dodavanja dotacije. Zatim u <text:s/>PARAMETRIMA 1 obrisati procent minulog rada i ukucati 0 – minuli rad na start oznaka 0, pa tek onda ponoviti obračun - NETO OBRAČUN &gt; DODAJ MINULI R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10-01T13:05:39.44</meta:creation-date>
    <dc:date>2019-07-18T15:25:29.06</dc:date>
    <dc:creator>Jozef Brnić</dc:creator>
    <meta:editing-duration>PT7H22M2S</meta:editing-duration>
    <meta:editing-cycles>5</meta:editing-cycles>
    <meta:generator>OpenOffice/4.1.1$Win32 OpenOffice.org_project/411m6$Build-9775</meta:generator>
    <meta:printed-by>Jozef Brnić</meta:printed-by>
    <meta:print-date>2019-01-21T10:11:20.99</meta:print-date>
    <meta:document-statistic meta:table-count="0" meta:image-count="0" meta:object-count="0" meta:page-count="1" meta:paragraph-count="10" meta:word-count="390" meta:character-count="2406"/>
  </office:meta>
</office:document-meta>
</file>