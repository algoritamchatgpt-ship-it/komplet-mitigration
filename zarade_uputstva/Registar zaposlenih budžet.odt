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7793CA8D.png"/>
  <manifest:file-entry manifest:media-type="image/png" manifest:full-path="Pictures/1000000000000640000003845544A86F.png"/>
  <manifest:file-entry manifest:media-type="image/png" manifest:full-path="Pictures/100000000000064000000384FF1D74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AR ZAPOSLENIH BUDŽET</text:p>
      <text:p text:style-name="P1">I</text:p>
      <text:p text:style-name="P1"><text:s text:c="2"/>ZARADE ZAPOSLENIH</text:p>
      <text:p text:style-name="P1"/>
      <text:p text:style-name="P2">- REGISTAR ZAPOSLENIH BUDŽET</text:p>
      <text:p text:style-name="P2"/>
      <text:p text:style-name="P2"><text:tab/>1. <text:span text:style-name="T1">PARAMETRI:</text:span></text:p>
      <text:p text:style-name="P2"/>
      <text:p text:style-name="P2"><draw:frame draw:style-name="fr1" draw:name="графика1" text:anchor-type="paragraph" svg:width="8.0346in" svg:height="5.9126in" draw:z-index="0"><draw:image xlink:href="Pictures/100000000000064000000384FF1D74E5.png" xlink:type="simple" xlink:show="embed" xlink:actuate="onLoad"/></draw:frame></text:p>
      <text:p text:style-name="P2"><text:tab/> BROJ <text:s/>KORISJEDINSTVENI NIKA – Unosite JBKS </text:p>
      <text:p text:style-name="P2"/>
      <text:p text:style-name="P2"><text:tab/>ISPLATA U MESECU – Unosite oznaku meseca u kome ste izvršili isplatu prihoda za koji predajete podatak. Meseci od 1 – 9 unose se sa nulom ispred broja meseca.</text:p>
      <text:p text:style-name="P2"/>
      <text:p text:style-name="P2"><text:tab/>GODINA – Unosite tekuću godinu.</text:p>
      <text:p text:style-name="P2"/>
      <text:p text:style-name="P2"><text:tab/>DATUM <text:s/>SLANJA – Unosite datum na dan predaje podataka o prihodu.</text:p>
      <text:p text:style-name="P2"/>
      <text:p text:style-name="P2"><text:tab/>FUNKCIONALNA <text:s/>KLASIFIKACIJA – Unosite trocifren broj klase iz šeme funkcionalne klasifikacije iz PRAVILNIKA O STANDARDNOM KLASIFIKACIONOM OKVIRU I KONTNOM PLANU ZA BUDŽETSKI SISTEM. </text:p>
      <text:p text:style-name="P2"><text:soft-page-break/></text:p>
      <text:p text:style-name="P2"/>
      <text:p text:style-name="P2"><text:tab/> </text:p>
      <text:p text:style-name="P2"><text:tab/>2. <text:span text:style-name="T1">ZAPOSLENI</text:span> – Tabela Šema prenosa registra zaposlenih se popunjava automatski klikom na dugme DODAJ SVE. Podatke prenosi iz EVIDENCIJE ZAPOSLENIH U OKVIRU KOJE STE ZA SVAKOG ZAPOSLENOG VEĆ UNELI POTREBNE PODATKE KROZ OPCIJU <text:span text:style-name="T1">REGISTAR ZAPOSLENIH.</text:span></text:p>
      <text:p text:style-name="P2"/>
      <text:p text:style-name="P2"><text:tab/>3. <text:span text:style-name="T1">ŠEMA XML – XML ŠEMA ZAPOSLENIH </text:span><text:span text:style-name="T2">formira se klikom na dugme </text:span><text:span text:style-name="T1">DODAJ SVE</text:span><text:span text:style-name="T2">. Sada kliknite na dugme </text:span><text:span text:style-name="T1">NAPRAVI XML. </text:span>Izađite do GLAVNOG MENIJA kliknite na ikonicu XML i otvorićete prozor u kome se nalazi XML fajl koji ste formirali.</text:p>
      <text:p text:style-name="P2"><text:span text:style-name="T1"/></text:p>
      <text:p text:style-name="P2"><draw:frame draw:style-name="fr1" draw:name="графика2" text:anchor-type="paragraph" svg:width="8.1075in" svg:height="6.222in" draw:z-index="1"><draw:image xlink:href="Pictures/1000000000000640000003847793CA8D.png" xlink:type="simple" xlink:show="embed" xlink:actuate="onLoad"/></draw:frame><text:span text:style-name="T2"/></text:p>
      <text:p text:style-name="P2"><text:span text:style-name="T2"/></text:p>
      <text:p text:style-name="P1"/>
      <text:p text:style-name="P1"/>
      <text:p text:style-name="P1"/>
      <text:p text:style-name="P1"/>
      <text:p text:style-name="P1"/>
      <text:p text:style-name="P1"/>
      <text:list xml:id="list1529320074116385427" text:style-name="L1">
        <text:list-item>
          <text:p text:style-name="P3"><text:soft-page-break/>ZARADE ZAPOSLENIH BUDŽET – Podaci o prihodima za REGISTAR ZAPOSLENIH</text:p>
        </text:list-item>
      </text:list>
      <text:p text:style-name="P2"/>
      <text:list xml:id="list823613487926950797" text:style-name="L2">
        <text:list-item>
          <text:list>
            <text:list-item>
              <text:list>
                <text:list-item>
                  <text:p text:style-name="P4">PARAMETRI</text:p>
                  <text:p text:style-name="P4"/>
                </text:list-item>
              </text:list>
            </text:list-item>
          </text:list>
        </text:list-item>
      </text:list>
      <text:p text:style-name="P2"><draw:frame draw:style-name="fr1" draw:name="графика3" text:anchor-type="paragraph" svg:width="8.2445in" svg:height="5.0161in" draw:z-index="2"><draw:image xlink:href="Pictures/1000000000000640000003845544A86F.png" xlink:type="simple" xlink:show="embed" xlink:actuate="onLoad"/></draw:frame></text:p>
      <text:p text:style-name="P2"><text:tab/>JEDINSTVENI BROJ <text:s/>KORISNIKA – Unosite JBKS </text:p>
      <text:p text:style-name="P2"/>
      <text:p text:style-name="P2"><text:tab/>ISPLATA U MESECU – Unosite oznaku meseca u kome ste izvršili isplatu prihoda za koji predajete podatak. Meseci od 1 – 9 unose se sa nulom ispred broja meseca.</text:p>
      <text:p text:style-name="P2"/>
      <text:p text:style-name="P2"><text:tab/>GODINA – Unosite tekuću godinu.</text:p>
      <text:p text:style-name="P2"/>
      <text:p text:style-name="P2"><text:tab/>DATUM <text:s/>SLANJA – Unosite datum na dan predaje podataka o prihodu.</text:p>
      <text:p text:style-name="P2"/>
      <text:p text:style-name="P2"><text:tab/>FUNKCIONALNA <text:s/>KLASIFIKACIJA – Unosite trocifren broj klase iz šeme funkcionalne klasifikacije iz PRAVILNIKA O STANDARDNOM KLASIFIKACIONOM OKVIRU I KONTNOM PLANU ZA BUDŽETSKI SISTEM.</text:p>
      <text:p text:style-name="P2"/>
      <text:p text:style-name="P2"><text:tab/>IZVOR FINANSIRANJA – Unosite šifru izvora finansiranja. </text:p>
      <text:p text:style-name="P2"/>
      <text:p text:style-name="P2"><text:tab/>ISPLATA za MESEC – Unosite oznaku <text:span text:style-name="T1">meseca za koji ste izvršili isplatu prihoda</text:span> i za koji predajete podatak. Meseci od 1 – 9 unose se sa nulom ispred broja meseca.</text:p>
      <text:p text:style-name="P2"/>
      <text:p text:style-name="P2"><text:tab/>ISPLATA ZA GODINU – Unosite godinu iz koje prihod potiče.</text:p>
      <text:p text:style-name="P2"/>
      <text:p text:style-name="P2"><text:tab/>ŠIFRA ORGANIZACIONE JEDINICE – Unosite šifru organizacione jedinice.</text:p>
      <text:p text:style-name="P2"><text:soft-page-break/></text:p>
      <text:list xml:id="list36265805" text:continue-numbering="true" text:style-name="L2">
        <text:list-item>
          <text:list>
            <text:list-item>
              <text:list>
                <text:list-item>
                  <text:p text:style-name="P4">ŠEMA ZARADA</text:p>
                </text:list-item>
              </text:list>
            </text:list-item>
          </text:list>
        </text:list-item>
      </text:list>
      <text:p text:style-name="P2"><text:tab/></text:p>
      <text:p text:style-name="P2"><text:s/><text:tab/>Tabela ŠEMA PRENOSA PLATA popunjava se automatski klikom na dugme DODAJ SVE.</text:p>
      <text:p text:style-name="P2">U njoj definišete šifre osnova za podatak koji ćete u sledećem koraku ( U OKVIRU <text:span text:style-name="T1">ZARADE</text:span> - TABELE ŠEMA PRENOSA PLATA ) automatski preuzeti. ŠIFRE OSNOVA mogu se dodavati ručno.</text:p>
      <text:p text:style-name="P2"/>
      <text:list xml:id="list36276509" text:continue-numbering="true" text:style-name="L2">
        <text:list-item>
          <text:list>
            <text:list-item>
              <text:list>
                <text:list-item>
                  <text:p text:style-name="P4">ZARADE - <text:s/>ŠEMA PRENOSA PLATA - </text:p>
                </text:list-item>
              </text:list>
            </text:list-item>
          </text:list>
        </text:list-item>
      </text:list>
      <text:p text:style-name="P2"><text:tab/></text:p>
      <text:p text:style-name="P2"><text:tab/>Prvo kliknite na dugme BRIŠI SVE, a zatim na dugme PARAMETRI PRENOSA. U PARAMETRIMA PRENOSA popunjavate polje MESEC za odgovarajuću vrstu prihoda, BROJ ( VRSTU ) ODGOVARAJUĆE ISPLATE i REDNI BROJ ISPLATE. Vratite se u tabelu i kliknite na dugme PREUZMI ZARADE. Sada kliknite na dugme SUMIRANJE ISTIH ŠIFRI OSNOVA KOD ISTOG MATIČNOG BROJA. Pređite na ŠEMU XML.</text:p>
      <text:p text:style-name="P2"><text:tab/></text:p>
      <text:list xml:id="list36278811" text:continue-numbering="true" text:style-name="L2">
        <text:list-item>
          <text:list>
            <text:list-item>
              <text:list>
                <text:list-item>
                  <text:p text:style-name="P4">ŠEMA XML</text:p>
                </text:list-item>
              </text:list>
            </text:list-item>
          </text:list>
        </text:list-item>
      </text:list>
      <text:p text:style-name="P2"/>
      <text:p text:style-name="P2"><text:tab/>Kliknite na dugme DODAJ SVE, A ZATIM NA dugme NAPRAVI XML. Izađite do GLAVNOG MENIJA kliknite na ikonicu XML i otvorićete prozor u kome se nalazi XML fajl koji ste formir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20-09-10T13:29:10.28</meta:creation-date>
    <meta:document-statistic meta:table-count="0" meta:image-count="3" meta:object-count="0" meta:page-count="4" meta:paragraph-count="34" meta:word-count="448" meta:character-count="2799"/>
    <dc:date>2020-09-10T16:05:51.74</dc:date>
    <dc:creator>Jozef Brnić</dc:creator>
    <meta:editing-duration>PT6M22S</meta:editing-duration>
    <meta:editing-cycles>1</meta:editing-cycles>
    <meta:generator>OpenOffice/4.1.1$Win32 OpenOffice.org_project/411m6$Build-9775</meta:generator>
  </office:meta>
</office:document-meta>
</file>