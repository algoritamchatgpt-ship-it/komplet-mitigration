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weight="bold" style:font-weight-asian="bold" style:font-weight-complex="bold"/>
    </style:style>
    <style:style style:name="P2" style:family="paragraph" style:parent-style-name="Standard">
      <style:text-properties fo:color="#c9211e" loext:opacity="100%" fo:font-weight="bold" officeooo:rsid="00121d22" officeooo:paragraph-rsid="00121d22" style:font-weight-asian="bold" style:font-weight-complex="bold"/>
    </style:style>
    <style:style style:name="T1" style:family="text">
      <style:text-properties officeooo:rsid="0011a370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11a37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c62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Naknada se isplaćuje u visini prosečne zarade u prethodnih 12 meseci, srazmerno broju dana neiskorišćenog godišnjeg odmora.</text:span> </text:p>
      <text:p text:style-name="Standard"/>
      <text:p text:style-name="Standard"><text:span text:style-name="T1"><text:tab/></text:span><text:span text:style-name="T3">Prema članu 76 Zakona o radu,</text:span><text:span text:style-name="T1"> </text:span>u slučaju prestanka radnog odnosa, poslodavac je dužan da zaposlenom koji nije iskoristio godišnji odmor u celini ili delimično, isplati novčanu naknadu u visini prosečne zarade u prethodnih 12 meseci, srazmerno broju dana neiskorišćenog godišnjeg odmora.</text:p>
      <text:p text:style-name="Standard"><text:tab/>Pravo na novčanu naknadu zaposleni ima bez obzira na koji način je došlo do prestanka radnog odnosa. <text:span text:style-name="T2">Novčana naknada za neiskorišćeni godišnji odmor predstavlja primanje zaposlenog, pa samim tim ima karakter zarade.</text:span></text:p>
      <text:p text:style-name="Standard"/>
      <text:p text:style-name="Standard"><text:tab/><text:span text:style-name="T2">NA OVO PRIMANJE SE OBRAČUNAVAJU I PLAĆAJU POREZ NA ZARADE I DOPRINOSI ZA OBAVEZNO </text:span><text:span text:style-name="T3">S</text:span><text:span text:style-name="T2">OCIJALNO OSIGURANJE, NA OSNOVICU KOJU ČINI IZNOS NOVČANE NAKNADE KAO BRUTO IZNOS KOJI U SEBI SADRŽI</text:span></text:p>
      <text:p text:style-name="P1">POREZ I DOPRINOSE KOJI SE PLAĆAJU IZ ZARADE.</text:p>
      <text:p text:style-name="P1"/>
      <text:p text:style-name="P2">Kroz program:</text:p>
      <text:p text:style-name="P2"><text:span text:style-name="T4"><text:tab/>Kroz PARAMETRE 2 preimenujte jedno od polja OSTALA PRIMANJA 1, 2 ili 3 u NAK.ŠTET.GO, IZBRIŠITE IZNOS ZARADE BEZ POREZA I NAJNIŽU OSNOVICU. Kroz karticu F7 u PLATNOM SPISKU u preimenovano polje unosite broj časova za ostala primanja za koja ste prethodno izvršili preračun u skladu sa VAŠOM CENOM RADA PO ČASU, SHODNO BROJU SATI U MESECU KROZ KOJI RADITE OBRAČUN.</text:span></text:p>
      <text:p text:style-name="P2"><text:span text:style-name="T4"><text:tab/></text:span><text:span text:style-name="T5">Šifra prihoda 1 01 101 00 0.</text:span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9T15:23:01.034000000</meta:creation-date>
    <dc:date>2025-09-09T16:08:46.074000000</dc:date>
    <meta:editing-duration>PT43M19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8" meta:word-count="199" meta:character-count="1259" meta:non-whitespace-character-count="1062"/>
  </office:meta>
</office:document-meta>
</file>