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language="en" fo:country="US"/>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list-style-name="L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LAVNI MENI ZARADE I DRUGA LIČNA PRIMANJA</text:p>
      <text:p text:style-name="P8"/>
      <text:p text:style-name="P8"/>
      <text:p text:style-name="P8">Prva kolona FORMIRANJE TABELA sadrži:</text:p>
      <text:p text:style-name="P8"/>
      <text:p text:style-name="Standard"/>
      <text:p text:style-name="P1">PARAMETRI <text:s/>I - posebno uputstvo – Parametri za obračun.</text:p>
      <text:p text:style-name="Standard"/>
      <text:p text:style-name="P1">PARAMETRI <text:s/>II - posebno uputstvo - Parametri za obračun .</text:p>
      <text:p text:style-name="Standard"/>
      <text:p text:style-name="P1">UNOS RADNIKA - posebno uputstvo – Obračun.</text:p>
      <text:p text:style-name="Standard"/>
      <text:p text:style-name="P1">UNOS ČASOVA - posebno uputstvo – Obarčun.</text:p>
      <text:p text:style-name="Standard"/>
      <text:p text:style-name="P1">PLATNI SPISAK - posebno uputstvo – Oabrčun.</text:p>
      <text:p text:style-name="Standard"/>
      <text:p text:style-name="Standard"><text:span text:style-name="T1">REKAPITULACIJA</text:span> – Klikom na ovo dugme otvarate tabelu REKAPITULACIJE ZARADE koju ste izabrali u PARAMETRIMA II. Ispod tabele se nalaze dva dugmeta REKAPITULACIJA F7 koja služi za pregled i štampu podataka i ŠTAMPA F10 za direktnu štampu tabele. Ova tabela je vrlo korisna za pregled podataka u slučaju kada imate prvu i drugu isplatu zarade. Takođe služi za prećenje kodova za izradu šema knjiženja svih vrsta zarada.</text:p>
      <text:p text:style-name="Standard"/>
      <text:p text:style-name="Standard"><text:span text:style-name="T1">OPJ – 1 – OPJ – 8</text:span> - <text:span text:style-name="T1">posebno uputstvo – OPJ – 1 – OPJ - 8</text:span> <text:tab/></text:p>
      <text:p text:style-name="Standard"/>
      <text:p text:style-name="Standard"><text:span text:style-name="T1">OPJ</text:span> – Ne koristi se. </text:p>
      <text:p text:style-name="Standard"/>
      <text:p text:style-name="Standard"><text:span text:style-name="T1">OD RADNICI</text:span> - Ne koristi se. </text:p>
      <text:p text:style-name="Standard"/>
      <text:p text:style-name="Standard"><text:span text:style-name="T1">OD – VLASNIK</text:span> - Ne koristi se. </text:p>
      <text:p text:style-name="Standard"/>
      <text:p text:style-name="Standard"><text:span text:style-name="T1">OD – 1</text:span> - Ne koristi se. </text:p>
      <text:p text:style-name="Standard"/>
      <text:p text:style-name="Standard"><text:span text:style-name="T1">OD - <text:s/>P <text:s/>i OD - O</text:span> – Klikom na ovo dugme otvarate podmeni koji sadrži dve opcije OD PP– P PREDUZETNIK <text:s/>i <text:s/>PP <text:s/>OD – O OSNIVAČ. </text:p>
      <text:p text:style-name="Standard"/>
      <text:p text:style-name="Standard"><text:tab/><text:span text:style-name="T1">OD PP– P PREDUZETNIK</text:span> – <text:span text:style-name="T1">posebno uputstvo. </text:span>Služi za obračun lične zarade preduzetnika.</text:p>
      <text:p text:style-name="P4"><text:tab/></text:p>
      <text:p text:style-name="Standard"><text:tab/><text:span text:style-name="T1">PP <text:s/>OD – O OSNIVAČ</text:span> – Služi za obračun doprinosa osnivača. Klikom na ovo dugme otvarate tabelu OBRAZAC PP OD – O. Dugme </text:p>
      <text:p text:style-name="Standard"><text:tab/><text:tab/>PLUS služi za dodavanje reda za unos podataka.</text:p>
      <text:p text:style-name="Standard"><text:tab/><text:tab/>OBRAZAC, OBRAZAC 2 i BRAZAC 3 su pregledi starih PP OD – o obrazaca koji se mogu štampati. </text:p>
      <text:p text:style-name="Standard"><text:tab/><text:tab/>PRIMAOCI – služi za unos primaoca prihoda. Kliknite na polje broj selektujte ga, sada kliknite na dugme PRIMAOCI, kliknite na šifru primaoca pa na krsić za izlaz. Izabrani primaoc biće unet u tabelu. </text:p>
      <text:p text:style-name="Standard"><text:tab/><text:tab/>PUNI VIRMANE – ne koristi se.</text:p>
      <text:p text:style-name="Standard"><text:tab/><text:tab/>KOPIRANJE SPISKA – služi za kopiranje već urađenog obračuna uz promenu datuma. Popunite tabelu prema zadatim podacima i kliknite na dugme KOPIRAJ, pa na IZLAZ. U tabeli ćete dobiti kopiju obračuna koji ste izabrali.</text:p>
      <text:p text:style-name="Standard"><text:tab/><text:tab/>Za predaju na Poresku upravu imate poseban deo u programu. Iz glavnog menija kliknite na dugme IV XML TXT &gt; 1.XML &gt; PP ODO i otvorili ste tabelu XML SEMA PP ODO.</text:p>
      <text:p text:style-name="Standard"><text:soft-page-break/>Sada kliknite na dugme PARAMETRI – popunite ponuđenu formu – klikom na izlaz vraćate se u tabelu. Kliknite na dugme NAPRAVI ŠABLON, prkontroliši te podatke u XML zapisu, a zatim kliknite na dugme NAPRAVI XML pa na dugme PORESKA UPRAVA i predajte prijavu.</text:p>
      <text:p text:style-name="Standard"><text:s text:c="49"/></text:p>
      <text:p text:style-name="Standard"/>
      <text:p text:style-name="Standard"><text:span text:style-name="T1">VIRMANI</text:span> – U ovom delu programa formirate naloge za prenos. Automatski možete prenositi iznose iz dela programa SPISAK gde ste kreirali podatke za isplatu zarada ili podatke za isplatu prevoza zaposlenima. Isto možete raditi i u delu programa XML - <text:s/>TXT. UKOLIKO u tom delu programa koristite opciju za automatsko PREUZIMANJE NALOGA sa Poreske uprave koristite opciju VIRMANI u tom delu programa. Ta opcija je identična ovoj opciji. Naloge možete kreirati i ručno.</text:p>
      <text:p text:style-name="Standard">Dugmad ispod tabele:</text:p>
      <text:p text:style-name="Standard"><text:tab/><text:tab/>DODAVANJE – služi za dodavanje reda u tabeli za ručni unos podataka.</text:p>
      <text:p text:style-name="Standard"><text:tab/><text:tab/>PREUZIMANJE F2 – služi za automatsko kreiranje naloga sa podacima iz SPISKA za zarade ili prevoz.</text:p>
      <text:p text:style-name="Standard"><text:tab/><text:tab/>BRISNJE PRVI NE – ova opcija je korisna nakon automatskog preuzimanja naloga za plaćanje sa Poreske uprave. Ukoliko ste u delu programa XML – TXT preuzeli nalog on vam je automatski smešten i u ovaj deo programa. Naknadno unete ili prenete naloge možete brisati koristeći ovo dugme a da pri tom brisanj zadržite nalog za Poresku upravu.</text:p>
      <text:p text:style-name="Standard"><text:tab/><text:tab/>BRISNJE SVE - Klikom na ovo dugme brišete podatke iz cele tabele.</text:p>
      <text:p text:style-name="Standard"><text:tab/><text:tab/>JEDAN VIRMAN POPUNI – Ovo dugme koristite tako što ćete prvo kliknuti na dugme DODAJ pa na dugme <text:s/>JEDAN VIRMAN POPUNI. Time ste otvorili obrazac naloga koji popunjavate ručno. Dugme PARTNERI vas povezuje sa <text:s/>bazom PARTNERI IZ KOJE KLIKOM NA ŠIFRU PARTNERA PA NA IZLAZ prenosite potrebne podatke o partneru u nalog. Klikom na dugme POTVRDA IZMENE memorišete unete podatke. Sada kliknite na IZLAZ i kreiranje naloga je završeno. </text:p>
      <text:p text:style-name="Standard"><text:tab/><text:tab/>POZIV – ODOBRENJE – služi za prenos podatka iz prvog nloga, kolona POZIVO, u sve ostale naloge.</text:p>
      <text:p text:style-name="Standard"><text:tab/><text:tab/>POZIV – ZADUŽENJE - služi za prenos podatka iz prvog nloga, kolona POZIVZ, u sve ostale naloge.</text:p>
      <text:p text:style-name="Standard"><text:tab/><text:tab/>ZAOKRUŽI IZNOSE – služi za zaokruživanje naloga za Poresku uprvu.</text:p>
      <text:p text:style-name="Standard"><text:tab/><text:tab/>ŠTAMPA KOMPLET – klikom na ovo dugme dobijate pregled svih naloga za štampu. Naloge za štampu obeležavate * - zvezdicom u prvoj koloni tabele koja se zove STAMPA ukoliko hoćete da štampate određen broj kreiranih naloga.</text:p>
      <text:p text:style-name="Standard"><text:tab/><text:tab/>JEDAN KOMPLET – Klikom na određeni nalog pa na ovo dugme dobijate pregled izabranog naloga koji sada možete štampti.</text:p>
      <text:p text:style-name="Standard"><text:tab/><text:tab/>ŠTAMPA NOVI VIRMANI – služi za pregled naloga za štampu, na matričnim štampačima, na obrascima naloga koji imaju perforaciju.</text:p>
      <text:p text:style-name="Standard"><text:tab/><text:tab/>ŠTAMPA JEDAN F9 - Klikom na određeni nalog pa na ovo dugme dobijate pregled izabranog naloga koji sada možete štampti. Služi za pregled naloga za štampu, na matričnim štampačima, na obrascima naloga koji imaju perforaciju.</text:p>
      <text:p text:style-name="Standard"><text:tab/><text:tab/>BLANKO ŠTAMPA – ne koristiti.</text:p>
      <text:p text:style-name="Standard"><text:tab/><text:tab/>TRAKA ZA OPJ - ne koristiti.</text:p>
      <text:p text:style-name="Standard"><text:tab/><text:tab/>TRAKA ZA OD - ne koristiti.</text:p>
      <text:p text:style-name="Standard"><text:tab/><text:tab/>TRAKA F8 - ne koristiti.</text:p>
      <text:p text:style-name="Standard"><text:tab/><text:tab/>IZVOZ RAIFFEISEN</text:p>
      <text:p text:style-name="Standard"><text:tab/><text:tab/>SREDI BANKE – Ukoliko imte račune kod više banka i šifrirali ste ih u PODACIMA O FIRMI unosom šifara u kolonu BANKA možete izabrati koji nalog ćete realizovati u kojoj banci. Nakon unosa šifre banke kliknite na dugme SREDI BANKE i time ste uneli broj računa određene banke u nalog. </text:p>
      <text:p text:style-name="Standard"/>
      <text:p text:style-name="Standard"><text:span text:style-name="T1">RAČUNI <text:s/>ZA <text:s/>UPLATU</text:span> - Ne koristi se. </text:p>
      <text:p text:style-name="Standard"><text:soft-page-break/></text:p>
      <text:p text:style-name="P1">ZAHTEV <text:s/>ZA <text:s/>TRANSFER</text:p>
      <text:p text:style-name="P1"/>
      <text:p text:style-name="P1"/>
      <text:p text:style-name="Standard"/>
      <text:p text:style-name="P8"/>
      <text:p text:style-name="P8"/>
      <text:p text:style-name="P8"/>
      <text:p text:style-name="P8"/>
      <text:p text:style-name="P8"/>
      <text:p text:style-name="P8"/>
      <text:p text:style-name="P8">DRUGA KOLONA SADRŽI:</text:p>
      <text:p text:style-name="P8"/>
      <text:p text:style-name="Standard"/>
      <text:p text:style-name="Standard"><text:span text:style-name="T1"><text:tab/>PORODILJE</text:span> – <text:span text:style-name="T1">Služi za izradu obrazaca za obračun porodiljskog bolovanja. Da bi ste imali ispravne podatke u obrascima proverite da li ste popunili sve potrebne podatke u PODACIMA O FIRMI i u EVIDENCIJI ZAPOSLENIH ( kolona DATPRI – datum početka porodiljskog bolovanja, kolona DATZAPOS – datum zaposlenja i kolone RMESTO i RADNOMES – naziv radnog mesta). Klikom na ovo dugme otvarate podmeni koji sadrži SLEDEĆE OBRASCE:</text:span></text:p>
      <text:p text:style-name="Standard"/>
      <text:p text:style-name="Standard"><text:tab/> <text:span text:style-name="T2">PORODILJE - <text:s/>NZ – 1</text:span> – Klikom na ovo dugme otvarate tabelu OBRAZAC ZA PORODILJE NZ – 1. Tabela se puni podacima automatskim prenosom podataka iz platnog spiska. U PARAMETRIMA 2 odredite vrstu i mesec obračuna, uradite obračun porodiljskog bolovanja, vratite se u ovu tabelu i kliknite na dugme PREUZIMANJE ispod tabele. Klikom na dugme OBRAZAC NZ – 1, otvorićete pregled obrasca i sada ga možete odštampati. Dugme BRISANJE služi za brisanje selektovanog reda u tabeli. Klikom na dugme IZLAZ izlazite iz tabele.</text:p>
      <text:p text:style-name="Standard"><text:tab/>KRETANJE <text:s/>ZARADA – Potvrda o porastu - smanjenju zarade kod poslodavca za utvrđivanje osnova za naknadu zarade. Dugmad ispod tabele POTVRDA – nakon izrade potvrde omogućuje pregled i štampu; DODAVANJE – Klikom na ovo dugme automatski prenosite ime i prezime radnika iz PLATNOG SPISKA za koga radite potvrdu. Otvaraju vam se četiri reda za unos podataka u tabelu. Unesite mesece i iznose, a zatim kliknite na dugme PRERAČUN. Sada kliknite na dugme POTVRDA pregledajte i odštampajte obrazac. BRISANJE – služi za brisanje podataka u tabeli, PRERAČUN – služi za preračun koeficijenata nakon unosa podataka, BRISANJE REDA – služi za brisanje jednog reda u tabeli i IZLAZ.</text:p>
      <text:p text:style-name="Standard"><text:tab/>ZARADA ZA 12 MESECI – Tabela služi za utvrđivanje prosečne zarade kod poslodavca.</text:p>
      <text:p text:style-name="Standard">Dugmad ispod tabele <text:s/>POTVRDA - nakon izrade potvrde omogućuje pregled i štampu , <text:s text:c="2"/>DODAVANJE – dodavanje 12 redova u tabeli za unos podataka o zaradi koje unosite ručno, BRISANJE – brisanje podataka u tabeli <text:s/>i BRISANJE REDA – služi za brisanje jednog reda u tabeli i IZLAZ. </text:p>
      <text:p text:style-name="Standard"><text:tab/>ZAHTEV Z – 1 – Refundacija poreza za porodilje. U tabelu unosite potrebne podatke. Klikom na dugme OBRAZAC Z – 1 dobijate obrazac koji možete štampati. </text:p>
      <text:p text:style-name="Standard"/>
      <text:p text:style-name="Standard"><text:tab/>POTVRDA O STAŽU - Dugmad ispod tabele: DODAVANJE – Služi za dodavanje reda u tabeli. Klikom na ovo dugme automatski prenosite ime i prezime radnika iz PLATNOG SPISKA za koga radite potvrdu sa podacima ( adresa, radno mesto, JMBG) koji se preuzimaju iz podataka EVIDENCIJE ZAPOSLENIH. Tabelu popunite po zadatom redu, a zatim kliknite na dugme POTVRDA pregledajte i odštampajte potvrdu. Sada kliknite na dugme REŠENJE pregledajte i odštampajte rešenje. Dugme BRISANJE služi za brisanje podataka u tabeli <text:s/>i BRISANJE REDA – služi za brisanje jednog reda u tabeli i IZLAZ. <text:s/></text:p>
      <text:p text:style-name="Standard"/>
      <text:p text:style-name="P1"><text:tab/>BOLOVANJE - Služi za izradu obrazaca za obračun bolovanja preko 30 dana. Klikom <text:soft-page-break/>na ovo dugme otvarate podmeni koji sadrži SLEDEĆE OBRASCE:</text:p>
      <text:p text:style-name="Standard"/>
      <text:p text:style-name="Standard"><text:tab/>BOLOVANJE – OZ - 7</text:p>
      <text:p text:style-name="Standard"/>
      <text:p text:style-name="Standard"><text:s/><text:tab/>Dugmad ispod tabele: OBRAZAC NAKNADA - nakon izrade omogućuje pregled i štampu obrasca. PREUZIMANJE – služi za otvaranje novog reda u tabeli i istovremeno preuzima podatke za zaposlenog iz platnog spiska i iz EVIDENCIJE ZAPOSLENIH ( JMBG, LBO , br.zdravsvene kartice ) ukoliko ste te podatke uneli u odgovarajuća polja u evidenciji. Ostala polja popunjavate datim redosledom iz štampanih obrazaca OZ za datog radnika. Dugme PRERAČUN služi za preračun cene rada po času. Dugme DODAJ – dodajete red u tabeli. Dugme KARTICA F7 - <text:s/>služi za pregled podataka unetih u tabelu. Možete je koristiti i za unos podataka. Dugme BRISANJE – služi za brisanje podataka u tabeli. IZLAZ.</text:p>
      <text:p text:style-name="Standard"/>
      <text:p text:style-name="Standard"><text:tab/>BOLOVANJE – OZ – 8 </text:p>
      <text:p text:style-name="Standard"><text:s/></text:p>
      <text:p text:style-name="Standard"><text:tab/>Dugmad ispod tabele: OBRAZAC NAKNADA - nakon izrade omogućuje pregled i štampu obrasca. PRERAČUN – Služi za preračun unetih podataka odnosno izračunavanje koeficijenta za usklađenje. DODAJ – dodajete red u tabeli za unos podataka u koji unosite podatke datim redosledom. KARTICA F7- Služi za pregled unetih podataka ili unos podataka.</text:p>
      <text:p text:style-name="Standard"/>
      <text:p text:style-name="Standard"><text:tab/>BOLOVANJE – OZ – 9 </text:p>
      <text:p text:style-name="Standard"/>
      <text:p text:style-name="Standard"><text:tab/> Dugmad ispod tabele: OBRAZAC NAKNADA - nakon izrade omogućuje pregled i štampu obrasca. PRERAČUN – Služi za preračun unetih podataka odnosno izračunavanje koeficijenta za usklađenje. DODAJ – dodajete red u tabeli za unos podataka u koji unosite podatke datim redosledom. Dugme BRISANJE – služi za brisanje podataka u tabeli. IZLAZ.</text:p>
      <text:p text:style-name="Standard"/>
      <text:p text:style-name="Standard"><text:tab/>BOLOVANJE – OZ – 10 <text:s/></text:p>
      <text:p text:style-name="Standard"/>
      <text:p text:style-name="Standard"><text:tab/>Dugmad ispod tabele: OBRAZAC NAKNADA - nakon izrade omogućuje pregled i štampu obrasca. PREUZIMANJE – Služi za preuzimanje podataka i obračuna bolovanja preko 30 dana – platni spisak obračuna koji ste odredili u PARAMETRIMA 2. BRISANJE – služi za brisanje podataka u tabeli. DODAJ – dodajete red u tabeli. BRISANJE REDA – služi za brisanje jednog reda u tabeli. SPECIFIKACIJA – klikom na ovo dugme dobijate specifikaciju naknde zarade koju možete štampati. IZLAZ. <text:s/></text:p>
      <text:p text:style-name="Standard"/>
      <text:p text:style-name="Standard"><text:tab/>INVALIDI II - <text:s/>Dugmad ispod tabele: OBRAZAC II - nakon izrade omogućuje pregled i štampu obrasca. PREUZIMANJE – Služi za preuzimanje podataka i obračuna naknada za invalide – platni spisak obračuna koji ste odredili u PARAMETRIMA 2. BRISANJE – služi za brisanje podataka u tabeli. DODAJ – dodajete red u tabeli. IZLAZ. <text:s/></text:p>
      <text:p text:style-name="Standard"/>
      <text:p text:style-name="Standard"/>
      <text:p text:style-name="Standard"><text:tab/>POTVRDA NEISPUNJ.USL.ZA PENZ. - Dugmići ispod tabele: GORE, DOLE, ZADNJI I PRVI - služe za kretanje unutar tabele. UNESI TEKST služi za unos zadatog teksta koji možete dopuniti potrebnim podacima. BRISANJE – služi za brisanje podataka u tabeli. PREGLED - <text:s/>nakon izrade omogućuje pregled i štampu potvrde. IZLAZ. <text:s text:c="2"/></text:p>
      <text:p text:style-name="Standard"/>
      <text:p text:style-name="Standard"/>
      <text:p text:style-name="Standard"><text:tab/>POTVRDA O IZVRŠENOJ ISPLATI - <text:s/>Dugmići ispod tabele: GORE, DOLE, ZADNJI I PRVI - služe za kretanje unutar tabele. UNESI TEKST služi za unos zadatog teksta koji možete dopuniti potrebnim podacima. BRISANJE – služi za brisanje podataka u tabeli. PREGLED - <text:s/>nakon izrade</text:p>
      <text:p text:style-name="Standard"><text:soft-page-break/>omogućuje pregled i štampu potvrde. IZLAZ.</text:p>
      <text:p text:style-name="Standard"/>
      <text:p text:style-name="Standard"/>
      <text:p text:style-name="Standard"><text:span text:style-name="T1"><text:tab/>OBRAZAC IOSI</text:span> – Klikom na dume + dodajete red za unos podataka. Klikom na dugme PODACI JEDNOG MESECA – otvarate pregled koji istovremeno može da vam služi za unos potrebnih podataka. Klikom na dugme PREGLED nakon izrade omogućuje pregled i štampu obrasca. IZLAZ.</text:p>
      <text:p text:style-name="Standard"/>
      <text:p text:style-name="Standard"><text:span text:style-name="T1"><text:tab/>POTVRDA O ZARADI</text:span> – Stara potvrda za bolovanje preko 30 dana. Ne koristi se.</text:p>
      <text:p text:style-name="Standard"/>
      <text:p text:style-name="Standard"><text:span text:style-name="T1"><text:tab/>IZJAVA O IZMIRENJU DOPRINOSA</text:span> - Dugmići ispod tabele: GORE, DOLE, ZADNJI I PRVI - služe za kretanje unutar tabele. UNESI TEKST služi za unos zadatog teksta koji možete dopuniti potrebnim podacima. BRISANJE – služi za brisanje podataka u tabeli. PREGLED - <text:s/>nakon izrade</text:p>
      <text:p text:style-name="Standard">omogućuje pregled i štampu izjave. IZLAZ.</text:p>
      <text:p text:style-name="Standard"/>
      <text:p text:style-name="Standard"><text:span text:style-name="T1"><text:tab/>PRIPRAVNICI</text:span> – Obrazac refundacije za pripravnike. Dugmići ispod tabele: OBRAZAC - <text:s/>nakon izrade omogućuje pregled i štampu obrasca. PREUZIMANJE - Služi za preuzimanje podataka i obračuna zarade za pripravnika – platni spisak obračuna koji ste odredili u PARAMETRIMA 2 za zaposlenog koga ste obeležili kao pripravnika u EVIDENCIJI ZAPOSLENIH. Neophodno je uneti sve podatke o priprvniku u EVIDENCIJI <text:s/>ZAPOSLENIH – KARTICA PRIPRVNIKA F7 - da bi ste u ovoj potvrdi imali sve potrebne podatke. BRISANJE SVE – služi za brisanje podataka u tabeli. BRISANJE REDA – služi za brisanje jednog reda u tabeli i IZLAZ. <text:s/></text:p>
      <text:p text:style-name="Standard"/>
      <text:p text:style-name="Standard"><text:span text:style-name="T1"><text:tab/>OBRAZAC OPNR</text:span> - </text:p>
      <text:p text:style-name="Standard"><text:s/></text:p>
      <text:p text:style-name="P1"><text:tab/>OBRAZAC INZS</text:p>
      <text:p text:style-name="Standard"/>
      <text:p text:style-name="P1"><text:tab/>OBRAZAC <text:s/>ZSP</text:p>
      <text:p text:style-name="Standard"/>
      <text:p text:style-name="P1"><text:tab/>OBRAZAC <text:s/>ZSD</text:p>
      <text:p text:style-name="Standard"/>
      <text:p text:style-name="P1"><text:tab/>OBRAZAC <text:s/>OS</text:p>
      <text:p text:style-name="Standard"/>
      <text:p text:style-name="P1"><text:tab/>OBRAZAC <text:s/>OS1</text:p>
      <text:p text:style-name="P1"/>
      <text:p text:style-name="P1">IZVEŠTAJ O ISPLAĆENIM ZARADAMA</text:p>
      <text:p text:style-name="P1"/>
      <text:p text:style-name="P1"/>
      <text:p text:style-name="P8">TREĆA KOLONA SADRŽI:</text:p>
      <text:p text:style-name="P8"/>
      <text:p text:style-name="Standard"/>
      <text:p text:style-name="P1">RADNICI - posebno uputstvo.</text:p>
      <text:p text:style-name="Standard"/>
      <text:p text:style-name="P1">KREDITI - posebno uputstvo.</text:p>
      <text:p text:style-name="Standard"/>
      <text:p text:style-name="Standard"><text:span text:style-name="T1">SPISKOVI</text:span> – Služi za prenos neto iznosa za isplatu iz obračuna zarada ili obračuna prevoza zaposlenih, takođe je i tabela iz koje se vuku podaci koji su vam potrebni za formiranje naloga za isplatu odnosno uplatu, ukoliko zradu ili prevoz isplaćujete zaposlenima na njihove tekuće račune. <text:s/>Dugmići ispod tabele: GORE, DOLE, ZADNJI I PRVI - služe za kretanje unutar tabele. DODAJ – dodajete red u tabeli. BRIŠI – služi za brisanje podataka u tabeli. PRENOS – služi za prenos <text:soft-page-break/>podataka iz zarade - platni spisak obračuna koji ste odredili u PARAMETRIMA 2. <text:span text:style-name="T1">SPISAK</text:span> – pregled i štampa jednog spiska. Ukoliko vaši zaposleni primaju zaradu u istoj banci ova opocija omogućuje izradu jednog naloga za uplatu koju prati platni spisak sa brojevima posebnih tekućih računa zaposlenih. ŠIFRA BANKE <text:s/>kod tih zaposlenih mora biti ista, a brojevi tekućih računa naravno različiti. Klikom na šifru banke nekog od zaposlenih u tabeli, koji prima zaradu na napred opisani način, pa na dugme SPISAK dobićete spisak svih zaposlenih koji primaju zaradu u banci sa tom šifrom. NAPOMENA – U PARTNERIMA ovu banku unosite posebno da bi ste imali ŠIFRU bančinog računa koju onda unosite kao ŠIFRU BANKE u EVIDENCIJI ZAPOSLENIH za svakog radnika koji prima zaradu u toj banci. U polje BROJ TEKUĆEG RAČUNA, takođe u EVIDENCIJI ZAPOSLENIH, unosite kod svakog zposlenog <text:span text:style-name="T1">broj njegovog posebnog tekućeg računa, koji će se prenositi i u ovaj spisak.</text:span><text:span text:style-name="T2"> Druga opcija štampe spiska podrazumeva štampu spiska određenog broja zaposlenih koji ne primaju zaradu na tekući račun. Ovi zaposleni nemaju šifru banke. Klikom na jednog od tih zaposlenih pa na dugme SPISAK dobićete spisak svih zaposlenih koji primaju zaradu u gotovini. Ovaj spisak možete koristiti kao preteći dokument uz nalog za isplatu gotovine i blagajnu. Za zposlene kojima zaradu uplaćujete direktno na nihove tekuće račune ova tbela služi samo kao izvor podataka za pravljenje naloga za prenos. NAPOMENA – U PARTNERIMA sve zposlene ste uneli kao partnere sa posebnim šiframa, a te iste šifre ste uneli kao ŠIFRU BANKE u EVIDENCIJI ZAPOSLENIH za svakog radnika. U polje BROJ TEKUĆEG RAČUNA, takođe u </text:span><text:span text:style-name="T2">EVIDENCIJI ZAPOSLENIH, unosite kod svakog zposlenog </text:span><text:span text:style-name="T1">broj njegovog posebnog tekućeg računa, koji je u ovom slučaju isti kao broj tekućeg računa koji ste uneli u partnerima.</text:span><text:span text:style-name="T2"> <text:s text:c="2"/></text:span></text:p>
      <text:p text:style-name="P5"/>
      <text:p text:style-name="P5"/>
      <text:p text:style-name="Standard"><text:span text:style-name="T1">GRADOVI -NE KORISTI SE</text:span> -Služilo je za izradu specifikacije za uplatu doprinosa za zdravstveno osiguranje po opštinama uz PP – OD obrasce za zaposlene i za vlasnika. </text:p>
      <text:p text:style-name="Standard"/>
      <text:p text:style-name="Standard"><text:span text:style-name="T1">SAMODOPRINOS</text:span> – Služi za evidenciju samodoprinosa i podataka o samosoprinosu. Šifru samodoprinosa iz ove tabele unosite u <text:span text:style-name="T2">EVIDENCIJU ZAPOSLENIH u polje SAMSIF kod </text:span><text:span text:style-name="T2">zaposlenog za koga imate taj podatak.</text:span></text:p>
      <text:p text:style-name="Standard"/>
      <text:p text:style-name="Standard"><text:span text:style-name="T1">ZDRAVSTVENE KNJIŽICE</text:span> &gt; </text:p>
      <text:p text:style-name="Standard"><text:tab/><text:tab/>ČLANOVI PORODICE - Služi za evidenciju članova porodice koji imaju zdravstveno osigurnje preko zposlenog.</text:p>
      <text:p text:style-name="Standard"><text:tab/><text:tab/>ZAHTEV ZA MARKICE BAZA</text:p>
      <text:p text:style-name="Standard"><text:tab/><text:tab/>ZAHTEV ZA MARKICE</text:p>
      <text:p text:style-name="Standard"><text:tab/><text:tab/>OVLAŠĆENJE BAZA</text:p>
      <text:p text:style-name="Standard"><text:tab/><text:tab/>OVLAŠĆENJE TEKST</text:p>
      <text:p text:style-name="Standard"/>
      <text:p text:style-name="Standard"><text:span text:style-name="T1">OBRAZAC PPP</text:span> – U ovom delu programa nalazi se obrazac PPP-PO – Potvrda o plaćenim porezima i doprinosima po odbitku. Dugmići ispod tabele: GORE, DOLE, ZADNJI I PRVI - služe za kretanje unutar tabele. DODAJ – dodajete red u tabeli. Klikom na dugme </text:p>
      <text:p text:style-name="Standard"/>
      <text:p text:style-name="Standard"><text:tab/><text:tab/>PREUZMI ZARADE – otvarate podmeni PREUZIMANJE PODATAKA ZA LDPPP. Prethodno arhivirajte sve vrste obračuna koje ste uradili. Nakon obeležavanja zvezdicom onih meseci koje želite da preuzmete kliknite na dugme POPUNI OBRAZAC pa na izlaz.</text:p>
      <text:p text:style-name="Standard"><text:tab/><text:tab/>BRIŠI SVE – služi za brisanje podataka u tabeli. </text:p>
      <text:p text:style-name="Standard"><text:tab/><text:tab/>BRIŠI RED <text:s/>– služi za brisanje jednog reda u tabeli. <text:tab/><text:tab/></text:p>
      <text:p text:style-name="Standard"><text:tab/><text:tab/>PREUZMI OPJ 1,2,3,4,5,6,7,8,ODP – služi za preuzimanje podataka iz OPJ i ODP obračuna.</text:p>
      <text:p text:style-name="Standard"><text:tab/><text:tab/>POPUNI OPŠTE PODATKE – služi za prenos potrebnih podataka o zaposlenima iz EVIDENCIJE ZAPOSLENIH npr. ime i prezime.</text:p>
      <text:p text:style-name="Standard"><text:tab/><text:tab/>BRISANJE MESECA – služi za brisanje podataka koji su preuzeti za jedan mesec. Klikom na ovo dugme otvarate podmeni BRISANJE MESECA IZ ARHIVE – UNESITE MESEC, <text:soft-page-break/>POTVRDITE BRISANJE i IZLAZ za povratak u tabelu.</text:p>
      <text:p text:style-name="Standard"><text:tab/><text:tab/>PRERAČUNAJ OD POREZA – Klikom na ovo dugme preračunavate preneti bruto podatak u odnosu na prenet iznos obračunatog poreza. <text:s/></text:p>
      <text:p text:style-name="Standard"><text:tab/><text:tab/></text:p>
      <text:p text:style-name="Standard"><text:tab/><text:tab/>JEDAN RADNIK SKRAĆENI – Zbirni pregled podataka za za jednog primaoca prihoda. </text:p>
      <text:p text:style-name="Standard"/>
      <text:p text:style-name="Standard"><text:tab/><text:tab/>SALDO SKRAĆENI – Zbirni pregled podataka za sve primaoce prihoda.</text:p>
      <text:p text:style-name="Standard"><text:s/></text:p>
      <text:p text:style-name="Standard"><text:tab/><text:tab/>SALDO OBRASCI – Zbirni podaci.</text:p>
      <text:p text:style-name="Standard"/>
      <text:p text:style-name="Standard"><text:tab/><text:tab/>OBRAZAC PO MESECIMA – Zbirni iznosi po mesecima. </text:p>
      <text:p text:style-name="Standard"/>
      <text:p text:style-name="Standard"><text:tab/><text:tab/>IZVOZ DEO 2 ( PPP2 ) - TXT format za izvoz podataka.</text:p>
      <text:p text:style-name="Standard"><text:tab/><text:tab/>IZVOZ DEO 3 ( PPP3 ) - TXT format za izvoz podataka.</text:p>
      <text:p text:style-name="Standard"><text:tab/><text:tab/>IZVOZ DEO 4 ( PPP4 ) - TXT format za izvoz podataka. </text:p>
      <text:p text:style-name="Standard"/>
      <text:p text:style-name="Standard"><text:tab/><text:tab/>PPP NASLOV – Ne koristi se – stari PPP obrzac.</text:p>
      <text:p text:style-name="Standard"><text:tab/><text:tab/>PPP STRANA1 – Ne koristi se – stari PPP obrzac. </text:p>
      <text:p text:style-name="Standard"><text:tab/><text:tab/>PPP STRANA2 – Ne koristi se – stari PPP obrzac.</text:p>
      <text:p text:style-name="Standard"><text:tab/><text:tab/>PPP STRANA3 – Ne koristi se – stari PPP obrzac.</text:p>
      <text:p text:style-name="Standard"><text:tab/><text:tab/>PPP – PO – PPP -PO obrazac štampa.</text:p>
      <text:p text:style-name="Standard"/>
      <text:p text:style-name="Standard"><text:tab/><text:tab/>POTVRDA RADNICI <text:s/>– Ne koristi se. </text:p>
      <text:p text:style-name="Standard"><text:tab/><text:tab/>POTVRDA VAN R. ODNOSA <text:s/>– Ne koristi se. </text:p>
      <text:p text:style-name="Standard"><text:tab/><text:tab/>POTVRDA FIFME <text:s/>– Ne koristi se. </text:p>
      <text:p text:style-name="Standard"/>
      <text:p text:style-name="Standard"><text:tab/><text:tab/>POTVRDE RADNICI <text:s/>– Ne koristi se. <text:s/></text:p>
      <text:p text:style-name="Standard"><text:tab/><text:tab/>POTVRDE VAN R. ODNOSA <text:s/>– Ne koristi se. </text:p>
      <text:p text:style-name="Standard"><text:tab/><text:tab/>POTVRDE FIFME <text:s/>– Ne koristi se.</text:p>
      <text:p text:style-name="Standard"><text:tab/><text:tab/></text:p>
      <text:p text:style-name="Standard"><text:tab/><text:tab/>U ljubičastom polju možete vršiti pretragu podataka u tabeli prema ŠIFRI <text:s/>ili IMENU I PREZIMENU PRIMAOCA PRIHODA.</text:p>
      <text:p text:style-name="Standard"/>
      <text:p text:style-name="Standard"><text:tab/><text:tab/>IZLAZ. <text:s/></text:p>
      <text:p text:style-name="Standard"/>
      <text:p text:style-name="P1">ARHIVA ZARADA - posebno uputstvo.</text:p>
      <text:p text:style-name="Standard"/>
      <text:p text:style-name="Standard"><text:span text:style-name="T1">PODACI ZA M4</text:span> - Dugmići ispod tabele: GORE, DOLE, ZADNJI I PRVI - služe za kretanje unutar tabele. DODAVANJE REDA – dodajete red u tabeli. </text:p>
      <text:p text:style-name="Standard"><text:tab/>DODAVANJE MESECA – Dodajete jedan mesec koji obeležite brojem.</text:p>
      <text:p text:style-name="Standard"><text:tab/>BRISANJE MESECA <text:s/>- Brišete jedan mesec koji obeležite brojem.</text:p>
      <text:p text:style-name="Standard"><text:tab/>OSNOVICE – Ne koristi se.</text:p>
      <text:p text:style-name="Standard"><text:tab/>DATUMI ISPLATA – Klikom na ovo dugme otvarate tabelu datumi isplata za M4. Dugmići ispod tabele:</text:p>
      <text:p text:style-name="Standard"><text:tab/>GORE, DOLE, ZADNJI I PRVI - služe za kretanje unutar tabele. </text:p>
      <text:p text:style-name="Standard"><text:tab/>PUNJENJE DATUMA <text:s/>- <text:s/>Klikom na ovo dugme prenosite iz arhiviranih zarada datume isplata ukoliko ste kada ste radili zarade uneli datum isplate u PARAMETRIMA 2. BRISANJE – brišete podatke u tabeli. IZLAZ – povratak u tabelu. </text:p>
      <text:p text:style-name="Standard"><text:tab/>UNESI REGISTARSKI BROJ PIO – PRENOS REGISTARSKIH BROJEVA iz arhive zarada. </text:p>
      <text:p text:style-name="Standard"><text:tab/>PRENOS IZ ARHIVE – prenos svih zarada iz arhive. </text:p>
      <text:p text:style-name="Standard"><text:soft-page-break/><text:tab/>BRISANJE SVE - <text:s/>brišete podatke u tabeli.</text:p>
      <text:p text:style-name="Standard"><text:tab/>BRAON PRAVOUGAONIK – Uunosom šifre ili slovnih oznaka grada vršite pretragu unutar tabele.</text:p>
      <text:p text:style-name="Standard"><text:tab/>BRISANJE REDA <text:s/>– služi za brisanje jednog reda u tabeli. </text:p>
      <text:p text:style-name="Standard"><text:tab/>PODACI ZA OBRADU - </text:p>
      <text:p text:style-name="Standard"><text:tab/>PREGLED </text:p>
      <text:p text:style-name="Standard"><text:tab/>SPISAK – Klikom na ovo dugme dobijte spisak svih zaposlenih po rastućem redosledu JMBG- a, sa podacima iz zarade koji ulaze u M4. </text:p>
      <text:p text:style-name="Standard"><text:tab/>M4 – NOVI – Pregled i štampa M4 obrasca. Ukoliko imate zaposlene sa različitim registarskim brojevima PIO fonda, pre nego što kliknete na ovo dugme, kliknite u tabeli na registarski broj pa na dugme M4 – NOVI da bi ste dobili M4 pregled za sve zposlene koji imaju izabrani registarski broj. Isto ponovite i kod drugih registarskih brojeva.</text:p>
      <text:p text:style-name="P8"><text:span text:style-name="T1">NAPOMENA <text:s/>ZA <text:s/>REDOSLED <text:s/>KORAKA <text:s/>U <text:s/>IZRADI <text:s/>M4 <text:s/>OBRAZACA</text:span> </text:p>
      <text:list xml:id="list2101554689183257097" text:style-name="L1">
        <text:list-item>
          <text:list>
            <text:list-item>
              <text:list>
                <text:list-item>
                  <text:list>
                    <text:list-item>
                      <text:list>
                        <text:list-item>
                          <text:p text:style-name="P10">PRENOS IZ ARHIVE</text:p>
                        </text:list-item>
                        <text:list-item>
                          <text:p text:style-name="P10">UNESI REGISTARSKI BROJ PIO</text:p>
                        </text:list-item>
                        <text:list-item>
                          <text:p text:style-name="P10">KLIK NA REGISTARSKI BROJ – ukoliko imate više registarskih brojeva.</text:p>
                        </text:list-item>
                        <text:list-item>
                          <text:p text:style-name="P10">M4 – NOVI</text:p>
                        </text:list-item>
                      </text:list>
                    </text:list-item>
                  </text:list>
                </text:list-item>
              </text:list>
            </text:list-item>
          </text:list>
        </text:list-item>
      </text:list>
      <text:p text:style-name="Standard"><text:tab/>IZLAZ<text:tab/></text:p>
      <text:p text:style-name="Standard"/>
      <text:p text:style-name="P1">EVIDENCIJA OBRAČUNA – ne koristi se.</text:p>
      <text:p text:style-name="Standard"/>
      <text:p text:style-name="P1">PROSEČNA ZARADA– ne koristi se.</text:p>
      <text:p text:style-name="Standard"/>
      <text:p text:style-name="P1">EVIDENCIJA POJEDINAČNO– ne koristi se.</text:p>
      <text:p text:style-name="Standard"/>
      <text:p text:style-name="P1">REGISTAR- <text:span text:style-name="T2">Ukoliko ste preneli zarade u registar – opcija prenosa je u okviru platnog spiska PRENOSI &gt; PRENOS ZA REGISTAR – možete koristiti rzličite vrste pregleda koji su ponuđeni </text:span><text:span text:style-name="T2">ispod tabele.</text:span></text:p>
      <text:p text:style-name="P9"/>
      <text:p text:style-name="P3">BAZNA KONTA KNJIŽENJA – <text:span text:style-name="T2">Klikom na ovo dugme otvarate BAZNI ŠIFARNIK KONTA.</text:span></text:p>
      <text:p text:style-name="P7">Dugmad ispod tabele:</text:p>
      <text:p text:style-name="P7"><text:tab/><text:tab/>PRENOS IZ PRIMERA - Klikom na ovo dugme unosite naš predlog baznih konta za knjiženje REDOVNE ZARADE ( VR=1 ), PORODILJSKOG BOLOVANJA ( VR = 2 ) i BOLOVANJA PREKO 30 DANA ( VR = 2 ). Prva kolona u tabeli VR je oznaka vrste obračuna istovetno kao u PARAMETRIMA 2, druga kolona KOD je broj stavke za knjiženje iz REKAPITULACIJE obračuna ( dugme REKAPITULACIJA ispod PLATNOG SPISKA ), treća kolona KONTO sadrži konto duguje i četvrta kolona KONTOP sadrži konto potražuje. U ovoj tabeli možete menjati postojeće šeme knjiženja – menjate isključivo konta, a možete formirati i nove šeme knjiženja pratite oznake VRSTE <text:s/>i <text:s/>KOD iz REKAPITULACIJE. </text:p>
      <text:p text:style-name="P7"><text:tab/><text:tab/>PREGLED KONTA- <text:s/>Klikom na ovo dugme otvarate PRGLED KONTA ZA KNJIŽENJE ZARADA koji možete štampati.</text:p>
      <text:p text:style-name="P7"><text:tab/><text:tab/>DODAVANJE - <text:s/>Klikom na ovo dugme dodajete red u tabeli.</text:p>
      <text:p text:style-name="P7"><text:tab/><text:tab/>BRISANJE REDA - Klikom na ovo dugme brišete red u tabeli.</text:p>
      <text:p text:style-name="P7"><text:tab/><text:tab/>BRIŠI SVE- <text:s/>Klikom na ovo dugme brišete sve podatke u tabeli.</text:p>
      <text:p text:style-name="P7"><text:tab/><text:tab/>IZLAZ</text:p>
      <text:p text:style-name="P5"/>
      <text:p text:style-name="Standard"/>
      <text:p text:style-name="P1">TABELA KONTA - <text:s/><text:span text:style-name="T2">Klikom na ovo dugme otvarate ŠIFARNIK KONTA ZA KNJIŽENJE ZARADA.</text:span></text:p>
      <text:p text:style-name="P5"><text:tab/><text:tab/>PRENOS IZ PRIMERA – Prenos iz BAZNIH KONTA KNJIŽENJA. Obavezan korak. Iz ove tabele prenosite šemu kniženja u TABELU KNIŽENJE ZARADA. </text:p>
      <text:p text:style-name="P5"><text:tab/><text:tab/>BRISANJE REDA - Klikom na ovo dugme brišete red u tabeli.</text:p>
      <text:p text:style-name="Standard"><text:soft-page-break/><text:tab/><text:tab/><text:span text:style-name="T2">BRIŠI SVE - <text:s/>Klikom na ovo dugme brišete sve podatke u tabeli.</text:span></text:p>
      <text:p text:style-name="P7"><text:tab/><text:tab/>IZLAZ</text:p>
      <text:p text:style-name="P1"/>
      <text:p text:style-name="P1">KNJIŽENJE ZARADA - <text:span text:style-name="T2">Klikom na ovo dugme otvarate ŠIFARNIK KONTA ZA KNJIŽENJE ZARADA.</text:span></text:p>
      <text:p text:style-name="P5"><text:tab/><text:tab/>PRENOS KONTA - <text:s/>Klikom na ovo dugme prenosite konta iz TABELE KONTA.</text:p>
      <text:p text:style-name="P5"><text:tab/><text:tab/>PRENOS PODATAKA AKONTACIJA - <text:s/>Klikom na ovo dugme prenosite podatke iz obračuna koji ste izabrali u PARAMETRIMA 2.</text:p>
      <text:p text:style-name="P5"><text:tab/><text:tab/>PRENOS PODATAKA KONAČNA ISPLATA - Klikom na ovo dugme prenosite podatke iz obračuna koji ste izabrali u PARAMETRIMA 2. </text:p>
      <text:p text:style-name="P5"><text:tab/><text:tab/>KNJIŽENJE UKALKULISANE ZARADE - Klikom na ovo dugme knjižite izabranu zaradu u AUTOMATSKE NALOGE glavne knjige. Pregled kniženja i eventualne promene uradite u <text:s/>AUTOMATSKIM NALOZIMA pre kniženja u DNEVNIK glavne knjige. <text:s text:c="7"/></text:p>
      <text:p text:style-name="P5"><text:tab/><text:tab/>KNJIŽENJE ISPLATE ZARADE – ne koristi se.</text:p>
      <text:p text:style-name="P5"><text:tab/><text:tab/>BRIŠI SVE - Klikom na ovo dugme brišete sve podatke u tabeli.</text:p>
      <text:p text:style-name="P5"><text:tab/><text:tab/>IZLAZ</text:p>
      <text:p text:style-name="P1"><text:tab/><text:tab/></text:p>
      <text:p text:style-name="Standard"/>
      <text:p text:style-name="Standard"/>
      <text:p text:style-name="P6">ČETVRTA KOLONA SARDŽI:</text:p>
      <text:p text:style-name="Standard"/>
      <text:p text:style-name="P1">OBRAČUN NAKNADA - posebno uputstvo.</text:p>
      <text:p text:style-name="Standard"/>
      <text:p text:style-name="P1">PUTNI NALOZI - posebno uputstvo. </text:p>
      <text:p text:style-name="Standard"/>
      <text:p text:style-name="P1">PUTARINE - <text:s/><text:span text:style-name="T2">Klikom na ovo dugme otvarate tabelu EVIDENCIJA PUTARINA – Služi za </text:span><text:span text:style-name="T2">evidenciju putarina. Dugmići ispod tabele:</text:span></text:p>
      <text:p text:style-name="P5"><text:tab/><text:tab/>GORE, DOLE, ZADNJI I PRVI - služe za kretanje unutar tabele. </text:p>
      <text:p text:style-name="P5"><text:tab/><text:tab/>DUGME + - Klikom na ovo dugme dodajete red u tabeli.</text:p>
      <text:p text:style-name="P5"><text:tab/><text:tab/>OTVORI TABELU - <text:s/>Klikom na ovo dugme otvarate polja u tabeli za unos ili izmenu podataka. </text:p>
      <text:p text:style-name="P5"><text:tab/><text:tab/>BRISANJE ZADNJEG REDA - <text:s/>Klikom na ovo dugme brišete zadnji red u tabeli.</text:p>
      <text:p text:style-name="P5"><text:tab/><text:tab/>RELACIJE F4 - <text:s/>Klikom na ovo dugme otvarate podmeni ŠIFARNIK PUTARINA. <text:s/>Dugmići ispod tabele: GORE, DOLE, ZADNJI I PRVI - služe za kretanje unutar tabele. DUGME + - Klikom na ovo dugme dodajete red u tabeli za unos podataka. KARTICA <text:s/>F7 - klikom na ovo dugme otvarate KARTICU RELACIJE – služi za pregled, a možete je koristiti i za unos ili izmenu podataka. IZLAZ – povratak u tabelu.</text:p>
      <text:p text:style-name="P1"><text:span text:style-name="T2"><text:tab/><text:tab/>PREGLED 10 - <text:s/>Klikom na ovo dugme otvarate podmeni PREGLED. Unesite datume i grupu ( samo ako ste grupisali relacije, inače ostaje prazno polje ) pa kliknite na dugme </text:span><text:span text:style-name="T2">PREGLED. Dobili ste pregled putarina koji sada možete štampati. Klikom na dugme SALDO RELACIJA dobijate saldo putarina za zadati period, koji takođe možete štampati.</text:span></text:p>
      <text:p text:style-name="P5"><text:tab/><text:tab/>SORT – ovo dume služi za promenu redosleda evidentiranih putarina. Prema datumu, prema broju putnog naloga ili datumu. </text:p>
      <text:p text:style-name="Standard"/>
      <text:p text:style-name="P1">PREVOZ - posebno uputstvo.</text:p>
      <text:p text:style-name="Standard"/>
      <text:p text:style-name="P1">ARHIVA PREVOZA - <text:span text:style-name="T2"><text:s/>Klikom na ovo dugme otvarate tabelu ARHIVA PREVOZA gde ćete moći da pregledate sve obračune prevoza koje ste u obračunu prevoza ahivirali i sačuvali.</text:span></text:p>
      <text:p text:style-name="Standard"/>
      <text:p text:style-name="P1">TABELA SVIH ZARADA - posebno uputstvo.<text:span text:style-name="T2"> </text:span></text:p>
      <text:p text:style-name="Standard"/>
      <text:p text:style-name="P1">RADNO VREME - <text:span text:style-name="T2"><text:s/>Klikom na ovo dugme otvarate <text:s/>TABELU EVIDENCIJE RADNOG </text:span><text:soft-page-break/><text:span text:style-name="T2">VREMENA. </text:span></text:p>
      <text:p text:style-name="Standard"/>
      <text:p text:style-name="P1">PODACI O ZARADI - ne koristi se.</text:p>
      <text:p text:style-name="Standard"/>
      <text:p text:style-name="P1">PODACI O ZARADAMA - ne koristi se.</text:p>
      <text:p text:style-name="Standard"/>
      <text:p text:style-name="P1">IZJAVA O RADNOM VREMENU - <text:s/><text:span text:style-name="T2">Klikom na ovo dugme otvarate tabelu u kojoj možete kreirati obrazac izjave za zaposlene koji rade kod više poslodavaca sa nepunim radnim vremenom. Dugmići ispod tabele:</text:span></text:p>
      <text:p text:style-name="P5"><text:tab/><text:tab/>GORE, DOLE, ZADNJI I PRVI - služe za kretanje unutar tabele.</text:p>
      <text:p text:style-name="P5"><text:tab/><text:tab/>DODAJ + - služi za dodavanje reda za unos podataka. Unesite podatke po <text:s/>redosledu kolona u tabeli.</text:p>
      <text:p text:style-name="P5"><text:tab/><text:tab/>RADNICI F4 – služi za izbor radnika iz evidencije zaposlenih.</text:p>
      <text:p text:style-name="P5"><text:tab/><text:tab/>IZJAVA – pregled i štampa obrasca izjave.</text:p>
      <text:p text:style-name="Standard"><text:span text:style-name="T2"><text:tab/><text:tab/>BRISANJE - služi za brisanje podataka u tabeli. </text:span></text:p>
      <text:p text:style-name="Standard"><text:span text:style-name="T2"/></text:p>
      <text:p text:style-name="P1">PPDSO - ne koristi se.</text:p>
      <text:p text:style-name="Standard"/>
      <text:p text:style-name="P1">RADNICI ZA OLAKŠICE - <text:s/><text:span text:style-name="T2">Klikom na ovo dugme otvarate SPISAK RADNIKA ZA ZAHTEV ZA POVRAĆAJ POREZA I DOPRINOSA. Dugmad ispod tabele:</text:span></text:p>
      <text:p text:style-name="P1"><text:span text:style-name="T2"><text:tab/><text:tab/>PREUZIMANJE - </text:span><text:s/><text:span text:style-name="T2">Klikom na ovo dugme preuzimate podatke za sve zaposlene za koje ste u EVIDENCIJI ZAPOSLENIH uneli šifru prihoda za korišćenje olakšice. Unesite u tabelu redne brojeve ( prva kolona tabele ) i proverite da li su svi podaci u tabeli ispravni. Ukoliko neki </text:span><text:span text:style-name="T2">podatak nedostaje vratite se u EVIDENCIJU ZAPOSLENIH i unesite taj podatak u odgovarajuće polje, zatim obrišite prvobitni unos u ovoj tabeli i ponovite PRENOS. <text:s/></text:span></text:p>
      <text:p text:style-name="P5"><text:tab/><text:tab/>ZAHTEV - Klikom na ovo dugme dobijate pregled SPISKA koji možete štampati.</text:p>
      <text:p text:style-name="P5"><text:tab/><text:tab/>BRISANJE - Klikom na ovo dugme brišete sve podatke u tabeli.</text:p>
      <text:p text:style-name="P5"><text:tab/><text:tab/>DODAJ – Ovo dugme služi za dodavanje reda u tabeli za ručni unos podataka.</text:p>
      <text:p text:style-name="P5"><text:tab/><text:tab/>IZLAZ</text:p>
      <text:p text:style-name="Standard"/>
      <text:p text:style-name="P1">ZAHTEV ZA POVRAĆAJ - <text:s/><text:span text:style-name="T2">Klikom na ovo dugme otvarate tabelu ZAHTEV ZA POVRAĆAJ POREZA I DOPRINOSA. Izradu zahteva uvek radite nakon predaje PPP – PD. Veoma je važno da nakon predaje prijave ponovite postupak prenosa u XML. U PARAMETRIMA PRENOSA ispravite podatak DEKLARACIJA – BROJ PRIJAVE odnosno unesite ID BROJ koji je dodeljen vašoj prijavi na portalu Poreske uprave. Zatim obrišite prethodni prenos i ponovo prenesite podatke da bi vam ta prijava preuzela ID broj iz DEKLARACIJE – BRROJ PRIJAVE. Sada arhivirajte datu prijavu. Time ste omogućili prenos podataka iz konkretne prijave preme ID broju prijave za ZAHTEV ZA POVRAĆAJ POREZA I DOPRINOSA. Dugmad ispod tabele:</text:span></text:p>
      <text:p text:style-name="P1"><text:span text:style-name="T2"><text:tab/><text:tab/>PREUZIMANJE OPŠTIH PODATAKA - <text:s/>Klikom na ovo dugme preuzimate opšte podatke iz arhivirane prijave i podataka o firmi. Tabelu morate dopuniti. UNOSITE PODATKE U </text:span><text:span text:style-name="T2">SLEDEĆE KOLONE: REDNI BROJ, BOP IZ PRIJAVE, NAZIV MESECA, POCLICA, </text:span><text:span text:style-name="T2">DANLICA i DATPOD. </text:span></text:p>
      <text:p text:style-name="P5"><text:tab/><text:tab/>PREUZIMANJE IZNOSA ZA POVRAĆAJ - <text:s/>Klikom na ovo dugme otvarate tabelu PRENOS IZNOSA ZA POVRAĆAJ. Broj prijave je uvek broj poslednje predate i arhivirane prijave. Ovj broj možete menjati. Ukoliko predajete zahtev za neku prethodnu prijavu ukucajte njen ID broj. Klikom na dugme PRENOS automatski preuzimate iznos za povraćaj prema podatku iz prijave, koja u arhivi ima isti ID broj. Iznos je preračunat prema procentu koji važi za šifru olakšice koju ste koristili u prijavi.</text:p>
      <text:p text:style-name="P5"><text:tab/><text:tab/>ZAHTEV - <text:s/>Klikom na ovo dugme otvarate obrazac zahteva koji možete štampati.</text:p>
      <text:p text:style-name="P5"><text:tab/><text:tab/>BRISANJE ZADNJEG REDA - Klikom na ovo dugme brišete zadnji red u tabeli.</text:p>
      <text:p text:style-name="P5"><text:tab/><text:tab/>DODAJ - Ovo dugme služi za dodavanje reda u tabeli za ručni unos podataka.</text:p>
      <text:p text:style-name="Standard"><text:span text:style-name="T2"><text:tab/><text:tab/>IZLAZ - <text:s/>Klikom na ovo dugme vraćate se u GLAVNI ME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zef Brnić</meta:initial-creator>
    <meta:creation-date>2018-06-04T14:46:26.04</meta:creation-date>
    <dc:date>2022-03-10T14:42:58.98</dc:date>
    <dc:creator>Jozef Brnić</dc:creator>
    <meta:editing-duration>P1DT17H18M56S</meta:editing-duration>
    <meta:editing-cycles>20</meta:editing-cycles>
    <meta:generator>OpenOffice/4.1.1$Win32 OpenOffice.org_project/411m6$Build-9775</meta:generator>
    <meta:document-statistic meta:table-count="0" meta:image-count="0" meta:object-count="0" meta:page-count="10" meta:paragraph-count="211" meta:word-count="4267" meta:character-count="26108"/>
  </office:meta>
</office:document-meta>
</file>