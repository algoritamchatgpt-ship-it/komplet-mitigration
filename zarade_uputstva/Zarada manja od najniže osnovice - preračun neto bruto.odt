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df44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language="zxx" fo:country="none"/>
    </style:style>
    <style:style style:name="T2" style:family="text">
      <style:text-properties fo:color="#c9211e" loext:opacity="100%" officeooo:rsid="001cdf44"/>
    </style:style>
    <style:style style:name="T3" style:family="text">
      <style:text-properties fo:color="#c9211e" loext:opacity="100%" officeooo:rsid="001e9f1d"/>
    </style:style>
    <style:style style:name="T4" style:family="text">
      <style:text-properties fo:color="#c9211e" loext:opacity="100%" fo:font-weight="bold" officeooo:rsid="001cdf44" style:font-weight-asian="bold" style:font-weight-complex="bold"/>
    </style:style>
    <style:style style:name="T5" style:family="text">
      <style:text-properties fo:color="#c9211e" loext:opacity="100%" fo:font-weight="bold" officeooo:rsid="001e9f1d" style:font-weight-asian="bold" style:font-weight-complex="bold"/>
    </style:style>
    <style:style style:name="T6" style:family="text">
      <style:text-properties fo:color="#c9211e" loext:opacity="100%" fo:font-style="italic" fo:font-weight="bold" officeooo:rsid="001cdf44" style:font-style-asian="italic" style:font-weight-asian="bold" style:font-style-complex="italic" style:font-weight-complex="bold"/>
    </style:style>
    <style:style style:name="T7" style:family="text">
      <style:text-properties fo:color="#c9211e" loext:opacity="100%" fo:font-style="italic" fo:font-weight="bold" officeooo:rsid="001e9f1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ARADA MANJA OD NAJNIŽE OSNOVICE ILI </text:p>
      <text:p text:style-name="P3">VEĆA OD NAJVIŠE OSNOVICE</text:p>
      <text:p text:style-name="P3"/>
      <text:p text:style-name="P1"><text:tab/>Obračun raditi isključivo u BRUTO OBRAČUNU. Moja preporuka je da se koristi CENA RADA i <text:span text:style-name="T1">KOEFICIJENT</text:span> 1, a ne FIKSNA ZARADA zbog obračuna naknada, minulog rada i eventualnog bolovanja do 30 dana. Ukoliko je dogovorena MINIMALNA ZARADA, svakog meseca se vrši preračun CENE RADA shodno broju časova u mesecu.</text:p>
      <text:p text:style-name="P1"><text:tab/></text:p>
      <text:p text:style-name="P3"/>
      <text:p text:style-name="P1"><text:tab/>Koristiti formulu za preračun neta na bruto:</text:p>
      <text:p text:style-name="P1"/>
      <text:p text:style-name="P1"><text:s text:c="66"/>NETO – UPO x SP + SD</text:p>
      <text:p text:style-name="P1"><text:tab/><text:tab/><text:tab/><text:tab/>BRUTO = ----------------------------------</text:p>
      <text:p text:style-name="P1"><text:s text:c="86"/>0,9</text:p>
      <text:p text:style-name="P1"/>
      <text:p text:style-name="P1"><text:tab/>NETO – UGOVORENA NETO ZARADA za dati procenat angažovanja </text:p>
      <text:p text:style-name="P2"><text:tab/>UPO – NEOPOREZIVI IZNOS ZARADE ( UMANJENJE PORESKE OSNOVICE ) </text:p>
      <text:p text:style-name="P2"><text:span text:style-name="T2">ZA NEPUNO RADNO VREME UTVRDITI PROPORCIONALNO OSLOBOĐENJE PREMA NOMINALNIM ČASOVIMA RADA ZA DATI MESEC</text:span> <text:span text:style-name="T2">I ČASOVIMA PO UČINKU.</text:span></text:p>
      <text:p text:style-name="P1"><text:tab/>SP – STOPA POREZA </text:p>
      <text:p text:style-name="P1">IZNOS PORSKOG OSLOBOĐENJA JE PROPORCIONALAN RADNOM ANGAŽOVANJU</text:p>
      <text:p text:style-name="P1"><text:tab/>SD – IZNOS DOPRINOSA <text:s/>NA TERET ZAPOSLENOG OBRAČUNATIH NA NAJNIŽU <text:s text:c="2"/>OSNOVICU ( 19.9 % ) ili NA NAJVIŠU OSNOVICU SHODNO VAŠEM SLUČAJU.</text:p>
      <text:p text:style-name="P2"><text:span text:style-name="T4">ZA NEPUNO RADNO VREME UTVRDITI </text:span><text:span text:style-name="T6">PROPORCIONALNU </text:span><text:span text:style-name="T7">NAJVIŠU </text:span><text:span text:style-name="T6">OSNOVICU</text:span><text:span text:style-name="T4"> PREMA NOMINALNIM ČASOVIMA RADA ZA DATI MESEC I ČASOVIMA PO UČINKU </text:span><text:span text:style-name="T5">ako bruto za nepuno radno vreme prelazi najvišu osnovicu.</text:span><text:tab/></text:p>
      <text:p text:style-name="P1"><text:tab/>Dobijeni bruto iznos podelite sa časovima radnog angažovanja zaposlenog da bi ste dobili bruto iznos po času i pomnožite sa ukupnim brojem časova rada za dati mesec. Taj iznos koristite za bruto obračun kao cenu rada sa koeficijentom 1, za dati procenat angažovanja. U obračun unosite časove shodno procentu angažovanja. </text:p>
      <text:p text:style-name="P1"><text:tab/>U evidenciji zaposlenih unesite podatke u polja: MFP3PROC – procenat angažovanja, MFP8 - oznaka 1 i ROPNR - oznaka 1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21-01-27T10:54:24.42</meta:creation-date>
    <dc:date>2023-11-21T15:54:36.588000000</dc:date>
    <meta:editing-duration>PT1H10M41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239" meta:character-count="1720" meta:non-whitespace-character-count="1317"/>
  </office:meta>
</office:document-meta>
</file>