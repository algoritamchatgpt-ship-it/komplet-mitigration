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400000038414F299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ab-stops>
          <style:tab-stop style:position="3.6898in"/>
        </style:tab-stops>
      </style:paragraph-properties>
      <style:text-properties fo:color="#ff3399"/>
    </style:style>
    <style:style style:name="P4" style:family="paragraph" style:parent-style-name="Standard" style:list-style-name="L1">
      <style:paragraph-properties fo:text-align="start" style:justify-single-word="false"/>
      <style:text-properties fo:font-weight="bold" style:font-weight-asian="bold" style:font-weight-complex="bold"/>
    </style:style>
    <style:style style:name="P5" style:family="paragraph" style:parent-style-name="Standard" style:list-style-name="L2">
      <style:paragraph-properties fo:text-align="start" style:justify-single-word="false"/>
      <style:text-properties fo:font-weight="bold" style:font-weight-asian="bold" style:font-weight-complex="bold"/>
    </style:style>
    <style:style style:name="P6" style:family="paragraph" style:parent-style-name="Standard" style:list-style-name="L4">
      <style:paragraph-properties fo:text-align="start" style:justify-single-word="false"/>
      <style:text-properties fo:font-weight="bold" style:font-weight-asian="bold" style:font-weight-complex="bold"/>
    </style:style>
    <style:style style:name="P7" style:family="paragraph" style:parent-style-name="Standard" style:list-style-name="L7">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style>
    <style:style style:name="P9" style:family="paragraph" style:parent-style-name="Standard" style:list-style-name="L1">
      <style:paragraph-properties fo:text-align="start" style:justify-single-word="false"/>
    </style:style>
    <style:style style:name="P10" style:family="paragraph" style:parent-style-name="Standard" style:list-style-name="L3">
      <style:paragraph-properties fo:text-align="start" style:justify-single-word="false"/>
    </style:style>
    <style:style style:name="P11" style:family="paragraph" style:parent-style-name="Standard" style:list-style-name="L4">
      <style:paragraph-properties fo:text-align="start" style:justify-single-word="false"/>
    </style:style>
    <style:style style:name="P12" style:family="paragraph" style:parent-style-name="Standard" style:list-style-name="L5">
      <style:paragraph-properties fo:text-align="start" style:justify-single-word="false"/>
    </style:style>
    <style:style style:name="P13" style:family="paragraph" style:parent-style-name="Standard" style:list-style-name="L8">
      <style:paragraph-properties fo:text-align="start" style:justify-single-word="false"/>
    </style:style>
    <style:style style:name="P14" style:family="paragraph" style:parent-style-name="Standard">
      <style:paragraph-properties fo:text-align="start" style:justify-single-word="false"/>
      <style:text-properties fo:color="#ff3399"/>
    </style:style>
    <style:style style:name="P15" style:family="paragraph" style:parent-style-name="Standard">
      <style:paragraph-properties fo:text-align="start" style:justify-single-word="false"/>
      <style:text-properties fo:font-weight="normal" style:font-weight-asian="normal" style:font-weight-complex="normal"/>
    </style:style>
    <style:style style:name="P16" style:family="paragraph" style:parent-style-name="Standard" style:list-style-name="L6">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0066"/>
    </style:style>
    <style:style style:name="T4" style:family="text">
      <style:text-properties fo:color="#0000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PUTSTVO ZA PRENOS ZARADA</text:p>
      <text:p text:style-name="P1">U REGISTAR</text:p>
      <text:p text:style-name="P2"><text:tab/></text:p>
      <text:p text:style-name="P2"><text:tab/>Nakon završenog obračuna zarada BRUTO ILI NETO, u okviru PLATNOG SPISKA, kliknite na dugme <text:span text:style-name="T3">PRENOSI</text:span>, pa na dugme <text:span text:style-name="T3">PRENOS ZA REGISTAR</text:span> i potvrdite klikom na dugme ŽELIM PRENOS i IZLAZ. Time ste pripremili obračun za prenos u registar. </text:p>
      <text:p text:style-name="P2"/>
      <text:p text:style-name="P2"><text:tab/>Sada pređite u GLAVNI MENI i kliknite na dugme XML – TXT, zatim na dugme XML, pa na dugme ZARADE ZAPOSLENIH BUDŽET. Datim redosledom otvarate i popunjavate zadate forme:</text:p>
      <text:p text:style-name="P2"/>
      <text:list xml:id="list4227231343814098549" text:style-name="L1">
        <text:list-item>
          <text:list>
            <text:list-item>
              <text:list>
                <text:list-item>
                  <text:p text:style-name="P4">PARAMETRI</text:p>
                  <text:p text:style-name="P4"/>
                </text:list-item>
              </text:list>
            </text:list-item>
          </text:list>
        </text:list-item>
      </text:list>
      <text:p text:style-name="P2"><text:s/><text:tab/><text:tab/> <text:s text:c="9"/>- U ovoj formi OBAVEZNO popunjavate sledeća polja:</text:p>
      <text:list xml:id="list3891157018054457607" text:style-name="L2">
        <text:list-item>
          <text:list>
            <text:list-item>
              <text:list>
                <text:list-item>
                  <text:p text:style-name="P5">Jedinstveni broj korisnika,</text:p>
                </text:list-item>
                <text:list-item>
                  <text:p text:style-name="P8"><text:span text:style-name="T1">Isplata u mesecu </text:span>– mesec u kome realizujete isplatu zaradu,</text:p>
                </text:list-item>
                <text:list-item>
                  <text:p text:style-name="P8"><text:span text:style-name="T1">Godina</text:span> – godina u kojoj realizujete isplatu zaradu,</text:p>
                </text:list-item>
                <text:list-item>
                  <text:p text:style-name="P8"><text:span text:style-name="T1">Datum slanja</text:span>,</text:p>
                </text:list-item>
                <text:list-item>
                  <text:p text:style-name="P8"><text:span text:style-name="T1">Funcionalna klasifikacija</text:span>,</text:p>
                </text:list-item>
                <text:list-item>
                  <text:p text:style-name="P8"><text:span text:style-name="T1">Izvor finansiranja</text:span>,</text:p>
                </text:list-item>
                <text:list-item>
                  <text:p text:style-name="P8"><text:span text:style-name="T1">Isplata za mesec</text:span> – mesec za koji je urađen obračun zarade.</text:p>
                </text:list-item>
                <text:list-item>
                  <text:p text:style-name="P8"><text:span text:style-name="T1">Isplata za godinu</text:span> – godina za koju je urađen obračun.</text:p>
                </text:list-item>
                <text:list-item>
                  <text:p text:style-name="P8"><text:span text:style-name="T1">Šifra organizacione jedinice</text:span>, </text:p>
                  <text:p text:style-name="P8">- <text:s/>Sledeća polja možete popuniti, a možete ih ostaviti i nepopunjena,</text:p>
                </text:list-item>
                <text:list-item>
                  <text:p text:style-name="P5">Program,</text:p>
                </text:list-item>
                <text:list-item>
                  <text:p text:style-name="P5">Projekat,</text:p>
                  <text:p text:style-name="P8">- <text:s/>Sledeće polje koristi se <text:span text:style-name="T1">samo za neto obračune</text:span> u prenosu bruto obračuna i obračuna iz OPJ obrazaca, nije potreban unos – ostaje nula:</text:p>
                </text:list-item>
                <text:list-item>
                  <text:p text:style-name="P8"><text:span text:style-name="T1">Koeficijent preračuna sa NETA na BRUTO</text:span> – u prvom unosu ostavite nulu. Polje će se automatski popuniti nakon prvog prenosa zarade, a taj automatski iznos možete zadržati u svakom sledećem prenosu. Nije greška ukoliko i u svakom sledećem prenosu unesete nulu.</text:p>
                  <text:p text:style-name="P8"/>
                </text:list-item>
              </text:list>
            </text:list-item>
          </text:list>
        </text:list-item>
      </text:list>
      <text:list xml:id="list32783523" text:continue-list="list4227231343814098549" text:style-name="L1">
        <text:list-item>
          <text:list>
            <text:list-item>
              <text:list>
                <text:list-item>
                  <text:p text:style-name="P4">ŠEMA ZARADA </text:p>
                  <text:p text:style-name="P4"/>
                  <text:list>
                    <text:list-header>
                      <text:p text:style-name="P9"><text:span text:style-name="T1"><text:s/></text:span><text:span text:style-name="T2">-</text:span> Prvi put kliknite na DODAJ SVE i pređite na sledeću formu. Ova tabela sadrži deo propisanih šifara osnova primanja, šifre koje se najčešće koriste. Ukoliko tabela ne sadrži šifru osnova koja vam je potrebna možete je dodati klikom na dugme dodaj. U kolonu <text:span text:style-name="T4">SIFRAOSNOV</text:span> unosite šifru osnova, na primer <text:span text:style-name="T4">402</text:span> ( naknada troškova za prevoz na posao i sa posla iz Šifarnika osnova primanja), u kolonu <text:span text:style-name="T4">POLJE</text:span> naziv kolone iz tabele u kojoj se podatak nalazi u programu, u slučaju prevoza to je kolona <text:span text:style-name="T4">Ukupprev</text:span> iz tabele obračuna prevoza, u kolonu <text:span text:style-name="T4">Koef</text:span> unosite uvek broj <text:span text:style-name="T4">1</text:span>. Jednom unete šifre prihoda nema potrebe da unosite sledeći put, program ih pamti. Ukoliko ih obrišete morate ponoviti unos.</text:p>
                    </text:list-header>
                  </text:list>
                  <text:p text:style-name="P9"/>
                </text:list-item>
              </text:list>
            </text:list-item>
          </text:list>
          <text:p text:style-name="P9"><text:s text:c="5"/><text:span text:style-name="T1"><text:s/>3. <text:s text:c="2"/>ZARADE – ŠEMA PRENOSA PLATA</text:span></text:p>
          <text:p text:style-name="P4"/>
        </text:list-item>
      </text:list>
      <text:list xml:id="list3991600017195515738" text:style-name="L3">
        <text:list-item>
          <text:p text:style-name="P10">Uvek kliknite prvo na <text:span text:style-name="T1">BRIŠI SVE</text:span>, zatim na </text:p>
        </text:list-item>
        <text:list-item>
          <text:p text:style-name="P10"><text:span text:style-name="T1">PARAMETRE PRENOSA</text:span>.<text:tab/>Ukoliko je tabela prazna, kliknite na <text:span text:style-name="T1">DODAJ SVE</text:span> pa unesite podatak u polje kolone <text:span text:style-name="T1">MESEC</text:span> – unos brojčane oznake meseca – u polje koje odgovara vrsti obračuna koji prenosite i rednom broju <text:soft-page-break/>isplate. Obavezno popunite polje kolone <text:span text:style-name="T1">Izvorfin </text:span><text:span text:style-name="T2">odgovarajućom oznakom vašeg izvora finansiranja. Ukoliko tabela sadrži podatke iz prethodnog unosa ispravite potrebne podatke, </text:span><text:span text:style-name="T1">MESEC</text:span><text:span text:style-name="T2">, </text:span><text:span text:style-name="T1">Izvorfin, Redispl. </text:span>Kod prenosa<text:span text:style-name="T1"> PREVOZA i OPJ</text:span> obračuna obavezno popunite polja <text:span text:style-name="T1">ISPLATA, REDNI BROJ ISPLATE <text:s/>i <text:s/>MESEC.</text:span></text:p>
          <text:p text:style-name="P10">Sada se vratite u tabelu ŠEMA PRENOSA PLATA.</text:p>
          <text:p text:style-name="P10"/>
        </text:list-item>
      </text:list>
      <text:p text:style-name="P3">Ukoliko radite BRUTO obračun u PLATNOM SPISKU, prenosite obračun PREVOZA ili obračun iz OPJ obrazaca, kliknite na dugme:</text:p>
      <text:list xml:id="list3880875163301661172" text:style-name="L4">
        <text:list-item>
          <text:p text:style-name="P11"><text:span text:style-name="T1">PRUZMI ZARADE BRUTO OBRAČUN, </text:span><text:span text:style-name="T2">pa na dugme </text:span><text:span text:style-name="T1">SUMIRANJE ISTIH ŠIFRI OSNOVA KOD ISTOG MATIČNOG BROJA.</text:span></text:p>
          <text:p text:style-name="P6"/>
        </text:list-item>
      </text:list>
      <text:p text:style-name="P14">Ukoliko radite NETO obračun u PLATNOM SPISKU, kliknite na dugme:</text:p>
      <text:list xml:id="list143813964704812483" text:style-name="L5">
        <text:list-item>
          <text:p text:style-name="P12"><text:span text:style-name="T1">PREUZMI ZARADE NETO NA BRUTO, </text:span><text:span text:style-name="T2">pa na dugme </text:span><text:span text:style-name="T1">SUMIRANJE ISTIH ŠIFRI OSNOVA KOD ISTOG MATIČNOG BROJA.</text:span><text:span text:style-name="T2"> </text:span></text:p>
        </text:list-item>
      </text:list>
      <text:list xml:id="list2076199941506553340" text:style-name="L6">
        <text:list-header>
          <text:p text:style-name="P16"/>
        </text:list-header>
      </text:list>
      <text:p text:style-name="P15"><text:tab/><text:tab/><text:tab/>Sada pređite na:</text:p>
      <text:p text:style-name="P15"/>
      <text:list xml:id="list6010360607447068587" text:style-name="L7">
        <text:list-header>
          <text:p text:style-name="P7"><text:s text:c="6"/>4. <text:s text:c="2"/>ŠEMA XML</text:p>
        </text:list-header>
      </text:list>
      <text:list xml:id="list1252092863115755424" text:style-name="L8">
        <text:list-item>
          <text:p text:style-name="P13"><text:span text:style-name="T2">Uvek kliknite prvo na BRIŠI SVE pa na DODAJ SVE, a zatm na dugme </text:span><text:span text:style-name="T1">NAPRAVI XML - čime ste formirali XML koji treba da učitate u CROSSO aplikaciju Centralnog registra. </text:span><text:span text:style-name="T2">Fajl se nalazi u XML podacima &gt; GLAVNI MENI – UVOZ DADOTEKA <text:s/>&gt; </text:span><text:span text:style-name="T1">DUGME XML.</text:span><text:span text:style-name="T2"> Slika dole.</text:span></text:p>
        </text:list-item>
      </text:list>
      <text:p text:style-name="P2"/>
      <text:p text:style-name="P2"/>
      <text:p text:style-name="P2"><draw:frame draw:style-name="fr1" draw:name="графика1" text:anchor-type="paragraph" svg:width="7.8465in" svg:height="4.5819in" draw:z-index="0"><draw:image xlink:href="Pictures/10000201000006400000038414F299A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zef Brnić</meta:initial-creator>
    <meta:creation-date>2021-02-03T12:50:13.68</meta:creation-date>
    <dc:date>2021-05-12T12:57:21.66</dc:date>
    <dc:creator>Jozef Brnić</dc:creator>
    <meta:editing-duration>PT2H54M8S</meta:editing-duration>
    <meta:editing-cycles>3</meta:editing-cycles>
    <meta:generator>OpenOffice/4.1.1$Win32 OpenOffice.org_project/411m6$Build-9775</meta:generator>
    <meta:document-statistic meta:table-count="0" meta:image-count="1" meta:object-count="0" meta:page-count="2" meta:paragraph-count="34" meta:word-count="558" meta:character-count="3342"/>
  </office:meta>
</office:document-meta>
</file>