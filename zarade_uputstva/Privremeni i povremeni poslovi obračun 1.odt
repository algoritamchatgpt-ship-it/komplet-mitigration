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ела1" style:family="table">
      <style:table-properties style:width="17.097cm" fo:margin-left="-0.108cm" fo:margin-right="0.011cm" table:align="margins"/>
    </style:style>
    <style:style style:name="Табела1.A" style:family="table-column">
      <style:table-column-properties style:column-width="4.56cm" style:rel-column-width="17477*"/>
    </style:style>
    <style:style style:name="Табела1.B" style:family="table-column">
      <style:table-column-properties style:column-width="4.009cm" style:rel-column-width="15367*"/>
    </style:style>
    <style:style style:name="Табела1.C" style:family="table-column">
      <style:table-column-properties style:column-width="4.457cm" style:rel-column-width="17085*"/>
    </style:style>
    <style:style style:name="Табела1.D" style:family="table-column">
      <style:table-column-properties style:column-width="4.071cm" style:rel-column-width="15606*"/>
    </style:style>
    <style:style style:name="Табела1.1" style:family="table-row">
      <style:table-row-properties fo:background-color="#3c7286">
        <style:background-image/>
      </style:table-row-properties>
    </style:style>
    <style:style style:name="Табела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ела1.D1" style:family="table-cell">
      <style:table-cell-properties style:vertical-align="middle" style:border-line-width="0.002cm 0.088cm 0.002cm" fo:padding="0.049cm" fo:border="2.6pt double #808080"/>
    </style:style>
    <style:style style:name="Табела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Табела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weight="bold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zxx" fo:country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1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VREMENI I POVREMENI POSLOVI</text:p>
      <text:p text:style-name="P3"/>
      <text:p text:style-name="P3"/>
      <text:p text:style-name="P3"><text:tab/>Obračun zarade po ugovoru o privremenim i povremenim poslovima u programu radite u okviru opcije UGOVOR O <text:s/>DELU ( PRIVREMENIM I POVREMENIM POSLOVIMA ). <text:s/></text:p>
      <text:p text:style-name="P3"><text:tab/>U EVIDENCIJI ZAPOSLENIH unosite podatke kao i kod drugih zaposlenih. Jedina razlika je to što u polje VRSTA unosite veliko slovo <text:span text:style-name="T3">U </text:span>kod zaposlenih po ugovoru o privremenim i povremenim poslovima. Time ste ove zaposlene izdvojili da vam se ne javljaju na platnom spisku kada radite redovnu zaradu i obrnuto. U PARAMRTRIMA 2 u polju VRSTA ISPLATE unosite broj 6 kada radite obračun i NE ZABORAVITE da za ovu vrstu obračuna ne postoji neoporezivi deo zarade. Iznos zarade bez poreza <text:span text:style-name="T4">ne treba brisati, za šifru prihoda 150 ili 151 program ne uzima u obzir ovaj podatak i porez obračunava na ceo bruto.</text:span></text:p>
      <text:p text:style-name="P3"/>
      <text:p text:style-name="P3"><text:s/><text:tab/><text:span text:style-name="T2">O</text:span><text:span text:style-name="T3">BRAČUN POVREMENIH I PRIVREMENIH POSLOVA </text:span><text:span text:style-name="T2">ZAKLJUČEN SA </text:span><text:span text:style-name="T3">PENZIONER</text:span><text:span text:style-name="T2">OM RADI SE KAO POSEBAN OBRAČUN. </text:span><text:span text:style-name="T3">POSEBNO UPUTSTVO.</text:span> </text:p>
      <text:p text:style-name="P3"/>
      <text:p text:style-name="P3"><text:tab/> ŠIFRA VRSTE PRIHODA – MORA DA SE PRILAGODI OSOBINAMA PRIMAOCA PRIHODA PREMA ŠIFRARNIKU VRSTA PRIHODA. </text:p>
      <text:p text:style-name="P3"><text:tab/> </text:p>
      <text:p text:style-name="P3"><text:tab/> ZA PRERAČUN BRUTO NETO KORISTITI ODGOVARAJUĆU FORMULU. </text:p>
      <text:p text:style-name="P3"><text:tab/></text:p>
      <text:p text:style-name="P3"><text:tab/></text:p>
      <table:table table:name="Табела1" table:style-name="Табела1">
        <table:table-column table:style-name="Табела1.A"/>
        <table:table-column table:style-name="Табела1.B"/>
        <table:table-column table:style-name="Табела1.C"/>
        <table:table-column table:style-name="Табела1.D"/>
        <table:table-row table:style-name="Табела1.1">
          <table:table-cell table:style-name="Табела1.A1" office:value-type="string">
            <text:p text:style-name="P5">PRIVREMENI I POVREMENI POSLOVI </text:p>
          </table:table-cell>
          <table:table-cell table:style-name="Табела1.A1" office:value-type="string">
            <text:p text:style-name="P5">UGOVORENA NAKNADA - niža od najniže osnovice </text:p>
          </table:table-cell>
          <table:table-cell table:style-name="Табела1.A1" office:value-type="string">
            <text:p text:style-name="P5">UGOVORENA NAKNADA - viša od najniže, a niža od najviše osnovice </text:p>
          </table:table-cell>
          <table:table-cell table:style-name="Табела1.D1" office:value-type="string">
            <text:p text:style-name="P5">UGOVORENA NAKNADA - viša od najviše osnovice </text:p>
          </table:table-cell>
        </table:table-row>
        <table:table-row>
          <table:table-cell table:style-name="Табела1.A2" office:value-type="string">
            <text:p text:style-name="P6">Ugovorena naknada za lice koje nije na školovanju ili je starije od 26 godina </text:p>
          </table:table-cell>
          <table:table-cell table:style-name="Табела1.A2" office:value-type="string">
            <text:p text:style-name="P2"><text:span text:style-name="T1">B = N + (NnO x 19,9%)<text:line-break/></text:span>0,9 </text:p>
          </table:table-cell>
          <table:table-cell table:style-name="Табела1.A2" office:value-type="string">
            <text:p text:style-name="P2">B = N / 0,701 </text:p>
          </table:table-cell>
          <table:table-cell table:style-name="Табела1.D2" office:value-type="string">
            <text:p text:style-name="P2"><text:span text:style-name="T1">B = N + (NvO x 19,9%)<text:line-break/></text:span>0,9 </text:p>
          </table:table-cell>
        </table:table-row>
        <table:table-row>
          <table:table-cell table:style-name="Табела1.A2" office:value-type="string">
            <text:p text:style-name="P6"/>
          </table:table-cell>
          <table:table-cell table:style-name="Табела1.A2" office:value-type="string">
            <text:p text:style-name="P2"/>
          </table:table-cell>
          <table:table-cell table:style-name="Табела1.A2" office:value-type="string">
            <text:p text:style-name="P2"/>
          </table:table-cell>
          <table:table-cell table:style-name="Табела1.D2" office:value-type="string">
            <text:p text:style-name="P2"/>
          </table:table-cell>
        </table:table-row>
      </table:table>
      <text:p text:style-name="P4">Legenda: </text:p>
      <text:p text:style-name="Text_20_body">B - bruto prihod </text:p>
      <text:p text:style-name="Text_20_body">N - neto prihod </text:p>
      <text:p text:style-name="Text_20_body">NnO - najniža osnovica za obračun i plaćanje doprinosa </text:p>
      <text:p text:style-name="Text_20_body">NvO - najviša osnovica za obračun i plaćanje doprinosa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8-09-14T15:24:22.68</meta:creation-date>
    <dc:date>2024-03-28T15:15:05.072000000</dc:date>
    <meta:editing-duration>PT1H58M6S</meta:editing-duration>
    <meta:editing-cycles>5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22" meta:word-count="257" meta:character-count="1542" meta:non-whitespace-character-count="1272"/>
  </office:meta>
</office:document-meta>
</file>