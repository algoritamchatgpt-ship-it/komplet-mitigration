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  <style:font-face style:name="OpenSans" svg:font-family="OpenSans, Arial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able_20_Contents">
      <style:paragraph-properties fo:margin-top="0cm" fo:margin-bottom="0.499cm" style:contextual-spacing="false" fo:text-align="start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paragraph-rsid="0014440c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start" style:justify-single-word="false"/>
      <style:text-properties fo:color="#000000" loext:opacity="100%" officeooo:paragraph-rsid="0014440c"/>
    </style:style>
    <style:style style:name="P8" style:family="paragraph" style:parent-style-name="Standard">
      <style:paragraph-properties fo:text-align="start" style:justify-single-word="false"/>
      <style:text-properties fo:color="#000000" loext:opacity="100%"/>
    </style:style>
    <style:style style:name="P9" style:family="paragraph" style:parent-style-name="Table_20_Contents">
      <style:paragraph-properties fo:margin-top="0cm" fo:margin-bottom="0.499cm" style:contextual-spacing="false" fo:text-align="start" style:justify-single-word="false"/>
    </style:style>
    <style:style style:name="P10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11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000000" loext:opacity="100%" style:font-name="Open Sans" fo:font-size="13pt" fo:letter-spacing="normal" fo:font-style="normal" fo:font-weight="normal" style:font-size-asian="13pt" style:font-size-complex="13pt"/>
    </style:style>
    <style:style style:name="T1" style:family="text">
      <style:text-properties officeooo:rsid="0014440c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officeooo:rsid="0014440c"/>
    </style:style>
    <style:style style:name="T4" style:family="text">
      <style:text-properties fo:color="#c9211e" loext:opacity="100%" fo:font-weight="bold" style:font-weight-asian="bold" style:font-weight-complex="bold"/>
    </style:style>
    <style:style style:name="T5" style:family="text">
      <style:text-properties fo:color="#c9211e" loext:opacity="100%" fo:font-weight="bold" officeooo:rsid="0014440c" style:font-weight-asian="bold" style:font-weight-complex="bold"/>
    </style:style>
    <style:style style:name="T6" style:family="text">
      <style:text-properties fo:font-variant="normal" fo:text-transform="none" fo:color="#34495e" loext:opacity="100%" style:font-name="OpenSans" fo:font-size="12pt" fo:letter-spacing="normal" fo:font-style="normal" fo:font-weight="normal"/>
    </style:style>
    <style:style style:name="T7" style:family="text">
      <style:text-properties fo:font-variant="normal" fo:text-transform="none" fo:color="#c9211e" loext:opacity="100%" style:font-name="OpenSans" fo:font-size="12pt" fo:letter-spacing="normal" fo:font-style="normal" fo:font-weight="normal"/>
    </style:style>
    <style:style style:name="T8" style:family="text">
      <style:text-properties fo:font-variant="normal" fo:text-transform="none" fo:color="#c9211e" loext:opacity="100%" style:font-name="OpenSans" fo:font-size="12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333333" loext:opacity="100%" style:font-name="Open Sans" fo:font-size="10.5pt" fo:letter-spacing="normal" fo:font-style="normal" fo:font-weight="normal"/>
    </style:style>
    <style:style style:name="T10" style:family="text">
      <style:text-properties fo:font-variant="normal" fo:text-transform="none" fo:color="#333333" loext:opacity="100%" style:font-name="Open Sans" fo:font-size="13pt" fo:letter-spacing="normal" fo:font-style="normal" fo:font-weight="normal" style:font-size-asian="13pt" style:font-size-complex="13pt"/>
    </style:style>
    <style:style style:name="T11" style:family="text">
      <style:text-properties fo:font-variant="normal" fo:text-transform="none" fo:color="#333333" loext:opacity="100%" style:font-name="Times New Roman" fo:font-size="13pt" fo:letter-spacing="normal" fo:font-style="normal" fo:font-weight="normal" style:font-size-asian="13pt" style:font-size-complex="13pt"/>
    </style:style>
    <style:style style:name="T12" style:family="text">
      <style:text-properties fo:font-variant="normal" fo:text-transform="none" fo:color="#333333" loext:opacity="100%" style:font-name="Times New Roman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ffe8bf" loext:opacity="100%" style:font-name="Arial2" fo:font-size="17.25pt" fo:letter-spacing="normal" fo:font-style="normal" fo:font-weight="bold" style:font-size-asian="12pt" style:font-size-complex="12pt"/>
    </style:style>
    <style:style style:name="T14" style:family="text">
      <style:text-properties fo:font-variant="normal" fo:text-transform="none" fo:color="#ffffff" loext:opacity="100%" style:font-name="Arial2" fo:font-size="15.75pt" fo:letter-spacing="normal" fo:font-style="normal" fo:font-weight="bold" style:font-size-asian="12pt" style:font-size-complex="12pt"/>
    </style:style>
    <style:style style:name="T15" style:family="text">
      <style:text-properties fo:font-variant="normal" fo:text-transform="none" fo:color="#ffffff" loext:opacity="100%" style:font-name="Arial2" fo:font-size="15.75pt" fo:letter-spacing="normal" fo:font-style="normal" fo:font-weight="bold" officeooo:rsid="0014440c" style:font-size-asian="12pt" style:font-size-complex="12pt"/>
    </style:style>
    <style:style style:name="T16" style:family="text">
      <style:text-properties fo:font-variant="normal" fo:text-transform="none" fo:color="#ffffff" loext:opacity="100%" style:font-name="Open Sans" fo:font-size="15.75pt" fo:letter-spacing="normal" fo:font-style="normal" fo:font-weight="bold" style:font-size-asian="12pt" style:font-size-complex="12pt"/>
    </style:style>
    <style:style style:name="T17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style:font-name="Arial2" fo:font-size="15.75pt" fo:letter-spacing="normal" fo:font-style="normal" fo:font-weight="bold" officeooo:rsid="0014440c" style:font-size-asian="12pt" style:font-size-complex="12pt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RAČUN NAKNADE PO </text:p>
      <text:p text:style-name="P1">UGOVORU O UČENJU KROZ RAD</text:p>
      <text:p text:style-name="P1"/>
      <text:p text:style-name="P5"><text:tab/><text:span text:style-name="T1">ZAKON O DUALNOM OBRAZOVANJU - </text:span></text:p>
      <text:p text:style-name="P5"/>
      <text:p text:style-name="P7"><text:span text:style-name="T17">Član 34 </text:span></text:p>
      <text:p text:style-name="P8"><text:span text:style-name="T17"/></text:p>
      <text:p text:style-name="P10">Učenik koji obavlja učenje kroz rad ima pravo na naknadu za učenje kroz rad.</text:p>
      <text:p text:style-name="P10">Naknada za učenje kroz rad isplaćuje se jednom mesečno najkasnije do kraja tekućeg meseca za prethodni mesec po svakom satu provedenom na učenju kroz rad u neto visini od najmanje 70% minimalne cene rada u skladu sa zakonom.</text:p>
      <text:p text:style-name="P10">Naknadu za učenje kroz rad poslodavac može isplaćivati i u različitim iznosima po godinama školovanja shodno nivou znanja učenika u rasponu od najmanje 30% od minimalne cene rada po satu neto pa naviše, s tim da ukupna naknada za učenje kroz rad isplaćena na nivou obrazovnog profila mora da iznosi najmanje 70% od minimalne cene rada po satu neto isplaćene za taj period.</text:p>
      <text:p text:style-name="P10">Naknadu iz stava 2. ovog člana snosi poslodavac.</text:p>
      <text:p text:style-name="P10">Ako se učenje kroz rad obavlja u trening centru učenik nema pravo na naknadu iz st. 2. i 3. ovog člana, osim ako se realizuje na zahtev, poslodavca.</text:p>
      <text:p text:style-name="P11"><text:span text:style-name="T20">Pored ugovora o učenju kroz rad, poslodavac može sa učenikom, odnosno njegovim roditeljem ili drugim zakonskim zastupnikom da zaključi i ugovor o</text:span> stipendiranju.</text:p>
      <text:p text:style-name="P8"/>
      <text:p text:style-name="P1"/>
      <text:p text:style-name="P2"><text:tab/><text:span text:style-name="T4">NE </text:span><text:span text:style-name="T5">PLAĆA SE POREZ.</text:span></text:p>
      <text:p text:style-name="P2"><text:tab/>NAJDUŽE 6 h DNEVNO – 30 h NESELJNO</text:p>
      <text:p text:style-name="P2"><text:tab/>DOPRINOSI NA NAJNIŽU OSNOVICU MESEČNO, odnosno ugovorena naknada ako se ostvaruje i ako je viša od najniže mesečne osnovice doprinosa. <text:span text:style-name="Strong_20_Emphasis">Kada je period za koji se obračunava doprinos kraći od mesec dana (npr. učenici provode kod poslodavca na učenju kroz rad samo nekoliko dana u toku meseca), obračun doprinosa se vrši na srazmerni iznos najniže mesečne osnovice doprinosa, za konkretan mesec</text:span>. </text:p>
      <text:p text:style-name="P2"><text:tab/>NETO – 70% od minimalne <text:span text:style-name="T1">cene rada</text:span>.</text:p>
      <text:p text:style-name="P2"><text:tab/>PIO – 4% - do 5. u mesecu za prethodni mesec.</text:p>
      <text:p text:style-name="P2"><text:tab/>ZDR – 2% - do 5. u mesecu za prethodni mesec.</text:p>
      <text:p text:style-name="P2"><text:span text:style-name="Strong_20_Emphasis">Zakon propisuje da učenik ima pravo na mesečnu naknadu za učenje kroz rad u neto iznosu od najmanje 70 odsto od minimalne cene rada koju isplaćuje poslodavac. </text:span></text:p>
      <text:p text:style-name="P2"><text:span text:style-name="Strong_20_Emphasis"/></text:p>
      <text:p text:style-name="P2"><text:span text:style-name="Strong_20_Emphasis">Obveznik plaćanja doprinosa je poslodavac kao lice kod koga se učenik nalazi na učenju kroz rad u sistemu dualnog obrazovanja. </text:span></text:p>
      <text:p text:style-name="P2"><text:span text:style-name="Strong_20_Emphasis"><text:tab/>Primaoc 05 - <text:s text:c="2"/></text:span></text:p>
      <text:p text:style-name="P2"><text:span text:style-name="Strong_20_Emphasis"><text:tab/>Šifra prihoda je 620 ( 999 ) – Doprinosi za PIO za slučaj invalidnosti i telesnog oštećenja po osnovu povrede na radu i profesionalne bolesti i doprinos za zdravstveno osiguranje. </text:span><text:span text:style-name="Strong_20_Emphasis"><text:span text:style-name="T7">1 05 620 00 0</text:span></text:span><text:span text:style-name="Strong_20_Emphasis"> </text:span></text:p>
      <text:p text:style-name="P3"><text:span text:style-name="Strong_20_Emphasis"><text:tab/>U programu prilagoditi parametre zarade, UNETI VAŽEĆU NAJNIŽU OSNOVICU, obrisati porez i raditi kao obračun kroz </text:span><text:span text:style-name="Strong_20_Emphasis"><text:span text:style-name="T2">UGOVOR O DELU</text:span></text:span><text:span text:style-name="Strong_20_Emphasis">. OBRAČUN BRUTO, CENA RADA JE UGOVORENA ZARADA. </text:span></text:p>
      <text:p text:style-name="P3"><text:span text:style-name="Strong_20_Emphasis"><text:tab/></text:span><text:span text:style-name="Strong_20_Emphasis"><text:span text:style-name="T8">Popunjavaju se polja 3.7; 3.8 i <text:s/>3.8.a; 3.12; 3.13 ;3.14</text:span></text:span></text:p>
      <text:p text:style-name="P3"><text:span text:style-name="Strong_20_Emphasis"><text:tab/>U PPP PD – OBRISATI BRUTO I PREDATI PRIJAVU.</text:span></text:p>
      <text:p text:style-name="P3"><text:soft-page-break/><text:span text:style-name="Strong_20_Emphasis"><text:tab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  <style:font-face style:name="OpenSans" svg:font-family="OpenSans, Arial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zxx" fo:country="none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zxx" fo:country="none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zef Brnić</meta:initial-creator>
    <meta:creation-date>2019-10-10T10:20:50.21</meta:creation-date>
    <dc:date>2025-07-02T15:00:20.462000000</dc:date>
    <meta:editing-duration>PT7H34M28S</meta:editing-duration>
    <meta:editing-cycles>3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24" meta:word-count="415" meta:character-count="2461" meta:non-whitespace-character-count="2038"/>
  </office:meta>
</office:document-meta>
</file>