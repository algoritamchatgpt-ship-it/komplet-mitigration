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govoru o stručnom osposobljavanju <text:span text:style-name="T1">bez naknade </text:span></text:p>
      <text:p text:style-name="Standard"/>
      <text:p text:style-name="Standard"/>
      <text:p text:style-name="Standard"/>
      <text:p text:style-name="Standard"><text:tab/>Obračun doprinosa za PIO 4% i doprinosa za zdravsvo 2%, na najnižu osnovicu, po Ugovoru o stručnom osposobljavanju <text:span text:style-name="T1">bez naknade.</text:span> OPJ – 6 – unesu se procenti za PIO i zdravstvo. Polje NETO popuni se preračunatim iznosom prema važećoj najnižoj osnovici. Trenutna osnovica je 23 053,00 pa je neto 21 669,82. U PPP PD prijavi se nakon preuzimanja<text:span text:style-name="T1"> BRIŠE OSNOVICA ZA POREZ. Šifra prihoda je 1 05 620 000.</text:span></text:p>
      <text:p text:style-name="Standard"><text:span text:style-name="T1"/></text:p>
      <text:p text:style-name="Standard"><text:span text:style-name="T1"/></text:p>
      <text:p text:style-name="P1"><text:span text:style-name="T2">Ugovoru o stručnom osposobljavanju</text:span><text:span text:style-name="T1"> sa naknadom </text:span></text:p>
      <text:p text:style-name="P1"><text:span text:style-name="T1"/></text:p>
      <text:p text:style-name="P1"><text:span text:style-name="T1"/></text:p>
      <text:p text:style-name="P2"><text:span text:style-name="T1"><text:tab/></text:span><text:span text:style-name="T2">Obračun poreza 20%, doprinosa za PIO 4% i doprinosa za zdravsvo 2% , <text:s text:c="2"/>po Ugovoru o stručnom osposobljavanju </text:span><text:span text:style-name="T1">sa naknadom.</text:span><text:span text:style-name="T2"> OPJ – 6 – unesu se procenti za porez, PIO i zdravstvo. Popunite polje NETO iznos. </text:span><text:span text:style-name="T1"><text:s/>Šifra prihoda je 1 05 999 000.</text:span></text:p>
      <text:p text:style-name="P1"><text:span text:style-name="T1"/></text:p>
      <text:p text:style-name="P1"><text:span text:style-name="T1"/></text:p>
      <text:p text:style-name="Standard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one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none" fo:country="non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Title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ozef Brnić</meta:initial-creator>
    <meta:creation-date>2018-12-19T15:01:26.64</meta:creation-date>
    <meta:document-statistic meta:table-count="0" meta:image-count="0" meta:object-count="0" meta:page-count="1" meta:paragraph-count="4" meta:word-count="124" meta:character-count="728"/>
    <dc:date>2018-12-19T15:11:45.78</dc:date>
    <dc:creator>Jozef Brnić</dc:creator>
    <meta:editing-duration>PT10M19S</meta:editing-duration>
    <meta:editing-cycles>1</meta:editing-cycles>
    <meta:generator>OpenOffice/4.1.1$Win32 OpenOffice.org_project/411m6$Build-9775</meta:generator>
  </office:meta>
</office:document-meta>
</file>