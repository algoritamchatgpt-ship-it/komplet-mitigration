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11b298"/>
    </style:style>
    <style:style style:name="T2" style:family="text">
      <style:text-properties officeooo:rsid="00134e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UTSTVO ZA OBRAČUN PREVOZA</text:p>
      <text:p text:style-name="P1">ZAPOSLENIH</text:p>
      <text:p text:style-name="P1"/>
      <text:p text:style-name="P2"><text:tab/>U EVIDENCIJI ZAPOSLENIH u KARTICI F7 unesite * ZVEZDICU u polje PREVOZ. Možete i kroz tabelu uneti ovaj podatak - kliknite na dugme OTVORI TABELU i u kolonu PREVOZ unesite * ZVEZDICU <text:s/>kod zaposlenih kojima plaćate prevoz. Izađite iz evidencije zaposlenih pa kliknite na dugme</text:p>
      <text:p text:style-name="P2">PREVOZ – Kolona sasvim desno četvrto dugme na dole. Pred vama je sada prazna tabela za obračun prevoza. Ispod tabele su funkcionalni dugmići za unos podataka i obračun. Kliknite na dugme </text:p>
      <text:p text:style-name="P2">PRUZMI IZ SPISKA<text:tab/>- Preuzeli ste zaposlene koje ste u evidenciji zaposlenih obeležili zvezdicom u koloni prevoz. Kliknite sada na dugme </text:p>
      <text:p text:style-name="P2">POPUNJAVANJE – Otvorili ste pomoćnu tabelu POPUNJAVANJE KOLONE POPUNJAVANJE PODATAKA. Popunite polja datim redosledom. </text:p>
      <text:p text:style-name="P2">DANA U MESECU – Broj dana za koji zaposlenom plaćate prevoz.</text:p>
      <text:p text:style-name="P2">DNEVNA KARTA – Cena karte za jedan dan.</text:p>
      <text:p text:style-name="P2">NEOPOREZIVO – Trenutno važeći neoporezivi iznos za prevoz zaposlenih.</text:p>
      <text:p text:style-name="P2">DATUM – Datum obračuna.</text:p>
      <text:p text:style-name="P2">MESEC – Broj meseca za koji radite obračun prevoza.</text:p>
      <text:p text:style-name="P2">NAZIV - Naziv meseca za koji radite obračun prevoza.</text:p>
      <text:p text:style-name="P2"><text:tab/>Sada kliknite na dugme </text:p>
      <text:p text:style-name="P2">UNOS - pa kliknite mišem na </text:p>
      <text:p text:style-name="P2">ŠIFRA PRIHODA i potvrdite enterom na tastaturi. Sada kliknite mišem na</text:p>
      <text:p text:style-name="P2">BROJ - prvog zaposlenog u spisku i potvrdite unos podataka tasterom </text:p>
      <text:p text:style-name="P2">ENTER - do kraja spiska. Pronađite sada kolonu </text:p>
      <text:p text:style-name="P2">ISPLATA - i unesite redni broj isplate kod svih zaposlenih. </text:p>
      <text:p text:style-name="P2"><text:tab/>Ukoliko imate različite cene karata za prevoz ili različit broj dana za koje plaćate prevoz za pojedine radnike, kroz tabelu, izmenite podatak u odgovarajućem polju i potvrdite, enterom na tastaturi, unos podatka. <text:span text:style-name="T1">Ceo neoporezivi iznos koristite za zaposlene koji imaju pun fond časova, odnosno pun broj dana prisustva u datom mesecu. Srazmerni iznos neoporezivog dela morate utvrditi prema broju dana na koji zaposleni ima pravo na naknadu za prevoz u odnosu na broj radnih dana u mesecu. Utvrđeni iznos unosite u polje kolone NEOPOREZIVO.</text:span></text:p>
      <text:p text:style-name="P2"><text:tab/>Završili ste obračun. Sada ispod tabele pronađite dugme </text:p>
      <text:p text:style-name="P2">SAČUVAJ – kliknite na njega da bi ste sačuvali obračun. Ovaj korak je neophodan da bi ste mogli da preuzmete podatke u PPP – PD. Kliknite na </text:p>
      <text:p text:style-name="P2">IZLAZ. Sada kliknite na dugme </text:p>
      <text:p text:style-name="P2">SPISAK da formirate spisak za isplatu prevoza zaposlenih. Ukoliko je tabela SPISKA popunjena prvo kliknite na dugme </text:p>
      <text:p text:style-name="P2">BRIŠI, a zatim na dugme </text:p>
      <text:p text:style-name="P2">PRENOS PREVOZA. Ukoliko zaposlenima prevoz isplaćujete na tekuće tačune, iz ovog spiska ćete kasnije povući podatke za naloge. Zaposlene morate uneti u šifrarnik partnera, a šifre zaposlenih iz šifrarnika partnera morte uneti u kroz evidencuju zaposlenih u KARTICI F7 <text:s/>polje ŠIFRA BANKE.</text:p>
      <text:p text:style-name="P1"/>
      <text:p text:style-name="P1">PRIJAVA PPP – PD </text:p>
      <text:p text:style-name="P1">za prevoz</text:p>
      <text:p text:style-name="P1"/>
      <text:p text:style-name="P2"><text:tab/>Izađite u GLAVNI MENI i kliknite na dugme </text:p>
      <text:p text:style-name="P2">IV XML-TXT zatim na dugme </text:p>
      <text:p text:style-name="P2">1.XML ZATI zatim na dugme</text:p>
      <text:p text:style-name="P2">PORESKA PRIJAVA PPP-PD i otvorili ste </text:p>
      <text:p text:style-name="P2">PODMENI PPP-PD sada kliknite na dugme </text:p>
      <text:p text:style-name="P2"><text:soft-page-break/>PARAMETRI i popunite potrebne podatke. Redni broj isplate i mesec moraju da budu isti kao i u obračunu prevoza. Polja broj dana i fond sati ne popunjavate. Kliknite sada na </text:p>
      <text:p text:style-name="P2">IZLAZ pa na dugme PORESKA PRIJAVA PPP-PD. Sada ste u tabeli </text:p>
      <text:p text:style-name="P2">PREUZIMANJE ZARADA I PPP-PD . Ukoliko je tabela popunjena kliknite na dugme </text:p>
      <text:p text:style-name="P2">BRIŠI SVE, pa na dugme </text:p>
      <text:p text:style-name="P2">PARAMETRI PRENOSA. Ukoliko je tabela prazna kliknite na dugme </text:p>
      <text:p text:style-name="P2">PARAMETRI PRENOSA. Otvoili ste tabelu PARAMETRI PRENOSA. Kliknite na dugme </text:p>
      <text:p text:style-name="P2">BRIŠI SVE pa na dugme </text:p>
      <text:p text:style-name="P2">DODAJ SVE . Sada u tabeli kliknite na red </text:p>
      <text:p text:style-name="P2">PREVOZ RADNIKA i unesite podatak </text:p>
      <text:p text:style-name="P2">ISPLATA - <text:s/>broj isplate i </text:p>
      <text:p text:style-name="P2">MESEC – broj meseca. Ovi podaci moraju da budu isti kao u obračunu prevoza. Kliknite na </text:p>
      <text:p text:style-name="P2">KRSIĆ da bi ste se vratili u tabelu PREUZIMANJE ZARADA I PPP-PD. Kliknite na dugme PREUZMI ZARADE. Dobili ste podatke iz obračuna prevoza. Ukoliko ima zaposlenih kod kojih je iznos prevoza manji od neoporezivog iznosa, <text:span text:style-name="T2">porez je u minusu</text:span>, njih brišete. Obavezno popravite redne brojeve u prijavi, u kojoj ste brisali zaposlene. Sada kliknite na dugme NAPRAVI XML i predajte prijavu. </text:p>
      <text:p text:style-name="P2"><text:tab/>Nakon preuzimanja naloga za uplatu poreza sa poreske u VIRMANIMA preuzmite naloge za isplatu prevoza. </text:p>
      <text:p text:style-name="P2"><text:tab/></text:p>
      <text:p text:style-name="P2"><text:tab/> <text:s/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02-20T11:33:11.28</meta:creation-date>
    <dc:date>2023-12-04T12:40:34.347000000</dc:date>
    <meta:editing-duration>PT3H25M26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622" meta:character-count="3908" meta:non-whitespace-character-count="3274"/>
  </office:meta>
</office:document-meta>
</file>