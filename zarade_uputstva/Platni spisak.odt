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1f26c6"/>
    </style:style>
    <style:style style:name="T3" style:family="text">
      <style:text-properties fo:color="#c9211e" loext:opacity="100%"/>
    </style:style>
    <style:style style:name="T4" style:family="text">
      <style:text-properties fo:color="#c9211e" loext:opacity="100%" officeooo:rsid="001f26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BELA ZA OBRAČUN ZARADA</text:p>
      <text:p text:style-name="P4"/>
      <text:p text:style-name="P1"/>
      <text:p text:style-name="P1"><text:tab/><text:span text:style-name="T1">NAZIVI I FUNKCIJE FUNKCIONALNIH DUGMADI ISPOD TABELE</text:span></text:p>
      <text:p text:style-name="P3"/>
      <text:p text:style-name="P1"><text:tab/></text:p>
      <text:p text:style-name="P1"><text:tab/>Dugmad <text:span text:style-name="T1">GORE, DOLE, ZADNJI I PRVI</text:span> služe za kretanje kroz tabelu.</text:p>
      <text:p text:style-name="P1"/>
      <text:p text:style-name="P1"><text:tab/>Dugmad <text:span text:style-name="T1">TRAŽI IME F4, TRAŽI EVIDENCIONI BROJ F5 i TRAŽI ŠIFRU F6 </text:span>služe za pretragu podataka. Možete kliknuti mišem na dugme ili koristiti funcionalnu dugmad sa tastature. Tasterom ENTER na tastaturi potvrdite podatak koji ste uneli da bi ste dobili rezultat pretrage.</text:p>
      <text:p text:style-name="P1"/>
      <text:p text:style-name="P1"><text:tab/><text:span text:style-name="T1">OBRAČUN BRUTO – F10</text:span> – klikom miša otvarate prozor OBRAČUN PLATA ( zarada ). Bela polja popunjavte datim redosledom. CENA RADA - unosite BRUTO iznos cene rada. Ovo polje zadržava podatke iz prethodnog obračuna – menjate ga prema potrebi. GRUPA – popunjavate ga ukoliko ste radnike razvrstali u različite grupe u EVIDENCIJI RADNIKA kroz kolonu GRUPA i imate <text:span text:style-name="T1">različite cene rada </text:span>za te grupe. Samo u tom slučaju, nakon obračuna za jednu grupu sa jednom cenom rada, ponovićete obračun sa drugom cenom rada za drugu grupu itd. shodno broju grupa. Ukoliko nemate grupe ovo polje ne popunjavete. Polje OBRAČUNATI NAKNADE obeleženo je slovom N. Ukoliko nemate naknade ostaje slovo N u ovom polju. Ukoliko ste uradili poseban OBRAČUN NAKNADA u ovom polju mora da ostane slovo N, da bi program automatski uzeo u obzir različite osnovice, za zaposlene kojima je potrebno obračunati časove naknada, iz tog obračuna. Ukoliko hoćete obračun naknada po zadatoj ceni rada unesite slovo D u ovo polje. OBRAČUNATI OD UKUPNE OBAVEZE – uvek ostaje slovo N. IZNOS ZARADE BEZ DOPRINOSA – podatak se automatski prenosi iz PARAMETARA 2, trenutno se ne koristi, zato što ne postoji propisan iznos zarade na koju se ne obračunavaju doprinosi, polje ostaje nepopunjeno. IZNOS ZARADE BEZ POREZA - podatak se automatski prenosi iz PARAMETARA 2, unosi se trenutno važeći propisani neoporezivi iznos. POTVRĐUJEM – klikom na ovo dugme dajete komandu za obračun. Klikom na dugme ODUSTAJEM vraćate se u tabelu ukoliko hoćete da promenite neki podatak u tabeli. Ukoliko radite jednu isplatu za obračun, kao konačnu, možete obračun ponavljati bezbroj puta. Ukoliko radite drugu, treću, četvrtu ili petu isplatu NIKADA NEMOJTE PONAVLJATI OBRAČUN zato što time gubite podatke iz obračuna prethodne isplate. Naš savet za sve one koji rade više isplata za jedan obračun je da urade arhivu podatka iz programa, GLAVNI MENI &gt; ODRŽAVANJE &gt; ARHIVIRANJE, pre izrade druge i svake sledeće isplate. Time obezbeđujete podatke prethodne isplate koju onda naš programer može da povuče ponovo ukoliko bude potrebno.</text:p>
      <text:p text:style-name="P1"><text:s/></text:p>
      <text:p text:style-name="P1"><text:tab/><text:span text:style-name="T1">OBRAČUN NETO –</text:span><text:span text:style-name="T3"> </text:span><text:span text:style-name="T4">SAMO ZA BUDŽETSKE KORISNIKE.</text:span><text:span text:style-name="T2"> </text:span>Klikom miša na ovo dugme otvarate prozor OBRAČUN ZARADE SA NETA NA BRUTO. Bela polja popunjavte datim redosledom. CENA RADA - unosite NETO iznos cene rada. Ovo polje zadržava podatke iz prethodnog obračuna – menjate ga prema potrebi. GRUPA – popunjavate ga ukoliko ste radnike razvrstali u različite grupe u EVIDENCIJI RADNIKA kroz kolonu GRUPA i imate <text:span text:style-name="T1">različite cene rada </text:span>za te grupe. Samo u tom slučaju, nakon obračuna za jednu grupu sa jednom cenom rada, ponovićete obračun sa drugom cenom rada za drugu grupu itd. shodno broju grupa. Ukoliko nemate grupe ovo polje ne popunjavete. Polje OBRAČUNATI NAKNADE obeleženo je slovom N. Ukoliko nemate naknade ostaje slovo N u ovom polju. Ukoliko ste uradili poseban OBRAČUN NAKNADA u ovom polju mora da ostane slovo N, da bi program automatski uzeo u obzir različite osnovice, za zaposlene kojima je potrebno obračunati časove naknada, iz tog obračuna. Ukoliko hoćete obračun naknada po zadatoj ceni rada unesite slovo D u ovo polje. OBRAČUNATI OD UKUPNE OBAVEZE – uvek ostaje slovo N. <text:s/>GRUPA – popunjavate ga ukoliko ste radnike razvrstali u različite grupe u EVIDENCIJI RADNIKA kroz kolonu GRUPA i imate <text:span text:style-name="T1">različite cene </text:span><text:soft-page-break/><text:span text:style-name="T1">rada </text:span>za te grupe. Samo u tom slučaju, nakon obračuna za jednu grupu sa jednom cenom rada, ponovićete obračun sa drugom cenom rada za drugu grupu itd. shodno broju grupa. Ukoliko nemate grupe ovo polje ne popunjavete. PO SATU - <text:s/>podatak se automatski prenosi iz PARAMETARA 1 i možete ga menjati prema potrebi. Ukoliko radite obračun zarade sa cenom rada po satu polje cena rada ostaje prazno. Klikom na dugme DODAJ MINULI RAD dajete komandu za obračun zarada. Klikom na dugme IZLAZ vraćate se u tabelu ukoliko hoćete da promenite neki podatak u tabeli. Ukoliko radite jednu isplatu za obračun, kao konačnu, možete obračun ponavljati bezbroj puta. Ukoliko radite drugu, treću, četvrtu ili petu isplatu NIKADA NEMOJTE PONAVLJATI OBRAČUN zato što time gubite podatke iz <text:s/>obračuna prethodne isplate. Naš savet za sve one koji rade više isplata za jedan obračun je da urade arhivu podatka iz programa, GLAVNI MENI &gt; ODRŽAVANJE &gt; ARHIVIRANJE, pre izrade druge i svake sledeće isplate. Time obezbeđujete podatke prethodne isplate koju onda naš programer može da povuče ponovo ukoliko bude potrebno. Klikom na dugme ODUZMI MINULI RAD dajete komandu za NETO obračun zarada samo u slučaju da obračun radite sa cenom rada u koju je uračunat minuli rad. </text:p>
      <text:p text:style-name="P1"><text:tab/><text:span text:style-name="T1">OBRAČUN NETO STARI</text:span> – Ne koristi se taj način obračuna.</text:p>
      <text:p text:style-name="P1"><text:tab/><text:span text:style-name="T1">SPISAK – TREZOR OD NETA</text:span> – Sadrži bruto podatke po zaposlenom koje možete štampati. Samo za budžetske korisnike.</text:p>
      <text:p text:style-name="P1"><text:tab/><text:span text:style-name="T1">SPISAK – TREZOR OD BRUTA</text:span> - Sadrži neto podatke po zaposlenom koje možete štampati. Samo za budžetske korisnike.</text:p>
      <text:p text:style-name="P1"><text:tab/><text:span text:style-name="T1">KARTICA F7</text:span> – Klikom na ovo dugme otvarate KARTICU RADNIKA KOJA sadrži pregled podatka relevantnih za obračun i podatke iz obračuna. U sivom polju uneta je šifra ranika, sledeće sivo polje sarži ime i prezime radnika, u žutim poljima su podaci za start bod, staž i stepen stručne spreme. Ove podatke ste automatski preneli iz EVIDENCIJE ZAPOSLENIH kroz UNOS RADNIKA u platni spisak. </text:p>
      <text:p text:style-name="P1"><text:tab/>Kolona VRSTA PRIMANJA sadrži nazive primanja koja možete uneti u karticu ili ih menjati. U kolonu ČASOVI, UNOSOM ČASOVA automatski ste uneli u platni spisak časove PO VREMENU, PO UČINKU i časove praznika ( ukoliko ih ima u datom mesecu i unešeni su u PARAMETRIMA 2 ) iz PARAMETARA 2. </text:p>
      <text:p text:style-name="P1"><text:tab/>Časove za određeno primanje možete uneti u bela polja iza naziva primanja. </text:p>
      <text:p text:style-name="P1"><text:tab/>DORUČAK je polje u koje unosite vreme koje zaposleni provode na pauzi – doručak, ručak itd., ali obavezno za taj iznos umanjujete iznos časova po učinku. <text:span text:style-name="T1">Časovi iz ovog polja ulaze u ukupan broj časova. </text:span></text:p>
      <text:p text:style-name="P1"><text:tab/>MINULI RAD se obračunava automatski na osnovu izbora načina obračuna minulog rada iz PARAMETARA 1. </text:p>
      <text:p text:style-name="P1"><text:tab/>NOĆNI RAD – unosite broj časova noćnog rada ukoliko ih ima. Napomena: časovi noćnog rada su već sadržani u časovima po vremenu i učinku, u PARAMETRIMA 1 u polju za NOĆNI RAD unet je procenat 26%. Za ove časove program obračunava samo procenat uvećanja od 26 %. <text:span text:style-name="T1">Časovi iz ovog polja ne ulaze u ukupan broj časova. </text:span></text:p>
      <text:p text:style-name="P1"><text:tab/>PRODUŽEN RAD – unosite broj časova produženog rada ukoliko ih ima. Za ove časove program obračunava samo procenat uvećanja od 26 %, tako da časovi produženog rada moraju biti sadržani i u broju časova po učinku. <text:span text:style-name="T1">Časovi iz ovog polja ne ulaze u ukupan broj časova.</text:span> </text:p>
      <text:p text:style-name="P1"><text:tab/>PRAZNIK, ukoliko niste uneli časove praznika kroz PARAMETRE 1, unosite broj časova praznika ukoliko ih ima i za taj iznos umanjujete časove po učinku kod svakog zaposlenog. <text:span text:style-name="T1">Časovi iz ovog polja ulaze u ukupan broj časova. </text:span></text:p>
      <text:p text:style-name="P1"><text:tab/>RAD NEDELJOM - <text:s/>unosite broj časova RADA NEDELJOM ukoliko ih ima. Za ove časove program obračunava 110 % od cene rada po času, tako da časovi rada nedeljom moraju biti sadržani i u <text:s/>broju časova po učinku. <text:span text:style-name="T1">Časovi iz ovog polja ne ulaze u ukupan broj časova. </text:span></text:p>
      <text:p text:style-name="P1"><text:tab/>BOLOVANJE - unosite broj časova bolovanja do 30 dana, koja obračunavate na 65%, ukoliko ih ima i za taj broj umanjujete časove po učinku. <text:span text:style-name="T1">Časovi iz ovog polja ulaze u ukupan broj časova. </text:span></text:p>
      <text:p text:style-name="P1"><text:tab/>BOLOVANJE 100% <text:s/>unosite broj časova bolovanja do 30 dana, koja obračunavate na 100%, ukoliko ih ima i za taj broj umanjujete časove po učinku. <text:span text:style-name="T1">Časovi iz ovog polja ulaze u </text:span><text:soft-page-break/><text:span text:style-name="T1">ukupan broj časova. </text:span></text:p>
      <text:p text:style-name="P1"><text:tab/>PLAĆENO ODSUSTVO unosite broj časova plaćenog odsustva, koje obračunavate na 80%, ukoliko ih ima <text:s/>i za taj iznos umanjujete časove po učinku. <text:span text:style-name="T1">Časovi iz ovog polja ulaze u ukupan broj časova. </text:span></text:p>
      <text:p text:style-name="P1"><text:tab/>PLAĆENO ODSUSTVO 100% unosite broj časova plaćenog odsustva, koje obračunavate na 100%, ukoliko ih ima i za taj iznos umanjujete časove po učinku. <text:span text:style-name="T1">Časovi iz ovog polja ulaze u ukupan broj časova. </text:span></text:p>
      <text:p text:style-name="P1"><text:tab/>GODIŠNJI ODMOR - unosite broj časova godišnjeg odmora i za taj iznos umanjujete časove po učinku. <text:span text:style-name="T1">Časovi iz ovog polja ulaze u ukupan broj časova. </text:span></text:p>
      <text:p text:style-name="P1"><text:tab/>RAD NA PRAZNIK - <text:s/>unosite broj časova rada na praznik. Kod zaposlenog koji je radio na praznik ne unosite časove praznika, istovremeno ti časovi ulaze u časove po učinku. <text:span text:style-name="T1">Časovi iz ovog polja ne ulaze u ukupan broj časova. </text:span></text:p>
      <text:p text:style-name="P1"><text:tab/>SLUŽBENI PUT <text:s/>je polje koje se koristi u obračunu za isplate preko neoporezivog iznosa. Deo zarade koji prelazi neoporezivi iznos morate prilagoditi vašoj ceni rada i preračunati časove. <text:tab/>NEPLAĆENO - unosite broj časova neplaćenog odsustvai za taj iznos umanjujete časove po učinku. </text:p>
      <text:p text:style-name="P1"><text:tab/>OSTALA PRIMANJA 1, 2 i 3 unosite broj časova za ostala primanja za koja ste prethodno izvršili preračun u skladu sa VAŠOM CENOM RADA PO ČASU. </text:p>
      <text:p text:style-name="P1"><text:tab/>FIKSNA PLATA – unosi se iznos zarade koji nije moguće uklopiti u prethodne opcije, a <text:s/>na koji treba obračunati porez i doprinose. Ukoliko radite bruto obračun unosi se bruto podatak, a za neto obračun unosite neto podatak. </text:p>
      <text:p text:style-name="P1"><text:tab/>TOPLI OBROK - <text:s/>unosi se ukupni iznos toplog obroka za dati mesec, bruto ili neto podatak, u skladu sa tim da li radite bruto ili neto obračun. </text:p>
      <text:p text:style-name="P1"><text:tab/>REGRES ZA GODIŠNJI ODMOR – unosite iznos regresa za dati mesec, bruto ili neto podatak, u skladu sa tim da li radite bruto ili neto obračun. Za unos regresa i toplog obroka možete koristiti i automatski programski unos kroz opciju PRENOSI &gt; TOPLI OBROK I REGRES &gt; unesete iznose &gt; OBRAČUN. </text:p>
      <text:p text:style-name="P1"><text:tab/>TERENSKI DODATAK – unosite iznos terenskog dodatka bruto ili neto podatak, u skladu sa tim da li radite bruto ili neto obračun. </text:p>
      <text:p text:style-name="P1"><text:tab/>Polja UKUPNO <text:s/>se automatski pune iznosima nakon obračuna. </text:p>
      <text:p text:style-name="P1"><text:tab/>U polja STIMULAC 1, 2, 3 unosite procenat stimulacije iz rešenja o stimulaciji. Polja <text:tab/>DRUGA NETO PRIMANJA I SOLIDARNI POREZ se trnutno ne koriste. </text:p>
      <text:p text:style-name="P1"><text:tab/>NETO UMANJEN <text:s/>automatski se puni iznosom nakon obračuna.</text:p>
      <text:p text:style-name="P1"><text:tab/>Kolona PRIMANJA se automatski puni iznosima nakon obračuna, za ona primanja za koje ste uneli časove. </text:p>
      <text:p text:style-name="P1"><text:tab/>SUSPENZIJA – unosite česove suspenzije sa predznakom minus. PROCENAT SUSPENZIJE se unosi u PARAMETRIMA 1.</text:p>
      <text:p text:style-name="P1"><text:tab/>DOTACIJA SVE VRSTE – <text:s/>automatski puni iznosima nakon obračuna, sa dotacijom.</text:p>
      <text:p text:style-name="P1"><text:tab/>NAKNADE I DODACI - automatski se puni iznosima nakon obračuna.</text:p>
      <text:p text:style-name="P1"><text:tab/>ZARADA POREZI I DOPRINOSI:</text:p>
      <text:p text:style-name="P1">-BRUTO ZARADA, POREZ, DOPRINOSI RADNIKA – PIO, ZDRAVSTVO, NEZAPOSLENOST, DOPRINOSI FIRME – PIO, ZDRAVSTVO, NEZAPOSLENOST, NETO ZARADA, NETO + PRVOZ - <text:s/>automatski se puni iznosima nakon obračuna. <text:s/>Polja DRUGA NETO PRIMANJA I SOLIDARNI POREZ se trnutno ne koriste. NETO UMANJEN <text:s/>automatski se puni iznosom nakon obračuna. PREVOZ RADNIKA se ne koristi. PORESKO OSLOBOĐENJE, OSNOVICA DOPRINOSA i PROPISANA OSNOVICA automatski se pune iznosima nakon obračuna. </text:p>
      <text:p text:style-name="P1"><text:tab/>Kolona VRSTA OBUSTAVE</text:p>
      <text:p text:style-name="P1"><text:tab/>KREDITI – automatski unos kroz PRENOS KREDITA.</text:p>
      <text:p text:style-name="P1"><text:tab/>KREDITI NA AKONTACIJU - automatski unos kroz PRENOS KREDITA.</text:p>
      <text:p text:style-name="P1"><text:tab/>AKONTACIJA - <text:s/>automatski unos kroz PRENOS AKONTACIJE.</text:p>
      <text:p text:style-name="P1"><text:tab/>PREVOZ - ne koristi se.</text:p>
      <text:p text:style-name="P1"><text:soft-page-break/><text:tab/>ALIMENTACIJA – automatski unos nakon obračuna prema podacima koje ste uneli u EVIDENCIJI ZAPOSLENIH.</text:p>
      <text:p text:style-name="P1"><text:tab/>KASA - automatski unos nakon obračuna prema podacima koje ste uneli u EVIDENCIJI ZAPOSLENIH.</text:p>
      <text:p text:style-name="P1"><text:tab/>RATA KASE - automatski unos nakon obračuna prema podacima koje ste uneli u EVIDENCIJI ZAPOSLENIH.</text:p>
      <text:p text:style-name="P1"><text:tab/>SINDIKAT 1 - automatski unos nakon obračuna prema podacima koje ste uneli u EVIDENCIJI ZAPOSLENIH.<text:tab/></text:p>
      <text:p text:style-name="P1"><text:tab/>SINDIKAT 2 - automatski unos nakon obračuna prema podacima koje ste uneli u EVIDENCIJI ZAPOSLENIH.</text:p>
      <text:p text:style-name="P1"><text:tab/>SOLIDARNOST - automatski unos nakon obračuna prema podacima koje ste uneli u EVIDENCIJI ZAPOSLENIH.</text:p>
      <text:p text:style-name="P1"><text:tab/>SAMODOPRINOS - automatski unos nakon obračuna prema podacima koje ste uneli u EVIDENCIJI ZAPOSLENIH.</text:p>
      <text:p text:style-name="P1"><text:tab/>Ostale obaveze polja OSTALEOB.1, 2, 3, 4, 5 i 6 <text:s/>imaće nazive koje ste odredili u PARAMETRIMA 2 ukoliko ste ih odredili. <text:span text:style-name="T1">Unosite iznose obustava</text:span> koje imate pre obračuna.</text:p>
      <text:p text:style-name="P1"><text:tab/>Polja UKUPNE OBUSTVE, ZA ISPLATU, UMANJENJE, PORUMANJ, DOPUMANJ, POREZS i POREZU automatski unos nakon obračuna prema podacima koje ste uneli za datu isplatu. <text:s text:c="11"/></text:p>
      <text:p text:style-name="P1"><text:tab/> </text:p>
      <text:p text:style-name="P1"><text:tab/><text:span text:style-name="T1">JEDAN LISTIĆ S+F3</text:span> – Klikom miša u polje sa imenom i prezimenom radnika, a zatim klikom na ovo dugme otvarate Obrazac OZ za datog radnika. Imate mogućnost štampe. </text:p>
      <text:p text:style-name="P1"><text:tab/><text:span text:style-name="T1">SVI LISTIĆI S+F4</text:span> – Klikom miša na ovo dugme dobijate Obrazac OZ za sve zaposlene i imate mogućnosz štmpe.</text:p>
      <text:p text:style-name="P1"><text:tab/><text:span text:style-name="T1">DEVIZNI DOPRINOSI</text:span> – Klikom na ovo dugme otvarate prozor za prerčun doprinosa u devize. Unosite kurs i datum, a zatim kliknete mišem na dugme šatmpaj. Dobili ste IZVEŠTAJ O DEVIZNIM DOPRINOSIMA. </text:p>
      <text:p text:style-name="P1"><text:tab/><text:span text:style-name="T1">LISTIĆ NETO BRUTO</text:span> – Klikom miša u polje sa imenom i prezimenom radnika, a zatim klikom na ovo dugme otvarate OBRAZAC n-b za datog radnika. Imate mogućnost štampe. Samo za budžetske korisnike. </text:p>
      <text:p text:style-name="P1"><text:tab/><text:span text:style-name="T1">GRUPA</text:span> – Unosom šifre grupe radnika određujete grupu za koju hoćete da uradite IZVEŠTAJ O DEVIZNIM DOPRINOSIMA ili da ODREDITE GRUPU ZAPOSLENIH KOJIMA ĆETE SLATI LISTIĆ – OBRAZAC OZ - ukoliko ste radnike podelili u grupe. </text:p>
      <text:p text:style-name="P1"><text:tab/><text:span text:style-name="T1">FORMIRANJE PDF ISPLATNIH LISTIĆA ZA GRUPU – </text:span>ukoliko ste u EVIDENCIJI ZAPOSLENIH odredili grupe i u KARTICAMA F7 uneli email adrese zaposlenih – klikom na ovo dugme formirate PDF isplatnih listića.</text:p>
      <text:p text:style-name="P1"><text:tab/><text:span text:style-name="T1">SLANJE FORMIRANIH PDF ISPLATNIH LISTIĆA MEJLOM –</text:span> klikom na ovo dugme šaljete pripremljene isplatne listiće na mejlove zaposlenih.</text:p>
      <text:p text:style-name="P1"><text:tab/><text:span text:style-name="T1">PREGLEDI</text:span> – Klikom na ovo dugme otvarate podmeni sa različitim vrstama pregleda i spiskova radnika sa podacima iz obračuna zarada. Prema zadatim parametrima i vašim potrebama izaberite pregled koji želite. Sve preglede i spiskove možete štampati. Može se desiti da ne možete da otvorite neki od pregleda. U tom slučaju niste uneli ili ne koristite neki od parametara potrebnih za određeni pregled.</text:p>
      <text:p text:style-name="P1"><text:tab/><text:span text:style-name="T1">ARHIVA – DEARHIVA</text:span> – Klikom na ovo dugme zaključavate i otključavate podatke u tabeli obračuna. </text:p>
      <text:p text:style-name="P1"><text:tab/><text:span text:style-name="T1">DODAJ</text:span> – Klikom na ovo dugme dodajete radnika u već postojeći platni spisak prema šifri iz EVIDENCIJE ZAPOSLENIH.</text:p>
      <text:p text:style-name="P1"><text:tab/><text:span text:style-name="T1">BRIŠI</text:span> – Ovo dugme služi za brisanje radnika iz platnog spiska. Klikom na ime i prezime radnika u tabeli označavate ranika kog hoćete da brišete, a potom kliknete na dume BRIŠI.</text:p>
      <text:p text:style-name="P1"><text:tab/><text:span text:style-name="T1">NETO NA BRUTO U IDBR</text:span>- ne koristi se.</text:p>
      <text:p text:style-name="P1"><text:tab/><text:span text:style-name="T1">PRENOSI –</text:span> Klikom na ovo dugme otvarate podmeni u kome po nazivu polja birate koje podatke hoćete da prenesete u obračun.</text:p>
      <text:p text:style-name="P1"><text:soft-page-break/><text:tab/>PRENOS ZARADE II ISPLATA – Koristi se za prenos podataka iz prethodne isplate za svaku narednu isplatu.</text:p>
      <text:p text:style-name="P1"><text:tab/>PRENOS AKONTACIJE – Koristi se za prenos podataka iz prethodne isplate za svaku narednu isplatu.</text:p>
      <text:p text:style-name="P1"><text:tab/>PRENOS KREDITA – Koristi se za prenos rata kredita iz evidencije kredita. Ukoliko radite samo jednu isplatu kao konačnu uvek koristite opociju ŽELIM PRENOS KREDITA. Ukoliko radite <text:s/>više isplata i imate kredite za odbitak kroz prvu i kroz drugu isplatu za prvu isplatu koristite opciju ŽELIM PRENOS akontacije, a za končnu isplatu koristite opciju ŽELIM PRENOS KREDITA.</text:p>
      <text:p text:style-name="P1"><text:tab/>DOTACIJA – Koristi se za dotiranje zarada do propisane minimalne zarade. Podatak se unosi u PARAMETRE 1. <text:s/></text:p>
      <text:p text:style-name="P1"><text:tab/>TOPLI OBROK I REGRES – Koristi se za unos toplog obroka.</text:p>
      <text:p text:style-name="P1"><text:tab/>TROŠKOVI RESTORANA – Koristi se za obračun toplog obroka ukoliko postoji restoran za ishranu radnika u okviru firme.</text:p>
      <text:p text:style-name="P1"><text:tab/>EXPORT U EXCEL – Klikiom na ovo dugme tabelu zarada izvozite u EXEL. Vratite se u <text:s/>galvni meni. Na dnu strane imate naslov <text:span text:style-name="T1">Uvoz dadoteka </text:span>ispod<text:span text:style-name="T1"> </text:span>koga se nalaze ikone programa. Kliknite na zelenu ikonicu excel programa i videćete gde je fajl sa vašom tabelom. Klikom miša otvorite fajl. <text:s/></text:p>
      <text:p text:style-name="P1"><text:tab/>KOPIRANJE ZARADE – Ne koristi se.</text:p>
      <text:p text:style-name="P1"><text:tab/>PRENOS ZA REGISTAR – Prenos podataka za registar. Samo za budžetske korisnike.</text:p>
      <text:p text:style-name="P1"/>
      <text:p text:style-name="P1"><text:tab/><text:span text:style-name="T1">POPUNJAVANJE KOLONE F8</text:span> – Ovo dugme služi za popunjavanje kolone u tabeli, <text:span text:style-name="T1">ukoliko</text:span> <text:span text:style-name="T1">je podatak isti za sve zaposlene.</text:span> Strelicom na tastaturi, po nazivu, pronađite kolonu koju hoćete da popunite. Kliknite mišem u bilo koje polje te kolone, a zatim na dugme POPUNJAVANJE KOLONE, unesite iznos, kliknite na dugme ŽELIM UNOS, pa na dume izlaz. Kolone koje možete popunjavati na ovaj način imaju iste nazive i u KARTICI F7, gde unosite podatke za svakog radnika pojedinačno.</text:p>
      <text:p text:style-name="P1"><text:tab/><text:span text:style-name="T1">DOPUNSKI PODACI –</text:span> Ovo dugme služi za dopunu podataka u zaradama. </text:p>
      <text:p text:style-name="P1"><text:tab/><text:span text:style-name="T1">PREGLED KOLONE</text:span> – Ovo dugme služi za pregled i štampu podataka iz pojedinih kolona tabele obračuna. Kliknite mišem u polje kolone čiji pregled hoćete, zatim kliknite na dugme PREGLED KOLONE i opet u polje kolone čiji pregled hoćete. Na ovaj način možete praviti preglede svih kolona <text:span text:style-name="T1">koje imaju podatake</text:span> u tabeli, <text:span text:style-name="T1">osim kolone IME I PREZIME i kolone ŠIFRA PRIHODA.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class="chapter">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zef Brnić</meta:initial-creator>
    <meta:creation-date>2018-03-22T11:06:01.36</meta:creation-date>
    <dc:date>2024-02-06T15:25:57.422000000</dc:date>
    <meta:editing-duration>P1DT6H51M31S</meta:editing-duration>
    <meta:editing-cycles>20</meta:editing-cycles>
    <meta:generator>LibreOffice/7.5.0.3$Windows_X86_64 LibreOffice_project/c21113d003cd3efa8c53188764377a8272d9d6de</meta:generator>
    <meta:document-statistic meta:table-count="0" meta:image-count="0" meta:object-count="0" meta:page-count="5" meta:paragraph-count="81" meta:word-count="2585" meta:character-count="16306" meta:non-whitespace-character-count="13590"/>
  </office:meta>
</office:document-meta>
</file>