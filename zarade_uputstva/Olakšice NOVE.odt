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ела1" style:family="table">
      <style:table-properties style:width="6.3354in" fo:margin-left="-0.075in" table:align="left" style:writing-mode="lr-tb"/>
    </style:style>
    <style:style style:name="Табела1.A" style:family="table-column">
      <style:table-column-properties style:column-width="6.3354in"/>
    </style:style>
    <style:style style:name="Табела1.1" style:family="table-row">
      <style:table-row-properties style:min-row-height="0.1229in" style:keep-together="true" fo:keep-together="auto"/>
    </style:style>
    <style:style style:name="Табела1.A1" style:family="table-cell">
      <style:table-cell-properties fo:padding-left="0.075in" fo:padding-right="0.075in" fo:padding-top="0in" fo:padding-bottom="0in" fo:border="none"/>
    </style:style>
    <style:style style:name="Табела2" style:family="table">
      <style:table-properties style:width="7.0632in" fo:margin-left="-0.075in" table:align="left" style:writing-mode="lr-tb"/>
    </style:style>
    <style:style style:name="Табела2.A" style:family="table-column">
      <style:table-column-properties style:column-width="7.0632in"/>
    </style:style>
    <style:style style:name="Табела2.1" style:family="table-row">
      <style:table-row-properties style:min-row-height="0.1236in" style:keep-together="true" fo:keep-together="auto"/>
    </style:style>
    <style:style style:name="Табела2.A1" style:family="table-cell">
      <style:table-cell-properties fo:padding-left="0.075in" fo:padding-right="0.075in" fo:padding-top="0in" fo:padding-bottom="0in" fo:border="none"/>
    </style:style>
    <style:style style:name="Табела3" style:family="table">
      <style:table-properties style:width="7.0611in" fo:margin-left="-0.075in" table:align="left" style:writing-mode="lr-tb"/>
    </style:style>
    <style:style style:name="Табела3.A" style:family="table-column">
      <style:table-column-properties style:column-width="1.7653in"/>
    </style:style>
    <style:style style:name="Табела3.1" style:family="table-row">
      <style:table-row-properties style:min-row-height="0.0549in" style:keep-together="true" fo:keep-together="auto"/>
    </style:style>
    <style:style style:name="Табела3.A1" style:family="table-cell">
      <style:table-cell-properties fo:padding-left="0.075in" fo:padding-right="0.075in" fo:padding-top="0in" fo:padding-bottom="0in" fo:border="none"/>
    </style:style>
    <style:style style:name="Табела4" style:family="table">
      <style:table-properties style:width="6.3403in" fo:margin-left="-0.075in" table:align="left" style:writing-mode="lr-tb"/>
    </style:style>
    <style:style style:name="Табела4.A" style:family="table-column">
      <style:table-column-properties style:column-width="6.3403in"/>
    </style:style>
    <style:style style:name="Табела4.1" style:family="table-row">
      <style:table-row-properties style:min-row-height="0.1236in" style:keep-together="true" fo:keep-together="auto"/>
    </style:style>
    <style:style style:name="Табела4.A1" style:family="table-cell">
      <style:table-cell-properties fo:padding-left="0.075in" fo:padding-right="0.075in" fo:padding-top="0in" fo:padding-bottom="0in" fo:border="none"/>
    </style:style>
    <style:style style:name="Табела12" style:family="table">
      <style:table-properties style:width="6.1299in" fo:margin-left="-0.075in" table:align="left" style:writing-mode="lr-tb"/>
    </style:style>
    <style:style style:name="Табела12.A" style:family="table-column">
      <style:table-column-properties style:column-width="6.1299in"/>
    </style:style>
    <style:style style:name="Табела12.1" style:family="table-row">
      <style:table-row-properties style:min-row-height="0.1236in" style:keep-together="true" fo:keep-together="auto"/>
    </style:style>
    <style:style style:name="Табела12.A1" style:family="table-cell">
      <style:table-cell-properties fo:padding-left="0.075in" fo:padding-right="0.075in" fo:padding-top="0in" fo:padding-bottom="0in" fo:border="none"/>
    </style:style>
    <style:style style:name="Табела13" style:family="table">
      <style:table-properties style:width="6.2785in" fo:margin-left="-0.075in" table:align="left" style:writing-mode="lr-tb"/>
    </style:style>
    <style:style style:name="Табела13.A" style:family="table-column">
      <style:table-column-properties style:column-width="6.2785in"/>
    </style:style>
    <style:style style:name="Табела13.1" style:family="table-row">
      <style:table-row-properties style:min-row-height="0.1229in" style:keep-together="true" fo:keep-together="auto"/>
    </style:style>
    <style:style style:name="Табела13.A1" style:family="table-cell">
      <style:table-cell-properties fo:padding-left="0.075in" fo:padding-right="0.075in" fo:padding-top="0in" fo:padding-bottom="0in" fo:border="none"/>
    </style:style>
    <style:style style:name="Табела5" style:family="table">
      <style:table-properties style:width="6.3354in" fo:margin-left="-0.075in" table:align="left" style:writing-mode="lr-tb"/>
    </style:style>
    <style:style style:name="Табела5.A" style:family="table-column">
      <style:table-column-properties style:column-width="6.3354in"/>
    </style:style>
    <style:style style:name="Табела5.1" style:family="table-row">
      <style:table-row-properties style:min-row-height="0.1236in" style:keep-together="true" fo:keep-together="auto"/>
    </style:style>
    <style:style style:name="Табела5.A1" style:family="table-cell">
      <style:table-cell-properties fo:padding-left="0.075in" fo:padding-right="0.075in" fo:padding-top="0in" fo:padding-bottom="0in" fo:border="none"/>
    </style:style>
    <style:style style:name="Табела14" style:family="table">
      <style:table-properties style:width="6.1299in" fo:margin-left="-0.075in" table:align="left" style:writing-mode="lr-tb"/>
    </style:style>
    <style:style style:name="Табела14.A" style:family="table-column">
      <style:table-column-properties style:column-width="6.1299in"/>
    </style:style>
    <style:style style:name="Табела14.1" style:family="table-row">
      <style:table-row-properties style:min-row-height="0.1236in" style:keep-together="true" fo:keep-together="auto"/>
    </style:style>
    <style:style style:name="Табела14.A1" style:family="table-cell">
      <style:table-cell-properties fo:padding-left="0.075in" fo:padding-right="0.075in" fo:padding-top="0in" fo:padding-bottom="0in" fo:border="none"/>
    </style:style>
    <style:style style:name="Табела6" style:family="table">
      <style:table-properties style:width="6.3389in" fo:margin-left="-0.075in" table:align="left" style:writing-mode="lr-tb"/>
    </style:style>
    <style:style style:name="Табела6.A" style:family="table-column">
      <style:table-column-properties style:column-width="6.3389in"/>
    </style:style>
    <style:style style:name="Табела6.1" style:family="table-row">
      <style:table-row-properties style:min-row-height="0.1229in" style:keep-together="true" fo:keep-together="auto"/>
    </style:style>
    <style:style style:name="Табела6.A1" style:family="table-cell">
      <style:table-cell-properties fo:padding-left="0.075in" fo:padding-right="0.075in" fo:padding-top="0in" fo:padding-bottom="0in" fo:border="none"/>
    </style:style>
    <style:style style:name="Табела15" style:family="table">
      <style:table-properties style:width="6.2813in" fo:margin-left="-0.075in" table:align="left" style:writing-mode="lr-tb"/>
    </style:style>
    <style:style style:name="Табела15.A" style:family="table-column">
      <style:table-column-properties style:column-width="6.2813in"/>
    </style:style>
    <style:style style:name="Табела15.1" style:family="table-row">
      <style:table-row-properties style:min-row-height="0.1236in" style:keep-together="true" fo:keep-together="auto"/>
    </style:style>
    <style:style style:name="Табела15.A1" style:family="table-cell">
      <style:table-cell-properties fo:padding-left="0.075in" fo:padding-right="0.075in" fo:padding-top="0in" fo:padding-bottom="0in" fo:border="none"/>
    </style:style>
    <style:style style:name="Табела7" style:family="table">
      <style:table-properties style:width="6.3354in" fo:margin-left="-0.075in" table:align="left" style:writing-mode="lr-tb"/>
    </style:style>
    <style:style style:name="Табела7.A" style:family="table-column">
      <style:table-column-properties style:column-width="6.3354in"/>
    </style:style>
    <style:style style:name="Табела7.1" style:family="table-row">
      <style:table-row-properties style:min-row-height="0.1229in" style:keep-together="true" fo:keep-together="auto"/>
    </style:style>
    <style:style style:name="Табела7.A1" style:family="table-cell">
      <style:table-cell-properties fo:padding-left="0.075in" fo:padding-right="0.075in" fo:padding-top="0in" fo:padding-bottom="0in" fo:border="none"/>
    </style:style>
    <style:style style:name="Табела16" style:family="table">
      <style:table-properties style:width="6.1382in" fo:margin-left="-0.075in" table:align="left" style:writing-mode="lr-tb"/>
    </style:style>
    <style:style style:name="Табела16.A" style:family="table-column">
      <style:table-column-properties style:column-width="6.1382in"/>
    </style:style>
    <style:style style:name="Табела16.1" style:family="table-row">
      <style:table-row-properties style:min-row-height="0.1236in" style:keep-together="true" fo:keep-together="auto"/>
    </style:style>
    <style:style style:name="Табела16.A1" style:family="table-cell">
      <style:table-cell-properties fo:padding-left="0.075in" fo:padding-right="0.075in" fo:padding-top="0in" fo:padding-bottom="0in" fo:border="none"/>
    </style:style>
    <style:style style:name="Табела8" style:family="table">
      <style:table-properties style:width="6.3375in" fo:margin-left="-0.075in" table:align="left" style:writing-mode="lr-tb"/>
    </style:style>
    <style:style style:name="Табела8.A" style:family="table-column">
      <style:table-column-properties style:column-width="6.3375in"/>
    </style:style>
    <style:style style:name="Табела8.1" style:family="table-row">
      <style:table-row-properties style:min-row-height="0.1229in" style:keep-together="true" fo:keep-together="auto"/>
    </style:style>
    <style:style style:name="Табела8.A1" style:family="table-cell">
      <style:table-cell-properties fo:padding-left="0.075in" fo:padding-right="0.075in" fo:padding-top="0in" fo:padding-bottom="0in" fo:border="none"/>
    </style:style>
    <style:style style:name="Табела17" style:family="table">
      <style:table-properties style:width="6.2722in" fo:margin-left="-0.075in" table:align="left" style:writing-mode="lr-tb"/>
    </style:style>
    <style:style style:name="Табела17.A" style:family="table-column">
      <style:table-column-properties style:column-width="6.2722in"/>
    </style:style>
    <style:style style:name="Табела17.1" style:family="table-row">
      <style:table-row-properties style:min-row-height="0.1236in" style:keep-together="true" fo:keep-together="auto"/>
    </style:style>
    <style:style style:name="Табела17.A1" style:family="table-cell">
      <style:table-cell-properties fo:padding-left="0.075in" fo:padding-right="0.075in" fo:padding-top="0in" fo:padding-bottom="0in" fo:border="none"/>
    </style:style>
    <style:style style:name="Табела9" style:family="table">
      <style:table-properties style:width="6.3354in" fo:margin-left="-0.075in" table:align="left" style:writing-mode="lr-tb"/>
    </style:style>
    <style:style style:name="Табела9.A" style:family="table-column">
      <style:table-column-properties style:column-width="6.3354in"/>
    </style:style>
    <style:style style:name="Табела9.1" style:family="table-row">
      <style:table-row-properties style:min-row-height="0.1236in" style:keep-together="true" fo:keep-together="auto"/>
    </style:style>
    <style:style style:name="Табела9.A1" style:family="table-cell">
      <style:table-cell-properties fo:padding-left="0.075in" fo:padding-right="0.075in" fo:padding-top="0in" fo:padding-bottom="0in" fo:border="none"/>
    </style:style>
    <style:style style:name="Табела18" style:family="table">
      <style:table-properties style:width="1.3444in" fo:margin-left="-0.075in" table:align="left" style:writing-mode="lr-tb"/>
    </style:style>
    <style:style style:name="Табела18.A" style:family="table-column">
      <style:table-column-properties style:column-width="1.3444in"/>
    </style:style>
    <style:style style:name="Табела18.1" style:family="table-row">
      <style:table-row-properties style:min-row-height="0.0549in" style:keep-together="true" fo:keep-together="auto"/>
    </style:style>
    <style:style style:name="Табела18.A1" style:family="table-cell">
      <style:table-cell-properties fo:padding-left="0.075in" fo:padding-right="0.075in" fo:padding-top="0in" fo:padding-bottom="0in" fo:border="none"/>
    </style:style>
    <style:style style:name="Табела10" style:family="table">
      <style:table-properties style:width="6.5569in" fo:margin-left="-0.075in" table:align="left" style:writing-mode="lr-tb"/>
    </style:style>
    <style:style style:name="Табела10.A" style:family="table-column">
      <style:table-column-properties style:column-width="6.5569in"/>
    </style:style>
    <style:style style:name="Табела10.1" style:family="table-row">
      <style:table-row-properties style:min-row-height="0.1229in" style:keep-together="true" fo:keep-together="auto"/>
    </style:style>
    <style:style style:name="Табела10.A1" style:family="table-cell">
      <style:table-cell-properties fo:padding-left="0.075in" fo:padding-right="0.075in" fo:padding-top="0in" fo:padding-bottom="0in" fo:border="none"/>
    </style:style>
    <style:style style:name="Табела19" style:family="table">
      <style:table-properties style:width="1.3444in" fo:margin-left="-0.075in" table:align="left" style:writing-mode="lr-tb"/>
    </style:style>
    <style:style style:name="Табела19.A" style:family="table-column">
      <style:table-column-properties style:column-width="1.3444in"/>
    </style:style>
    <style:style style:name="Табела19.1" style:family="table-row">
      <style:table-row-properties style:min-row-height="0.0549in" style:keep-together="true" fo:keep-together="auto"/>
    </style:style>
    <style:style style:name="Табела19.A1" style:family="table-cell">
      <style:table-cell-properties fo:padding-left="0.075in" fo:padding-right="0.075in" fo:padding-top="0in" fo:padding-bottom="0in" fo:border="none"/>
    </style:style>
    <style:style style:name="Табела11" style:family="table">
      <style:table-properties style:width="6.4271in" fo:margin-left="-0.075in" table:align="left" style:writing-mode="lr-tb"/>
    </style:style>
    <style:style style:name="Табела11.A" style:family="table-column">
      <style:table-column-properties style:column-width="6.4271in"/>
    </style:style>
    <style:style style:name="Табела11.1" style:family="table-row">
      <style:table-row-properties style:min-row-height="0.1229in" style:keep-together="true" fo:keep-together="auto"/>
    </style:style>
    <style:style style:name="Табела11.A1" style:family="table-cell">
      <style:table-cell-properties fo:padding-left="0.075in" fo:padding-right="0.075in" fo:padding-top="0in" fo:padding-bottom="0in" fo:border="none"/>
    </style:style>
    <style:style style:name="Табела20" style:family="table">
      <style:table-properties style:width="6.3833in" fo:margin-left="-0.075in" table:align="left" style:writing-mode="lr-tb"/>
    </style:style>
    <style:style style:name="Табела20.A" style:family="table-column">
      <style:table-column-properties style:column-width="6.3833in"/>
    </style:style>
    <style:style style:name="Табела20.1" style:family="table-row">
      <style:table-row-properties style:min-row-height="0.3944in" style:keep-together="true" fo:keep-together="auto"/>
    </style:style>
    <style:style style:name="Табела20.A1" style:family="table-cell">
      <style:table-cell-properties fo:padding-left="0.075in" fo:padding-right="0.075in" fo:padding-top="0in" fo:padding-bottom="0in" fo:border="none"/>
    </style:style>
    <style:style style:name="Табела21" style:family="table">
      <style:table-properties style:width="6.5736in" fo:margin-left="-0.075in" table:align="left" style:writing-mode="lr-tb"/>
    </style:style>
    <style:style style:name="Табела21.A" style:family="table-column">
      <style:table-column-properties style:column-width="6.5736in"/>
    </style:style>
    <style:style style:name="Табела21.1" style:family="table-row">
      <style:table-row-properties style:min-row-height="0.259in" style:keep-together="true" fo:keep-together="auto"/>
    </style:style>
    <style:style style:name="Табела21.A1" style:family="table-cell">
      <style:table-cell-properties fo:padding-left="0.075in" fo:padding-right="0.075in" fo:padding-top="0in" fo:padding-bottom="0in" fo:border="none"/>
    </style:style>
    <style:style style:name="Табела22" style:family="table">
      <style:table-properties style:width="6.575in" fo:margin-left="-0.075in" table:align="left" style:writing-mode="lr-tb"/>
    </style:style>
    <style:style style:name="Табела22.A" style:family="table-column">
      <style:table-column-properties style:column-width="6.575in"/>
    </style:style>
    <style:style style:name="Табела22.1" style:family="table-row">
      <style:table-row-properties style:min-row-height="0.2597in" style:keep-together="true" fo:keep-together="auto"/>
    </style:style>
    <style:style style:name="Табела22.A1" style:family="table-cell">
      <style:table-cell-properties fo:padding-left="0.075in" fo:padding-right="0.075in" fo:padding-top="0in" fo:padding-bottom="0in" fo:border="none"/>
    </style:style>
    <style:style style:name="Табела23" style:family="table">
      <style:table-properties style:width="6.5826in" fo:margin-left="-0.075in" table:align="left" style:writing-mode="lr-tb"/>
    </style:style>
    <style:style style:name="Табела23.A" style:family="table-column">
      <style:table-column-properties style:column-width="6.5826in"/>
    </style:style>
    <style:style style:name="Табела23.1" style:family="table-row">
      <style:table-row-properties style:min-row-height="0.2583in" style:keep-together="true" fo:keep-together="auto"/>
    </style:style>
    <style:style style:name="Табела23.A1" style:family="table-cell">
      <style:table-cell-properties fo:padding-left="0.075in" fo:padding-right="0.075in" fo:padding-top="0in" fo:padding-bottom="0in" fo:border="none"/>
    </style:style>
    <style:style style:name="Табела24" style:family="table">
      <style:table-properties style:width="6.5424in" fo:margin-left="-0.075in" table:align="left" style:writing-mode="lr-tb"/>
    </style:style>
    <style:style style:name="Табела24.A" style:family="table-column">
      <style:table-column-properties style:column-width="6.5424in"/>
    </style:style>
    <style:style style:name="Табела24.1" style:family="table-row">
      <style:table-row-properties style:min-row-height="0.259in" style:keep-together="true" fo:keep-together="auto"/>
    </style:style>
    <style:style style:name="Табела24.A1" style:family="table-cell">
      <style:table-cell-properties fo:padding-left="0.075in" fo:padding-right="0.075in" fo:padding-top="0in" fo:padding-bottom="0in" fo:border="none"/>
    </style:style>
    <style:style style:name="Табела25" style:family="table">
      <style:table-properties style:width="6.5361in" fo:margin-left="-0.075in" table:align="left" style:writing-mode="lr-tb"/>
    </style:style>
    <style:style style:name="Табела25.A" style:family="table-column">
      <style:table-column-properties style:column-width="6.5361in"/>
    </style:style>
    <style:style style:name="Табела25.1" style:family="table-row">
      <style:table-row-properties style:min-row-height="0.2583in" style:keep-together="true" fo:keep-together="auto"/>
    </style:style>
    <style:style style:name="Табела25.A1" style:family="table-cell">
      <style:table-cell-properties fo:padding-left="0.075in" fo:padding-right="0.075in" fo:padding-top="0in" fo:padding-bottom="0in" fo:border="none"/>
    </style:style>
    <style:style style:name="Табела26" style:family="table">
      <style:table-properties style:width="6.4563in" fo:margin-left="-0.075in" table:align="left" style:writing-mode="lr-tb"/>
    </style:style>
    <style:style style:name="Табела26.A" style:family="table-column">
      <style:table-column-properties style:column-width="6.4563in"/>
    </style:style>
    <style:style style:name="Табела26.1" style:family="table-row">
      <style:table-row-properties style:min-row-height="0.1229in" style:keep-together="true" fo:keep-together="auto"/>
    </style:style>
    <style:style style:name="Табела2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ault">
      <style:paragraph-properties style:text-autospace="none"/>
      <style:text-properties fo:color="#000000" style:font-name="Arial1" fo:font-size="8.5pt" style:font-name-asian="Arial1" style:font-size-asian="8.5pt" style:font-name-complex="Arial1" style:font-size-complex="8.5pt"/>
    </style:style>
    <style:style style:name="P2" style:family="paragraph" style:parent-style-name="Default">
      <style:paragraph-properties style:text-autospace="none"/>
      <style:text-properties fo:color="#000000"/>
    </style:style>
    <style:style style:name="P3" style:family="paragraph" style:parent-style-name="Default">
      <style:paragraph-properties fo:text-align="center" style:justify-single-word="false" style:text-autospace="none"/>
      <style:text-properties fo:color="#000000" style:font-name="Arial1" fo:font-size="8.5pt" style:font-name-asian="Arial1" style:font-size-asian="8.5pt" style:font-name-complex="Arial1" style:font-size-complex="8.5pt"/>
    </style:style>
    <style:style style:name="P4" style:family="paragraph" style:parent-style-name="Default">
      <style:paragraph-properties style:text-autospace="none"/>
      <style:text-properties fo:color="#000000" style:font-name="Arial1" fo:font-size="8.5pt" style:font-name-asian="Arial1" style:font-size-asian="8.5pt" style:font-name-complex="Arial1" style:font-size-complex="8.5pt"/>
    </style:style>
    <style:style style:name="P5" style:family="paragraph" style:parent-style-name="Default">
      <style:paragraph-properties style:text-autospace="none"/>
      <style:text-properties fo:color="#000000" style:font-name="Arial1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Default" style:list-style-name="">
      <style:paragraph-properties style:text-autospace="none"/>
    </style:style>
    <style:style style:name="T1" style:family="text">
      <style:text-properties fo:color="#000000" style:font-name="Arial1" fo:font-size="8.5pt" style:font-name-asian="Arial1" style:font-size-asian="8.5pt" style:font-name-complex="Arial1" style:font-size-complex="8.5pt"/>
    </style:style>
    <style:style style:name="T2" style:family="text">
      <style:text-properties fo:color="#000000" style:text-line-through-style="none" style:font-name="Arial1" fo:font-size="8.5pt" style:text-underline-style="none" style:font-name-asian="Arial1" style:font-size-asian="8.5pt" style:font-name-complex="Arial1" style:font-size-complex="8.5pt"/>
    </style:style>
    <style:style style:name="T3" style:family="text">
      <style:text-properties fo:color="#000000" style:text-line-through-style="none" style:font-name="Arial1" fo:font-size="8.5pt" style:text-underline-style="none" style:font-name-asian="Arial1" style:font-size-asian="8.5pt" style:font-name-complex="Arial1" style:font-size-complex="8.5pt"/>
    </style:style>
    <style:style style:name="T4" style:family="text">
      <style:text-properties fo:color="#000000" style:font-name="Arial1" fo:font-size="8.5pt" style:font-name-asian="Arial1" style:font-size-asian="8.5pt" style:font-name-complex="Arial1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OLAKŠICE </text:p>
      <text:p text:style-name="P3"/>
      <text:p text:style-name="P1"><text:tab/>U EVIDENCIJI ZAPOSLENIH u polju Oznolaks uneti brojeve 03 za:</text:p>
      <text:p text:style-name="P5"><text:tab/>Zaradu novozaposlenog lica sa invaliditetom, sa olakšicom </text:p>
      <text:p text:style-name="P1"><text:tab/>Zarada i druga primanja koja imaju karakter zarade iz čl. 13, 14, 14a i 14b Zakona, osim lične zarade preduzetnika, novozaposlenog lica sa invaliditetom, uključujući zaposlenog u privrednom društvu čiji je osnivač, odnosno član sa pravom poslodavca na olakšicu za zapošljavanje po Zakonu i Zakonu o doprinosima za obavezno socijalno osiguranje ("Službeni glasnik RS", br. 84/04, 61/05, 62/06, 5/09, 52/11, 101/11, 47/13, 108/13, 57/14, 68/14 - dr. zakon, 112/15, 113/17, 95/18, 86/19, 153/20, 44/21 i 118/21 - u daljem tekstu: Zakon o doprinosima), bez staža osiguranja koji se zaposlenom računa sa uvećanim trajanjem. </text:p>
      <text:p text:style-name="P1"/>
      <text:p text:style-name="P1"><text:tab/>U EVIDENCIJI ZAPOSLENIH u polju Oznolaks uneti brojeve 08 za:</text:p>
      <text:p text:style-name="P5"><text:tab/>Zarada novozaposlenog lica, sa olakšicom - pravom poslodavca na povraćaj 65% plaćenog poreza na zaradu i plaćenih doprinosa po članu 21v Zakona i članu 45. Zakona o doprinosima, bez beneficiranog staža </text:p>
      <text:p text:style-name="P1"/>
      <text:p text:style-name="P1"/>
      <text:p text:style-name="P1"/>
      <text:p text:style-name="P1">29</text:p>
      <table:table table:name="Табела1" table:style-name="Табела1">
        <table:table-column table:style-name="Табела1.A"/>
        <table:table-row table:style-name="Табела1.1">
          <table:table-cell table:style-name="Табела1.A1" office:value-type="string">
            <text:p text:style-name="P5">Zarada kvalifikovanog novozaposlenog lica, sa oslobođenjem od plaćanja 60% poreza i 85% doprinosa za PIO po članu 21ž stav 14. tačka 1) Zakona i članu 45đ stav 14. tačka 1) Zakona o doprinosima, bez beneficiranog staža </text:p>
          </table:table-cell>
        </table:table-row>
      </table:table>
      <text:p text:style-name="P1">30</text:p>
      <table:table table:name="Табела2" table:style-name="Табела2">
        <table:table-column table:style-name="Табела2.A"/>
        <table:table-row table:style-name="Табела2.1">
          <table:table-cell table:style-name="Табела2.A1" office:value-type="string">
            <text:p text:style-name="P5">Zarada kvalifikovanog novozaposlenog lica, sa oslobođenjem od plaćanja 57% poreza i 82% doprinosa za PIO po članu 21ž Zakona i članu 45đ Zakona o doprinosima, bez beneficiranog staža </text:p>
          </table:table-cell>
        </table:table-row>
      </table:table>
      <table:table table:name="Табела3" table:style-name="Табела3">
        <table:table-column table:style-name="Табела3.A" table:number-columns-repeated="4"/>
        <table:table-row table:style-name="Табела3.1">
          <table:table-cell table:style-name="Табела3.A1" office:value-type="string">
            <text:p text:style-name="P1">101 </text:p>
          </table:table-cell>
          <table:table-cell table:style-name="Табела3.A1" office:value-type="string">
            <text:p text:style-name="P1">30 </text:p>
          </table:table-cell>
          <table:table-cell table:style-name="Табела3.A1" office:value-type="string">
            <text:p text:style-name="P1">0 </text:p>
          </table:table-cell>
          <table:table-cell table:style-name="Табела3.A1" office:value-type="string">
            <text:p text:style-name="P1">Zarada i druga primanja koja imaju karakter zarade iz čl. 13, 14, 14a i 14b Zakona, kvalifikovanog novozaposlenog lica, sa </text:p>
          </table:table-cell>
        </table:table-row>
      </table:table>
      <text:p text:style-name="P1">31</text:p>
      <text:p text:style-name="P1"/>
      <table:table table:name="Табела4" table:style-name="Табела4">
        <table:table-column table:style-name="Табела4.A"/>
        <table:table-row table:style-name="Табела4.1">
          <table:table-cell table:style-name="Табела4.A1" office:value-type="string">
            <text:p text:style-name="P5">Zarada kvalifikovanog novozaposlenog lica, sa oslobođenjem od plaćanja 50% poreza i 75% doprinosa za PIO po članu 21ž Zakona i članu 45đ Zakona o doprinosima, </text:p>
          </table:table-cell>
        </table:table-row>
      </table:table>
      <text:p text:style-name="P1"/>
      <table:table table:name="Табела12" table:style-name="Табела12">
        <table:table-column table:style-name="Табела12.A"/>
        <table:table-row table:style-name="Табела12.1">
          <table:table-cell table:style-name="Табела12.A1" office:value-type="string">
            <text:p text:style-name="P1">od 1. januara 2023. godine do 31. decembra 2023. godine </text:p>
          </table:table-cell>
        </table:table-row>
      </table:table>
      <text:p text:style-name="P1"/>
      <text:p text:style-name="P1"/>
      <text:p text:style-name="P1">32</text:p>
      <text:p text:style-name="P1"/>
      <table:table table:name="Табела13" table:style-name="Табела13">
        <table:table-column table:style-name="Табела13.A"/>
        <table:table-row table:style-name="Табела13.1">
          <table:table-cell table:style-name="Табела13.A1" office:value-type="string">
            <text:p text:style-name="P1">1. januara 2023. godine do 31. decembra 2023. godine </text:p>
          </table:table-cell>
        </table:table-row>
      </table:table>
      <text:p text:style-name="P1"/>
      <text:p text:style-name="P1"/>
      <table:table table:name="Табела5" table:style-name="Табела5">
        <table:table-column table:style-name="Табела5.A"/>
        <table:table-row table:style-name="Табела5.1">
          <table:table-cell table:style-name="Табела5.A1" office:value-type="string">
            <text:p text:style-name="P5">Zarada kvalifikovanog novozaposlenog lica, sa oslobođenjem od plaćanja 47% poreza i 72% doprinosa za PIO po članu 21ž Zakona i članu 45đ Zakona o doprinosima, </text:p>
          </table:table-cell>
        </table:table-row>
      </table:table>
      <text:p text:style-name="P1"/>
      <text:p text:style-name="P1">33</text:p>
      <text:p text:style-name="P1"/>
      <table:table table:name="Табела14" table:style-name="Табела14">
        <table:table-column table:style-name="Табела14.A"/>
        <table:table-row table:style-name="Табела14.1">
          <table:table-cell table:style-name="Табела14.A1" office:value-type="string">
            <text:p text:style-name="P1">1. januara 2024. godine do 31. decembra 2024. godine, </text:p>
          </table:table-cell>
        </table:table-row>
      </table:table>
      <text:p text:style-name="P1"/>
      <table:table table:name="Табела6" table:style-name="Табела6">
        <table:table-column table:style-name="Табела6.A"/>
        <table:table-row table:style-name="Табела6.1">
          <table:table-cell table:style-name="Табела6.A1" office:value-type="string">
            <text:p text:style-name="P5">Zarada kvalifikovanog novozaposlenog lica, sa oslobođenjem od plaćanja 40% poreza i 65% doprinosa za PIO po članu 21ž Zakona i članu 45đ Zakona o doprinosima, </text:p>
          </table:table-cell>
        </table:table-row>
      </table:table>
      <text:p text:style-name="P1"/>
      <text:p text:style-name="P1">34</text:p>
      <text:p text:style-name="P1"/>
      <text:p text:style-name="P1"/>
      <table:table table:name="Табела15" table:style-name="Табела15">
        <table:table-column table:style-name="Табела15.A"/>
        <table:table-row table:style-name="Табела15.1">
          <table:table-cell table:style-name="Табела15.A1" office:value-type="string">
            <text:p text:style-name="P1">od 1. januara 2024. godine do 31. decembra 2024. godine, </text:p>
          </table:table-cell>
        </table:table-row>
      </table:table>
      <text:p text:style-name="P1"/>
      <table:table table:name="Табела7" table:style-name="Табела7">
        <table:table-column table:style-name="Табела7.A"/>
        <table:table-row table:style-name="Табела7.1">
          <table:table-cell table:style-name="Табела7.A1" office:value-type="string">
            <text:p text:style-name="P5">Zarada kvalifikovanog novozaposlenog lica, sa oslobođenjem od plaćanja 37% poreza i 62% doprinosa za PIO po članu 21ž Zakona i članu 45đ Zakona o doprinosima, </text:p>
          </table:table-cell>
        </table:table-row>
      </table:table>
      <text:p text:style-name="P1"/>
      <text:p text:style-name="P1">35</text:p>
      <text:p text:style-name="P1"/>
      <table:table table:name="Табела16" table:style-name="Табела16">
        <table:table-column table:style-name="Табела16.A"/>
        <table:table-row table:style-name="Табела16.1">
          <table:table-cell table:style-name="Табела16.A1" office:value-type="string">
            <text:p text:style-name="P1">od 1. januara 2025. godine do 31. decembra 2025. godine, </text:p>
          </table:table-cell>
        </table:table-row>
      </table:table>
      <text:p text:style-name="P1"/>
      <table:table table:name="Табела8" table:style-name="Табела8">
        <table:table-column table:style-name="Табела8.A"/>
        <table:table-row table:style-name="Табела8.1">
          <table:table-cell table:style-name="Табела8.A1" office:value-type="string">
            <text:p text:style-name="P5">Zarada kvalifikovanog novozaposlenog lica, sa oslobođenjem od plaćanja 30% poreza i 55% doprinosa za PIO po članu 21ž Zakona i članu 45đ Zakona o doprinosima, </text:p>
          </table:table-cell>
        </table:table-row>
      </table:table>
      <text:p text:style-name="P1"/>
      <text:p text:style-name="P1">36</text:p>
      <text:p text:style-name="P1"/>
      <text:p text:style-name="P1"/>
      <table:table table:name="Табела17" table:style-name="Табела17">
        <table:table-column table:style-name="Табела17.A"/>
        <table:table-row table:style-name="Табела17.1">
          <table:table-cell table:style-name="Табела17.A1" office:value-type="string">
            <text:p text:style-name="P1">od 1. januara 2025. godine do 31. decembra 2025. godine, </text:p>
          </table:table-cell>
        </table:table-row>
      </table:table>
      <text:p text:style-name="P1"/>
      <table:table table:name="Табела9" table:style-name="Табела9">
        <table:table-column table:style-name="Табела9.A"/>
        <table:table-row table:style-name="Табела9.1">
          <table:table-cell table:style-name="Табела9.A1" office:value-type="string">
            <text:p text:style-name="P5">Zarada kvalifikovanog novozaposlenog lica, sa oslobođenjem od plaćanja 27% poreza i 52% doprinosa za PIO po članu 21ž Zakona i članu 45đ Zakona o doprinosima </text:p>
          </table:table-cell>
        </table:table-row>
      </table:table>
      <text:p text:style-name="P1"><text:soft-page-break/></text:p>
      <text:p text:style-name="P1">37</text:p>
      <text:p text:style-name="P1"/>
      <text:p text:style-name="P1"/>
      <table:table table:name="Табела18" table:style-name="Табела18">
        <table:table-column table:style-name="Табела18.A"/>
        <table:table-row table:style-name="Табела18.1">
          <table:table-cell table:style-name="Табела18.A1" office:value-type="string">
            <text:p text:style-name="P2">od 1. marta 2022. godine, </text:p>
          </table:table-cell>
        </table:table-row>
      </table:table>
      <text:p text:style-name="P1"/>
      <table:table table:name="Табела10" table:style-name="Табела10">
        <table:table-column table:style-name="Табела10.A"/>
        <table:table-row table:style-name="Табела10.1">
          <table:table-cell table:style-name="Табела10.A1" office:value-type="string">
            <text:p text:style-name="P5">Zarada novozaposlenog lica, sa oslobođenjem od plaćanja 70% poreza i 100% doprinosa za PIO po članu 21z Zakona i članu 45ž Zakona o doprinosima, </text:p>
          </table:table-cell>
        </table:table-row>
      </table:table>
      <text:p text:style-name="P1"/>
      <text:p text:style-name="P1">38</text:p>
      <text:p text:style-name="P1"/>
      <table:table table:name="Табела19" table:style-name="Табела19">
        <table:table-column table:style-name="Табела19.A"/>
        <table:table-row table:style-name="Табела19.1">
          <table:table-cell table:style-name="Табела19.A1" office:value-type="string">
            <text:p text:style-name="P2">od 1. marta 2022. godine, </text:p>
          </table:table-cell>
        </table:table-row>
      </table:table>
      <text:p text:style-name="P1"/>
      <text:p text:style-name="P1"/>
      <table:table table:name="Табела11" table:style-name="Табела11">
        <table:table-column table:style-name="Табела11.A"/>
        <table:table-row table:style-name="Табела11.1">
          <table:table-cell table:style-name="Табела11.A1" office:value-type="string">
            <text:p text:style-name="P5">Zarada zaposlenog, sa oslobođenjem od plaćanja 70% poreza i 100% doprinosa za PIO po članu 21i Zakona i članu 45z Zakona o doprinosima </text:p>
          </table:table-cell>
        </table:table-row>
      </table:table>
      <text:p text:style-name="P1"/>
      <table:table table:name="Табела20" table:style-name="Табела20">
        <table:table-column table:style-name="Табела20.A"/>
        <table:table-row table:style-name="Табела20.1">
          <table:table-cell table:style-name="Табела20.A1" office:value-type="string">
            <text:p text:style-name="P6"><text:span text:style-name="T1">Zarada i druga primanja koja imaju karakter zarade iz čl. 13, 14, 14a i 14b Zakona, osim lične zarade preduzetnika, novozaposlenog lica sa invaliditetom, uključujući zaposlenog u privrednom društvu čiji je osnivač, odnosno član sa pravom poslodavca na olakšicu za zapošljavanje po Zakonu i Zakonu o doprinosima za obavezno socijalno osiguranje ("Službeni glasnik RS", br. 84/04, 61/05, 62/06, 5/09, 52/11, 101/11, 47/13, 108/13, 57/14, 68/14 - dr. zakon, 112/15, 113/17, 95/18, 86/19, 153/20, 44/21 i 118/21 - u daljem tekstu: Zakon o doprinosima), bez staža osiguranja koji se zaposlenom računa sa uvećanim trajanjem. </text:span></text:p>
          </table:table-cell>
        </table:table-row>
      </table:table>
      <text:p text:style-name="P1"/>
      <table:table table:name="Табела21" table:style-name="Табела21">
        <table:table-column table:style-name="Табела21.A"/>
        <table:table-row table:style-name="Табела21.1">
          <table:table-cell table:style-name="Табела21.A1" office:value-type="string">
            <text:p text:style-name="P6"><text:span text:style-name="T1">Zarada i druga primanja koja imaju karakter zarade iz čl. 13, 14, 14a i 14b Zakona, osim lične zarade preduzetnika, novozaposlenog lica, uključujući zaposlenog u privrednom društvu čiji je osnivač, odnosno član, sa pravom poslodavca na povraćaj 65% plaćenog poreza na zaradu i plaćenih doprinosa za novozaposleno lice po članu 21v Zakona i članu 45. Zakona o doprinosima, </text:span></text:p>
          </table:table-cell>
        </table:table-row>
      </table:table>
      <text:p text:style-name="P1"/>
      <table:table table:name="Табела22" table:style-name="Табела22">
        <table:table-column table:style-name="Табела22.A"/>
        <table:table-row table:style-name="Табела22.1">
          <table:table-cell table:style-name="Табела22.A1" office:value-type="string">
            <text:p text:style-name="P6"><text:span text:style-name="T1">Zarada i druga primanja koja imaju karakter zarade iz čl. 13, 14, 14a i 14b Zakona, osim lične zarade preduzetnika, novozaposlenog lica, uključujući zaposlenog u privrednom društvu čiji je osnivač, odnosno član, sa pravom poslodavca na povraćaj 70% plaćenog poreza na zaradu i plaćenih doprinosa za novozaposleno lice po članu 21v Zakona i članu 45. Zakona o doprinosima. </text:span></text:p>
          </table:table-cell>
        </table:table-row>
      </table:table>
      <text:p text:style-name="P1"/>
      <table:table table:name="Табела23" table:style-name="Табела23">
        <table:table-column table:style-name="Табела23.A"/>
        <table:table-row table:style-name="Табела23.1">
          <table:table-cell table:style-name="Табела23.A1" office:value-type="string">
            <text:p text:style-name="P6"><text:span text:style-name="T1">Zarada i druga primanja koja imaju karakter zarade iz čl. 13, 14, 14a i 14b Zakona, osim lične zarade preduzetnika, novozaposlenog lica, uključujući zaposlenog u privrednom društvu čiji je osnivač, odnosno član, sa pravom poslodavca na povraćaj 75% plaćenog poreza na zaradu i plaćenih doprinosa za novozaposleno lice po članu 21v Zakona i članu 45. Zakona o doprinosima </text:span></text:p>
          </table:table-cell>
        </table:table-row>
      </table:table>
      <text:p text:style-name="P1"/>
      <table:table table:name="Табела24" table:style-name="Табела24">
        <table:table-column table:style-name="Табела24.A"/>
        <table:table-row table:style-name="Табела24.1">
          <table:table-cell table:style-name="Табела24.A1" office:value-type="string">
            <text:p text:style-name="P6"><text:span text:style-name="T1">Zarada i druga primanja koja imaju karakter zarade iz čl. 13, 14, 14a i 14b Zakona, osim lične zarade preduzetnika, novozaposlenog lica u mikro i malom pravnom licu i kod preduzetnika, uključujući zaposlenog u privrednom društvu (mikro i malo pravno lice) čiji je osnivač, odnosno član, sa pravom poslodavca na povraćaj 75% plaćenog poreza na zaradu i plaćenih doprinosa za novozaposleno lice po članu 21d Zakona i članu 45v Zakona o doprinosima </text:span></text:p>
          </table:table-cell>
        </table:table-row>
      </table:table>
      <text:p text:style-name="P1"/>
      <table:table table:name="Табела25" table:style-name="Табела25">
        <table:table-column table:style-name="Табела25.A"/>
        <table:table-row table:style-name="Табела25.1">
          <table:table-cell table:style-name="Табела25.A1" office:value-type="string">
            <text:p text:style-name="P6"><text:span text:style-name="T1">Zarada i druga primanja koja imaju karakter zarade iz čl. 13, 14, 14a i 14b Zakona osnivača pravnog lica koji je zasnovao radni odnos u tom licu, odnosno lična zarada preduzetnika, zarada zaposlenog koji je zasnovao radni odnos kod novoosnovanog pravnog lica, odnosno novoosnovanog preduzetnika, sa pravom na poresko oslobođenje u skladu sa članom 21đ Zakona i članom 45g Zakona o doprinosima, isplaćena zaključno sa 16. decembrom 2019. godine. </text:span></text:p>
          </table:table-cell>
        </table:table-row>
      </table:table>
      <text:p text:style-name="P1"/>
      <table:table table:name="Табела26" table:style-name="Табела26">
        <table:table-column table:style-name="Табела26.A"/>
        <table:table-row table:style-name="Табела26.1">
          <table:table-cell table:style-name="Табела26.A1" office:value-type="string">
            <text:p text:style-name="P6"><text:span text:style-name="T1">Zarada i druga primanja koja imaju karakter zarade iz čl. 13, 14, 14a i 14b Zakona, osim lične zarade preduzetnika, novonastanjenog obveznika sa pravom na umanjenje za 70% osnovice poreza na zaradu i doprinosa po članu 15v Zakona i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zef Brnić</meta:initial-creator>
    <meta:creation-date>2022-05-27T16:21:03.52</meta:creation-date>
    <dc:date>2022-05-31T16:18:53.60</dc:date>
    <dc:creator>Jozef Brnić</dc:creator>
    <meta:editing-duration>PT4H42M19S</meta:editing-duration>
    <meta:editing-cycles>2</meta:editing-cycles>
    <meta:generator>OpenOffice/4.1.1$Win32 OpenOffice.org_project/411m6$Build-9775</meta:generator>
    <meta:document-statistic meta:table-count="26" meta:image-count="0" meta:object-count="0" meta:page-count="2" meta:paragraph-count="45" meta:word-count="961" meta:character-count="6046"/>
  </office:meta>
</office:document-meta>
</file>