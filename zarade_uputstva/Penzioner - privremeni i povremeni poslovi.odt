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E8000002BCCC112BBE2101EF65.png" manifest:media-type="image/png"/>
  <manifest:file-entry manifest:full-path="Pictures/10000001000004F40000030B7165436DC5760C07.png" manifest:media-type="image/png"/>
  <manifest:file-entry manifest:full-path="Pictures/1000000100000429000002DDFFDC89BC96BCD44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ела2" style:family="table">
      <style:table-properties style:width="17cm" table:align="left"/>
    </style:style>
    <style:style style:name="Табела2.A" style:family="table-column">
      <style:table-column-properties style:column-width="4.457cm"/>
    </style:style>
    <style:style style:name="Табела2.B" style:family="table-column">
      <style:table-column-properties style:column-width="4.001cm"/>
    </style:style>
    <style:style style:name="Табела2.D" style:family="table-column">
      <style:table-column-properties style:column-width="4.085cm"/>
    </style:style>
    <style:style style:name="Табела2.1" style:family="table-row">
      <style:table-row-properties fo:background-color="#3c7286">
        <style:background-image/>
      </style:table-row-properties>
    </style:style>
    <style:style style:name="Табела2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2.6pt double #808080" fo:border-right="none" fo:border-top="2.6pt double #808080" fo:border-bottom="2.6pt double #808080"/>
    </style:style>
    <style:style style:name="Табела2.D1" style:family="table-cell">
      <style:table-cell-properties style:vertical-align="middle" style:border-line-width="0.002cm 0.088cm 0.002cm" fo:padding="0.049cm" fo:border="2.6pt double #808080"/>
    </style:style>
    <style:style style:name="Табела1" style:family="table">
      <style:table-properties style:width="17cm" table:align="left"/>
    </style:style>
    <style:style style:name="Табела1.A" style:family="table-column">
      <style:table-column-properties style:column-width="4.457cm"/>
    </style:style>
    <style:style style:name="Табела1.B" style:family="table-column">
      <style:table-column-properties style:column-width="4.001cm"/>
    </style:style>
    <style:style style:name="Табела1.D" style:family="table-column">
      <style:table-column-properties style:column-width="4.085cm"/>
    </style:style>
    <style:style style:name="Табела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2.6pt double #808080" fo:border-right="none" fo:border-top="2.6pt double #808080" fo:border-bottom="2.6pt double #808080"/>
    </style:style>
    <style:style style:name="Табела1.D1" style:family="table-cell">
      <style:table-cell-properties style:vertical-align="middle" style:border-line-width="0.002cm 0.088cm 0.002cm" fo:padding="0.049cm" fo:border="2.6pt double #80808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margin-top="0cm" fo:margin-bottom="0.499cm" style:contextual-spacing="false"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paragraph-rsid="00189881" style:font-weight-asian="normal" style:font-weight-complex="normal"/>
    </style:style>
    <style:style style:name="P5" style:family="paragraph" style:parent-style-name="Standard">
      <style:text-properties fo:font-weight="normal" officeooo:paragraph-rsid="00189881" style:font-weight-asian="normal" style:font-weight-complex="normal"/>
    </style:style>
    <style:style style:name="P6" style:family="paragraph" style:parent-style-name="Table_20_Contents">
      <style:paragraph-properties fo:margin-top="0cm" fo:margin-bottom="0.499cm" style:contextual-spacing="false"/>
    </style:style>
    <style:style style:name="P7" style:family="paragraph" style:parent-style-name="Table_20_Contents">
      <style:paragraph-properties fo:margin-top="0cm" fo:margin-bottom="0.499cm" style:contextual-spacing="false" fo:text-align="center" style:justify-single-word="false"/>
      <style:text-properties fo:font-weight="bold"/>
    </style:style>
    <style:style style:name="P8" style:family="paragraph" style:parent-style-name="Standard">
      <style:text-properties fo:font-weight="normal" officeooo:paragraph-rsid="0018988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paragraph-rsid="0018988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paragraph-rsid="0019cdd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9881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89881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officeooo:rsid="00189881"/>
    </style:style>
    <style:style style:name="T7" style:family="text">
      <style:text-properties fo:color="#c9211e" loext:opacity="100%" officeooo:rsid="0019cdd2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189881" style:font-size-asian="12pt" style:font-size-complex="12pt"/>
    </style:style>
    <style:style style:name="T10" style:family="text">
      <style:text-properties fo:font-size="12pt" officeooo:rsid="0019cdd2" style:font-size-asian="12pt" style:font-size-complex="12pt"/>
    </style:style>
    <style:style style:name="T11" style:family="text">
      <style:text-properties fo:color="#000000" loext:opacity="100%" officeooo:rsid="00189881"/>
    </style:style>
    <style:style style:name="T12" style:family="text">
      <style:text-properties officeooo:rsid="0019cdd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RAČUN POVREMENIH I PRIVREMENIH POSLOVA</text:p>
      <text:p text:style-name="P1">ZA PENZIONERA</text:p>
      <text:p text:style-name="P1"/>
      <text:p text:style-name="P5"><text:tab/>U EVIDENCIJI ZAPOSLENIH <text:span text:style-name="T4">dodajte novu karticu opštih podataka – klik na dugme DODAJ ili </text:span><text:span text:style-name="T9">pritisnite taster</text:span><text:span text:style-name="T4"> + na tastaturi i unesite opšte podatke. </text:span></text:p>
      <text:p text:style-name="P5"/>
      <text:p text:style-name="P4"><text:tab/><text:span text:style-name="T5">VRSTU ISPLATE</text:span> - obeležiti sa <text:span text:style-name="T5">R</text:span>, </text:p>
      <text:p text:style-name="P4"/>
      <text:p text:style-name="P4"><text:tab/><text:span text:style-name="T6">KOEFICIJENT RADNOG MESTA</text:span> – <text:span text:style-name="T4">uneti broj </text:span>1 <text:span text:style-name="T4">( ukoliko imate samo jednog penzionera ili više penzionera sa istom cenom rada po času ) ili pre</text:span><text:span text:style-name="T12">r</text:span><text:span text:style-name="T4">ačunat koeficijent ( ukoliko imate više penzionera sa različitom cenom rada po času).</text:span></text:p>
      <text:p text:style-name="P4"/>
      <text:p text:style-name="P4"><text:span text:style-name="T6"><text:tab/>NEPUNO RADNO VREME KOD JEDNOG POSLODAVCA, bez obzira da li penzioner ima ili nem</text:span><text:span text:style-name="T7">a</text:span><text:span text:style-name="T6"> puno radno vreme </text:span><text:span text:style-name="T11">- unesite oznaku</text:span><text:span text:style-name="T6"> 1. </text:span><text:s/></text:p>
      <text:p text:style-name="P4"/>
      <text:p text:style-name="P4"/>
      <text:p text:style-name="P4"><draw:frame draw:style-name="fr1" draw:name="Image2" text:anchor-type="char" svg:width="17cm" svg:height="16.185cm" draw:z-index="2"><draw:image xlink:href="Pictures/10000001000003E8000002BCCC112BBE2101EF65.png" xlink:type="simple" xlink:show="embed" xlink:actuate="onLoad" draw:mime-type="image/png"/></draw:frame></text:p>
      <text:p text:style-name="P4"/>
      <text:p text:style-name="P4"/>
      <text:p text:style-name="P10"><text:soft-page-break/><text:tab/><text:span text:style-name="T4">Nakon unosa opštih podataka kliknite na IZLAZ.</text:span></text:p>
      <text:p text:style-name="P10"/>
      <text:p text:style-name="P10"><text:span text:style-name="T4"><text:tab/></text:span><text:span text:style-name="T12">Zatim,</text:span><text:span text:style-name="T4"> </text:span><text:span text:style-name="T12">kliknite na dugme PODESI ZA 2014, da bi ste popunili kolone koje su potrebne za PPP-PD prijavu.</text:span></text:p>
      <text:p text:style-name="P10"/>
      <text:p text:style-name="P10"><text:span text:style-name="T12"><text:tab/>Sada kliknite na OTVORI TABELU i ručno unesite </text:span>šifru prihoda <text:span text:style-name="T4">150.</text:span></text:p>
      <text:p text:style-name="P10"/>
      <text:p text:style-name="P4"/>
      <text:p text:style-name="P4"><draw:frame draw:style-name="fr3" draw:name="Image3" text:anchor-type="char" svg:width="17cm" svg:height="21.184cm" draw:z-index="1"><draw:image xlink:href="Pictures/10000001000004F40000030B7165436DC5760C07.png" xlink:type="simple" xlink:show="embed" xlink:actuate="onLoad" draw:mime-type="image/png"/></draw:frame></text:p>
      <text:p text:style-name="P4"><text:soft-page-break/></text:p>
      <text:p text:style-name="P4"><text:tab/>U PARAMETRIMA 1 KOD PENZIONERA OBRIŠ<text:span text:style-name="T4">I</text:span>TE IZNOSE PROCENTA ZA ZDRAVSVO <text:span text:style-name="T4">I NEZAPOSLENOST </text:span><text:span text:style-name="T1">( ZA PENZIONERE KOJI SU ANGAŽOVANI PO UGOVORU O POVREMENIM I PRIVREMENIM POSLOVIMA NE PLAĆ</text:span><text:span text:style-name="T2">JU</text:span><text:span text:style-name="T1"> SE DOPRINOS</text:span><text:span text:style-name="T2">I</text:span><text:span text:style-name="T1"> ZA ZDRAVSTVENO OSIGURANJE </text:span><text:span text:style-name="T2">I NEZAPOSLENOST</text:span><text:span text:style-name="T1"> )</text:span> , </text:p>
      <text:p text:style-name="P4"/>
      <text:p text:style-name="P4"><draw:frame draw:style-name="fr2" draw:name="Image1" text:anchor-type="char" svg:width="17cm" svg:height="11.7cm" draw:z-index="0"><draw:image xlink:href="Pictures/1000000100000429000002DDFFDC89BC96BCD447.png" xlink:type="simple" xlink:show="embed" xlink:actuate="onLoad" draw:mime-type="image/png"/></draw:frame></text:p>
      <text:p text:style-name="P4"/>
      <text:p text:style-name="P4">U PARAMETRIMA 2 <text:span text:style-name="T4">izaberite</text:span> vrstu <text:span text:style-name="T12">obračuna </text:span><text:span text:style-name="T4">5. </text:span><text:span text:style-name="T12">Nema potrebe da brišete </text:span><text:span text:style-name="T8">iznos za <text:s/>poresko oslobođenje </text:span><text:span text:style-name="T10">za šifru prihoda 150 u obračunu ovaj iznos se zanemaruje</text:span><text:span text:style-name="T8">.</text:span></text:p>
      <text:p text:style-name="P3"/>
      <text:p text:style-name="P3"><text:tab/>Za preračun bruto iznosa zarade koristiti formulu: <text:s text:c="21"/></text:p>
      <text:p text:style-name="P3"/>
      <table:table table:name="Табела2" table:style-name="Табела2">
        <table:table-column table:style-name="Табела2.A"/>
        <table:table-column table:style-name="Табела2.B"/>
        <table:table-column table:style-name="Табела2.A"/>
        <table:table-column table:style-name="Табела2.D"/>
        <table:table-row table:style-name="Табела2.1">
          <table:table-cell table:style-name="Табела2.A1" office:value-type="string">
            <text:p text:style-name="P7">PRIVREMENI I POVREMENI POSLOVI </text:p>
          </table:table-cell>
          <table:table-cell table:style-name="Табела2.A1" office:value-type="string">
            <text:p text:style-name="P7">UGOVORENA NAKNADA - niža od najniže osnovice </text:p>
          </table:table-cell>
          <table:table-cell table:style-name="Табела2.A1" office:value-type="string">
            <text:p text:style-name="P7">UGOVORENA NAKNADA - viša od najniže, a niža od najviše osnovice </text:p>
          </table:table-cell>
          <table:table-cell table:style-name="Табела2.D1" office:value-type="string">
            <text:p text:style-name="P7">UGOVORENA NAKNADA - viša od najviše osnovice </text:p>
          </table:table-cell>
        </table:table-row>
      </table:table>
      <text:p text:style-name="P3"/>
      <table:table table:name="Табела1" table:style-name="Табела1">
        <table:table-column table:style-name="Табела1.A"/>
        <table:table-column table:style-name="Табела1.B"/>
        <table:table-column table:style-name="Табела1.A"/>
        <table:table-column table:style-name="Табела1.D"/>
        <table:table-row>
          <table:table-cell table:style-name="Табела1.A1" office:value-type="string">
            <text:p text:style-name="P6">Ugovorena naknada za korisnika starosne penzije </text:p>
          </table:table-cell>
          <table:table-cell table:style-name="Табела1.A1" office:value-type="string">
            <text:p text:style-name="P2"><text:span text:style-name="T3">B = N + (NnO x 14,0%)<text:line-break/></text:span>0,9 </text:p>
          </table:table-cell>
          <table:table-cell table:style-name="Табела1.A1" office:value-type="string">
            <text:p text:style-name="P2">B = N / 0,760 </text:p>
          </table:table-cell>
          <table:table-cell table:style-name="Табела1.D1" office:value-type="string">
            <text:p text:style-name="P2"><text:span text:style-name="T3">B = N + (NvO x 14,0%)<text:line-break/></text:span>0,9 </text:p>
          </table:table-cell>
        </table:table-row>
      </table:table>
      <text:p text:style-name="P10"><text:s text:c="20"/></text:p>
      <text:p text:style-name="P10">NNO = najniža osnovica doprinosa za dati broj časova, odnosno ukoliko je broj časova m<text:span text:style-name="T12">a</text:span>nji od ukupnog broja časova u mesecu utvrditi proporcionalnu osnovicu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zxx" fo:country="none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zxx" fo:country="none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zef Brnić</meta:initial-creator>
    <meta:creation-date>2018-10-11T14:52:32.17</meta:creation-date>
    <dc:date>2024-09-13T15:44:26.333000000</dc:date>
    <meta:editing-duration>PT17H45M31S</meta:editing-duration>
    <meta:editing-cycles>11</meta:editing-cycles>
    <meta:generator>LibreOffice/7.5.0.3$Windows_X86_64 LibreOffice_project/c21113d003cd3efa8c53188764377a8272d9d6de</meta:generator>
    <meta:document-statistic meta:table-count="2" meta:image-count="3" meta:object-count="0" meta:page-count="3" meta:paragraph-count="22" meta:word-count="276" meta:character-count="1733" meta:non-whitespace-character-count="1411"/>
  </office:meta>
</office:document-meta>
</file>