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zxx" fo:country="none"/>
    </style:style>
    <style:style style:name="P4" style:family="paragraph" style:parent-style-name="Standard">
      <style:paragraph-properties fo:text-align="start" style:justify-single-word="false"/>
      <style:text-properties fo:language="zxx" fo:country="non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color="#ff0000"/>
    </style:style>
    <style:style style:name="T1" style:family="text">
      <style:text-properties fo:language="zxx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0000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RAČUN ZARADE ZAPOSLENIH </text:p>
      <text:p text:style-name="P1">PENZIONERA</text:p>
      <text:p text:style-name="P1"/>
      <text:p text:style-name="P2"><text:tab/>Koristiti BRUTO obračun, sa cenom rada i koeficijentom 1.</text:p>
      <text:p text:style-name="P2"><text:tab/>U EVIDENCIJI RADNIKA obeležiti vrstu isplate slovom R i uneti odgovarajuću <text:s/></text:p>
      <text:p text:style-name="P2"><text:tab/>ŠIFRU PRIHODA. <text:s/></text:p>
      <text:p text:style-name="P2"/>
      <text:p text:style-name="P2">Šifra za PPP PD:</text:p>
      <text:p text:style-name="P2"/>
      <text:p text:style-name="P7">1 09 101 00 0 – za penzionera po osnovu zaposlenja</text:p>
      <text:p text:style-name="P7">1 10 101 00 0 – za penzionera samostalnih delatnosti</text:p>
      <text:p text:style-name="P7">1 12 101 00 0  – za vojnog penzionera</text:p>
      <text:p text:style-name="P7">1 13 101 00 0  – za poljoprivrednog penzionera </text:p>
      <text:p text:style-name="P2"/>
      <text:p text:style-name="P2"><text:tab/></text:p>
      <text:p text:style-name="P2"><text:span text:style-name="T1"><text:tab/>1. <text:s/>U slučaju</text:span> da <text:span text:style-name="T1">penzioner plaća doprinos za zdravstveno osiguranje u PARAMETRIMA 1 unesite procenat za obračun zdravstvenog osiguranja na oba tereta 5,15%.</text:span></text:p>
      <text:p text:style-name="P2"><text:tab/></text:p>
      <text:p text:style-name="P2"><text:tab/>U PARAMETRIMA 2 vrstu isplate obeležiti brojem 5. <text:span text:style-name="T1"><text:s/></text:span></text:p>
      <text:p text:style-name="P3"/>
      <text:p text:style-name="P1">Koristiti formulu za preračun neta na bruto:</text:p>
      <text:p text:style-name="P1"/>
      <text:p text:style-name="P2"><text:s text:c="55"/><text:tab/><text:tab/>NETO – UPO x SP</text:p>
      <text:p text:style-name="P2"><text:s text:c="36"/><text:tab/>BRUTO = <text:s text:c="4"/>--------------------------</text:p>
      <text:p text:style-name="P2"><text:s text:c="67"/><text:tab/><text:tab/>0,7085 </text:p>
      <text:p text:style-name="P2"><text:tab/></text:p>
      <text:p text:style-name="P2"><text:tab/>NETO – UGOVORENA NETO ZARADA</text:p>
      <text:p text:style-name="P2"><text:tab/>UPO – NEOPOREZIVI IZNOS ZARADE ( UMANJENJE PORESKE OSNOVICE )</text:p>
      <text:p text:style-name="P2"><text:tab/>SP – STOPA POREZA</text:p>
      <text:p text:style-name="P2"/>
      <text:p text:style-name="P5">NAPOMENA – <text:s/>Pri promeni propisanih stopa za obračun poreza i doprinosa potrebno je uraditi preračun koeficijenta.</text:p>
      <text:p text:style-name="P2"/>
      <text:p text:style-name="P2"><text:tab/></text:p>
      <text:p text:style-name="P4"><text:tab/>2. <text:s/>U slučaju da radite obračun u kom penzioner ne plaća zdravstveno osiguranje,VAŽI SAMO ZA VOJNE PENZIONERE, POTRBNO JE u PARAMETRIMA 1 izbrisati procenat za obračun zdravstvenog osiguranja na teret radnika i na teret poslodavca.</text:p>
      <text:p text:style-name="P1"/>
      <text:p text:style-name="P2"><text:tab/>U PARAMETRIMA 2 vrstu isplate obeležiti brojem 5. <text:span text:style-name="T1"><text:s/></text:span></text:p>
      <text:p text:style-name="P3"/>
      <text:p text:style-name="P1">Koristiti formulu za preračun neta na bruto:</text:p>
      <text:p text:style-name="P1"/>
      <text:p text:style-name="P2"><text:s text:c="55"/><text:tab/><text:tab/>NETO – UPO x SP</text:p>
      <text:p text:style-name="P2"><text:s text:c="36"/><text:tab/>BRUTO = <text:s text:c="4"/>--------------------------</text:p>
      <text:p text:style-name="P2"><text:s text:c="67"/><text:tab/><text:tab/>0,760</text:p>
      <text:p text:style-name="P2"><text:s/></text:p>
      <text:p text:style-name="P2"><text:tab/>NETO – UGOVORENA NETO ZARADA</text:p>
      <text:p text:style-name="P2"><text:tab/>UPO – NEOPOREZIVI IZNOS ZARADE ( UMANJENJE PORESKE OSNOVICE )</text:p>
      <text:p text:style-name="P2"><text:tab/>SP – STOPA POREZA</text:p>
      <text:p text:style-name="P2"><text:tab/><text:span text:style-name="T5">NAKON OBRAČUNA NA NETO DODATI IZNOS ZDRAVSTVENOG OSIGURANJA.</text:span></text:p>
      <text:p text:style-name="P8"/>
      <text:p text:style-name="P2"><text:soft-page-break/></text:p>
      <text:p text:style-name="P2"/>
      <text:p text:style-name="P2"><text:tab/></text:p>
      <text:p text:style-name="P2"><text:tab/>3. <text:s/>Ako zaposleni penzioner ostvaruje zaradu višu od najviše ili nižu od najniže osnovice, POTREBNO JE <text:s/>U EVIDENCIJI ZAPOSLENIH U KOLONU Ropnr uneti broj 1 ili <text:s/>na KARTICI F7 popuniti polje NEPUNO RADNO VREME KOD JEDNOG POSLODAVCA, MFP3 ( procenat radnog angžovanja ) i MFP8 ( oznaka 1 za zaposlenog sa nepunim radnim vremenom ) pozicije. </text:p>
      <text:p text:style-name="P2"/>
      <text:p text:style-name="P2"><text:tab/>U PARAMETRIMA 2 vrstu isplate obeležiti brojem 5. <text:span text:style-name="T1"><text:s/></text:span></text:p>
      <text:p text:style-name="P2"/>
      <text:p text:style-name="P1">Preračun neta na bruto vrši se po formuli: </text:p>
      <text:p text:style-name="P2"/>
      <text:p text:style-name="P2"><text:s text:c="7"/><text:tab/> <text:s text:c="29"/>NETO – UPO x SP + SD - <text:span text:style-name="T3">od NnO ili od NvO ( 19,5% )</text:span></text:p>
      <text:p text:style-name="P2"><text:s text:c="16"/>BRUTO = <text:s text:c="4"/>----------------------------------------------------------------------</text:p>
      <text:p text:style-name="P2"><text:s text:c="67"/><text:tab/><text:tab/> <text:s/>0,9</text:p>
      <text:p text:style-name="P2"/>
      <text:p text:style-name="P2"><text:tab/>NETO – UGOVORENA NETO ZARADA</text:p>
      <text:p text:style-name="P2"><text:tab/>UPO – NEOPOREZIVI IZNOS ZARADE ( UMANJENJE PORESKE OSNOVICE )</text:p>
      <text:p text:style-name="P2"><text:tab/>SP – STOPA POREZA</text:p>
      <text:p text:style-name="P2"><text:tab/>SD – IZNOS <text:s/>PIO DOPRINOSA OBRAČUNAT NA NAJVIŠU ODNOSNO <text:tab/><text:tab/> <text:s text:c="8"/>NAJNIŽU OSNOVICU NA TERET ZAPOSLENOG.</text:p>
      <text:p text:style-name="P2"><text:tab/><text:span text:style-name="T3">NnO - <text:s/>Propisana najniža osnovica za doprinose.</text:span></text:p>
      <text:p text:style-name="P6"><text:tab/>NvO - <text:s/>Propisana najviša osnovica za doprinose.</text:p>
      <text:p text:style-name="P2"/>
      <text:p text:style-name="P2"><text:tab/><text:span text:style-name="T2">NAPOMENA – NETO UMANJITI ZA IZNOS DOPRINOSA ZA ZDRAVSTVENO OSIGURANJE NA TERET ZAPOSLENOG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18-02-08T10:58:31.95</meta:creation-date>
    <dc:date>2022-05-25T12:25:18.28</dc:date>
    <dc:creator>Jozef Brnić</dc:creator>
    <meta:editing-duration>PT16H38M30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2" meta:paragraph-count="49" meta:word-count="389" meta:character-count="2908"/>
  </office:meta>
</office:document-meta>
</file>