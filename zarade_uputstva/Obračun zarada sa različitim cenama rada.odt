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UTSTVO ZA OBRAČUN ZARADA</text:p>
      <text:p text:style-name="P2">ZA RAZLIČITE CENE RADA U ISTOM OBRAČUNU</text:p>
      <text:p text:style-name="P2"/>
      <text:p text:style-name="P1"><text:tab/>U <text:s/>EVIDENCIJI ZAPOSLENIH u kolonu START BOD svim zaposlenima uneti broj 1. Zaposlene svrstati u grupe prema ceni rada po času, koristiti kolonu GRUPA u EVIDENCIJI ZAPOSLENIH. Kroz PLATNI SPISAK koristiti BRUTO OBRAČUN i obavezno uneti oznaku grupe pri promeni cene rada u toku samog obračuna. Neophodno je preračunati bruto cenu rada prema časovima u mesecu za koji radite obračun za svaku GRUPU. </text:p>
      <text:p text:style-name="P1"><text:tab/>Koristiti formulu za preračun neta na bruto:</text:p>
      <text:p text:style-name="P1"/>
      <text:p text:style-name="P1"><text:s text:c="66"/>NETO – UPO x SP</text:p>
      <text:p text:style-name="P1"><text:tab/><text:tab/><text:tab/><text:tab/>BRUTO = --------------------------</text:p>
      <text:p text:style-name="P1"><text:s text:c="77"/>0.701 <text:s text:c="8"/></text:p>
      <text:p text:style-name="P1"/>
      <text:p text:style-name="P1"><text:tab/>NETO – Ugovorena neto zarada, ili ugovorena neto zarada po času x broj časova u mesecu</text:p>
      <text:p text:style-name="P1"><text:tab/>UPO – NEOPOREZIVI IZNOS ZARADE ( UMANJENJE PORESKE OSNOVICE ) </text:p>
      <text:p text:style-name="P1"><text:tab/>SP – STOPA POREZA </text:p>
      <text:p text:style-name="P1"/>
      <text:p text:style-name="P1"><text:tab/>Do kraja 2022.godine neoporezivi iznos zarade je 19 300. <text:s/></text:p>
      <text:p text:style-name="P1"/>
      <text:p text:style-name="P1"><text:tab/><text:tab/> <text:s text:c="41"/>NETO – 1 930</text:p>
      <text:p text:style-name="P1"><text:tab/><text:tab/><text:tab/><text:tab/>BRUTO = -------------------</text:p>
      <text:p text:style-name="P1"><text:s text:c="73"/>0.701 <text:s text:c="8"/></text:p>
      <text:p text:style-name="P1"><text:tab/>PRIMERI :</text:p>
      <text:p text:style-name="P1"/>
      <text:p text:style-name="Standard">GRUPA 1 = 250.64 dinara po času NETO.</text:p>
      <text:p text:style-name="Standard"/>
      <text:p text:style-name="Standard"><text:tab/>BRUTO CENA RADA ZA OBRAČUN:</text:p>
      <text:p text:style-name="Standard"/>
      <text:list xml:id="list1960637585576346130" text:style-name="L1">
        <text:list-item>
          <text:list>
            <text:list-item>
              <text:p text:style-name="P3">Za 168h = 57 314.58</text:p>
            </text:list-item>
            <text:list-item>
              <text:p text:style-name="P3">Za 176h = 60 174.95</text:p>
            </text:list-item>
            <text:list-item>
              <text:p text:style-name="P3">Za 184h = 63 035.32</text:p>
              <text:p text:style-name="P3"/>
            </text:list-item>
          </text:list>
        </text:list-item>
      </text:list>
      <text:p text:style-name="Standard">GRUPA 2 = 276.64 dinara po času NETO.</text:p>
      <text:p text:style-name="Standard"/>
      <text:list xml:id="list6475952638398916100" text:style-name="L2">
        <text:list-item>
          <text:list>
            <text:list-item>
              <text:p text:style-name="P4">Za 168h = 63 545.68</text:p>
            </text:list-item>
            <text:list-item>
              <text:p text:style-name="P4">Za 176h = 66 702.77</text:p>
            </text:list-item>
          </text:list>
        </text:list-item>
      </text:list>
      <text:list xml:id="list37582402" text:continue-list="list1960637585576346130" text:style-name="L1">
        <text:list-item>
          <text:list>
            <text:list-item>
              <text:p text:style-name="P3">Za 184h = 69 859.86</text:p>
            </text:list-item>
          </text:list>
        </text:list-item>
      </text:list>
      <text:p text:style-name="Standard"/>
      <text:p text:style-name="Standard"/>
      <text:list xml:id="list37579569" text:continue-numbering="true" text:style-name="L1">
        <text:list-item>
          <text:list>
            <text:list-header>
              <text:p text:style-name="P3">OBRAČUN ZA MESEC KOJI IMA <text:span text:style-name="T1">168h</text:span> IMA <text:span text:style-name="T1">DVE</text:span> CENE RADA, ZA SVAKU GRUPU OBRAČUN RADITE SA RAZLICITOM CENOM RADA. U našem primeru to bi bile sledeće cene rada: </text:p>
              <text:p text:style-name="P3"/>
            </text:list-header>
            <text:list-item>
              <text:p text:style-name="P3"><text:s/>GRUPA 1 = 250.64 dinara po času NETO. <text:span text:style-name="T1">Bruto cena rada = 57 314.58</text:span></text:p>
            </text:list-item>
            <text:list-item>
              <text:p text:style-name="P3"><text:s/>GRUPA 2 = 276.64 dinara po času NETO. <text:span text:style-name="T1">Bruto cena rada = 63 545.68</text:span></text:p>
            </text:list-item>
          </text:list>
        </text:list-item>
      </text:list>
      <text:p text:style-name="P5"/>
      <text:p text:style-name="P5"><text:tab/>Svaki put kada se menja neoporezivi iznos zarade morate ponovo raditi preračun bruto zar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20-09-21T10:48:56.32</meta:creation-date>
    <dc:date>2022-03-10T17:33:20.61</dc:date>
    <dc:creator>Jozef Brnić</dc:creator>
    <meta:editing-duration>PT35M44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28" meta:word-count="269" meta:character-count="1732"/>
  </office:meta>
</office:document-meta>
</file>