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Calibri" style:font-size-asian="12pt" style:font-name-complex="Calibri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Times New Roman1" fo:font-size="12pt" fo:font-weight="normal" fo:background-color="transparent" style:font-name-asian="Times New Roman" style:font-size-asian="12pt" style:font-name-complex="Times New Roman" style:font-size-complex="12pt"/>
    </style:style>
    <style:style style:name="P8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9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10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loext:opacity="0%" style:font-name="Times New Roman" fo:font-size="12pt" fo:font-weight="normal" officeooo:paragraph-rsid="001b9809" fo:background-color="transparent" style:font-name-asian="Times New Roman" style:font-name-complex="Times New Roman"/>
    </style:style>
    <style:style style:name="P11" style:family="paragraph" style:parent-style-name="Standard" style:list-style-name="L2">
      <style:paragraph-properties fo:line-height="100%" fo:text-align="start" style:justify-single-word="false"/>
      <style:text-properties style:use-window-font-color="true" loext:opacity="0%" style:font-name="Times New Roman" fo:font-size="12pt" fo:font-weight="normal" officeooo:paragraph-rsid="001b9809" fo:background-color="transparent" style:font-name-asian="Times New Roman" style:font-name-complex="Times New Roman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13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loext:opacity="0%" style:font-name="Times New Roman" fo:font-size="12pt" fo:font-weight="normal" officeooo:paragraph-rsid="001b9809" fo:background-color="transparent" style:font-name-asian="Times New Roman" style:font-name-complex="Times New Roman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loext:opacity="0%" style:font-name="Times New Roman" fo:font-size="12pt" fo:font-weight="normal" officeooo:rsid="001b9809" officeooo:paragraph-rsid="001b9809" fo:background-color="transparent" style:font-name-asian="Times New Roman" style:font-name-complex="Times New Roman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2pt" fo:font-weight="normal" officeooo:rsid="001b9809" officeooo:paragraph-rsid="001b9809" fo:background-color="transparent" style:font-name-asian="Times New Roman" style:font-name-complex="Times New Roman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loext:opacity="0%" style:font-name="Times New Roman1" fo:font-size="12pt" fo:font-weight="normal" fo:background-color="transparent" style:font-name-asian="Times New Roman" style:font-size-asian="12pt" style:font-name-complex="Times New Roman" style:font-size-complex="12pt"/>
    </style:style>
    <style:style style:name="P19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01b9809"/>
    </style:style>
    <style:style style:name="T1" style:family="text">
      <style:text-properties style:use-window-font-color="true" loext:opacity="0%" style:font-name="Times New Roman" fo:font-size="12pt" fo:font-weight="normal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loext:opacity="0%" style:font-name="Times New Roman" fo:font-size="12pt" fo:font-weight="normal" officeooo:rsid="001b9809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loext:opacity="0%" style:font-name="Times New Roman" fo:font-size="12pt" fo:font-weight="normal" fo:background-color="transparent" loext:char-shading-value="0" style:font-name-asian="Times New Roman" style:font-weight-asian="normal" style:font-name-complex="Times New Roman" style:font-weight-complex="normal"/>
    </style:style>
    <style:style style:name="T4" style:family="text">
      <style:text-properties style:use-window-font-color="true" loext:opacity="0%" style:font-name="Times New Roman" fo:font-size="12pt" fo:language="zxx" fo:country="none" fo:font-weight="normal" fo:background-color="transparent" loext:char-shading-value="0" style:font-name-asian="Times New Roman" style:font-name-complex="Times New Roman"/>
    </style:style>
    <style:style style:name="T5" style:family="text">
      <style:text-properties style:use-window-font-color="true" loext:opacity="0%" style:font-name="Times New Roman" fo:font-size="12pt" fo:font-weight="bold" fo:background-color="transparent" loext:char-shading-value="0" style:font-name-asian="Times New Roman" style:font-weight-asian="bold" style:font-name-complex="Times New Roman" style:font-weight-complex="bold"/>
    </style:style>
    <style:style style:name="T6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7" style:family="text">
      <style:text-properties style:use-window-font-color="true" loext:opacity="0%" style:font-name="Times New Roman1" fo:font-size="12pt" fo:font-weight="normal" fo:background-color="transparent" loext:char-shading-value="0" style:font-name-asian="Times New Roman" style:font-size-asian="12pt" style:font-name-complex="Times New Roman" style:font-size-complex="12pt"/>
    </style:style>
    <style:style style:name="T8" style:family="text">
      <style:text-properties officeooo:rsid="001b9809"/>
    </style:style>
    <style:style style:name="T9" style:family="text">
      <style:text-properties fo:color="#c9211e" loext:opacity="100%"/>
    </style:style>
    <text:list-style style:name="L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REDITI</text:p>
      <text:p text:style-name="P4"/>
      <text:p text:style-name="P2">EVIDENCIJA KREDITA</text:p>
      <text:p text:style-name="P4"/>
      <text:p text:style-name="P4"/>
      <text:p text:style-name="P3">Sadržaj tabele:</text:p>
      <text:p text:style-name="P5"/>
      <text:list text:style-name="L1">
        <text:list-item>
          <text:p text:style-name="P8">KREDIT – Redni broj kredita.</text:p>
        </text:list-item>
        <text:list-item>
          <text:p text:style-name="P8">BROJ – Broj pod kojim je radnik koji ima kredit zaveden u evidenciji zaposlenih. </text:p>
        </text:list-item>
        <text:list-item>
          <text:p text:style-name="P8">ŠIFRA – Šifra partnera. Banka ili firma na čiji račun se uplaćuju rate kredita.</text:p>
        </text:list-item>
        <text:list-item>
          <text:p text:style-name="P8">PARTIJA – Partija uplatnog računa za uplatu rata kredita.</text:p>
        </text:list-item>
        <text:list-item>
          <text:p text:style-name="P8">IZNOS – Ukupan iznos kredita.</text:p>
        </text:list-item>
        <text:list-item>
          <text:p text:style-name="P8">KOLIKO – Broj rata kredita.</text:p>
        </text:list-item>
        <text:list-item>
          <text:p text:style-name="P8">PRVARATA – Iznos prve rate.</text:p>
        </text:list-item>
        <text:list-item>
          <text:p text:style-name="P8">OSTALERATE – Iznos ostalih rata.</text:p>
        </text:list-item>
        <text:list-item>
          <text:p text:style-name="P8">ZAODBITAK – * ( zvezdica ) oznaka da je kredit aktivan</text:p>
        </text:list-item>
        <text:list-item>
          <text:p text:style-name="P19"><text:span text:style-name="T1">AKTIVRATA - <text:s/>Iznos rate koju unosite u obračun. Uvek mora da bude iznos za obra</text:span><text:span text:style-name="T4">čun koji ste odredili u PARAMETRIMA 2 . Posebno je važno prilagoditi podatke kod prve i druge ( konačne ) isplate. Ukoliko radite prvu isplatu ova kolona sadrži samo rate koje se obračunavaju kroz prvu isplatu. Kada radite konačnu isplatu iz ove kolone brišete rate koje ste uneli za prvu isplatu i unosite samo one rate koje obračunavate kroz konačnu isplatu.</text:span></text:p>
        </text:list-item>
        <text:list-item>
          <text:p text:style-name="P8">AKONTRATA – Iznos rate koja se obračunava kroz akontaciju ( prvu isplatu ), u sučaju da nekim radnicima kredit obustavljate samo kroz prvu isplatu zarade, a ne kroz konačnu isplatu.</text:p>
        </text:list-item>
        <text:list-item>
          <text:p text:style-name="P8">OSTATAK – Iznos preostalog duga.</text:p>
        </text:list-item>
        <text:list-item>
          <text:p text:style-name="P8">ODBIJENO – Inzos odbijenih rata.</text:p>
        </text:list-item>
        <text:list-item>
          <text:p text:style-name="P8">EVIDENCIONIBROJ - Evidencioni broj</text:p>
        </text:list-item>
        <text:list-item>
          <text:p text:style-name="P8">MODELO- Automatsko polje. <text:s/></text:p>
        </text:list-item>
        <text:list-item>
          <text:p text:style-name="P8">DATUMDOKUMENTA – Datum <text:s/>ugovora kreditnog ugovora.</text:p>
        </text:list-item>
        <text:list-item>
          <text:p text:style-name="P8">GRUPA - Grupa </text:p>
        </text:list-item>
        <text:list-item>
          <text:p text:style-name="P8">ARHIVA – Automatski označava * ukoliko je kredit otplaćen.</text:p>
        </text:list-item>
        <text:list-item>
          <text:p text:style-name="P8">ARHIVA2 – Automatsko polje. <text:s/></text:p>
        </text:list-item>
        <text:list-item>
          <text:p text:style-name="P8">PRENETO – Automatsko polje. <text:s text:c="2"/></text:p>
        </text:list-item>
        <text:list-item>
          <text:p text:style-name="P8">NUMRED - Automatsko polje. <text:s/></text:p>
        </text:list-item>
        <text:list-item>
          <text:p text:style-name="P8">IDBR - Automatsko polje. <text:s/></text:p>
        </text:list-item>
      </text:list>
      <text:p text:style-name="P4"/>
      <text:p text:style-name="P4"/>
      <text:p text:style-name="P2">FUNKCIJA DUGMADI ISPOD TABELE</text:p>
      <text:p text:style-name="P4"/>
      <text:list xml:id="list3253978680" text:style-name="L2">
        <text:list-item>
          <text:p text:style-name="P9">DOLE, GORE, ZADNJI I PRVI – Služe za kretanje gore dole kroz tabelu.</text:p>
        </text:list-item>
        <text:list-item>
          <text:p text:style-name="P9">DODAJ - <text:s/>Klikom na dugme dodajete novi kredit u tabelu.</text:p>
        </text:list-item>
        <text:list-item>
          <text:p text:style-name="P9">TRAŽI PARTNERA F4 – Pretraga kredita po šifri partnera. <text:s/></text:p>
        </text:list-item>
        <text:list-item>
          <text:p text:style-name="P9">TRAŽI EVIDENCIONI BROJ F5 – Pretraga kredita po evidencionom broju radnika.</text:p>
        </text:list-item>
        <text:list-item>
          <text:p text:style-name="P9">TRAŽI ŠIFRU F6 <text:s/>- Pretraga kredita po šifri ranika.</text:p>
        </text:list-item>
        <text:list-item>
          <text:p text:style-name="P9">TRAŽI KREDIT – Pretraga kredita po broju kredita.</text:p>
        </text:list-item>
        <text:list-item>
          <text:p text:style-name="P9">JEDAN KREDIT – Pregled podataka za jedan kredit.</text:p>
        </text:list-item>
        <text:list-item>
          <text:p text:style-name="P9">SORTIRANJE – Vraćanje tabele u prvobitni redosled koji se promenio pri pregledu ili traženju.</text:p>
        </text:list-item>
        <text:list-item>
          <text:p text:style-name="P9">AKTIVNI KREDITI – Pregled aktivnih kredita.</text:p>
        </text:list-item>
        <text:list-item>
          <text:p text:style-name="P9">RADNICI F7 – Povezivanje sa evidencijom radnika, služi za unos šifre radnika u tabelu.</text:p>
        </text:list-item>
        <text:list-item>
          <text:p text:style-name="P9">PARTNERI F8 – Povezivanje sa evdencijom partnera, služi za unos šifre partnera u tabelu.</text:p>
        </text:list-item>
        <text:list-item>
          <text:p text:style-name="P9">RASKNJIŽAVANJE PLATE – Evidentiranje odbijenih rata kredita iz obračuna, u tabeli i u <text:soft-page-break/>pregledu otplata.</text:p>
        </text:list-item>
        <text:list-item>
          <text:p text:style-name="P9">RASKNJIŽAVANJE AKONTACIJE - Evidentiranje odbijenih rata kredita iz akontacije, u tabeli i u pregledu otplata.</text:p>
        </text:list-item>
        <text:list-item>
          <text:p text:style-name="P9">SREĐIVANJE KREDITA – Evidentiranje novih kredita – ZADUŽENJA – u pregledu otplata. </text:p>
        </text:list-item>
        <text:list-item>
          <text:p text:style-name="P10">PREGLED OTPLATA – Pregled otplata evidentiranih kredita.</text:p>
        </text:list-item>
        <text:list-item>
          <text:p text:style-name="P11">KONAČNO <text:s/>I <text:s/>AKONTACIONO – Ispod ovih polja su funkcionalna dugmad koja koristite prema tome da li hoćete pregled kredita koje obračunavate kroz konačnu isplatu ili kroz akontaciju, za mesec koji ste odredili u PARAMETRIMA 2. </text:p>
        </text:list-item>
        <text:list-item>
          <text:p text:style-name="P11">SPISAK JEDNE FIRME – Klikom na kredit u tabeli ( bilo koje polje ) zatim na dugme SPISAK JEDNE FIRME dobijate pregled rata kredita za mesec koji ste odredili u PARAMETRIMA 2. </text:p>
        </text:list-item>
      </text:list>
      <text:list text:style-name="L3">
        <text:list-item>
          <text:p text:style-name="P13">SALDO FIRMI – Klikom na dugme dobijate pregled ktivnih rata kredita za mesec koji ste odredili u PARAMETRIMA 2. za sve firme.</text:p>
        </text:list-item>
        <text:list-item>
          <text:p text:style-name="P13">SALDO RADNIKA – Klikom na dugme dobijate dobijate pregled aktivnih rata, za sve radnike, za mesec koji ste odredili u PARAMETRIMA 2. </text:p>
        </text:list-item>
        <text:list-item>
          <text:p text:style-name="P13">SVE FIRME - Klikom na dugme dobijate dobijate pregled aktivnih rata, za sve firme, za mesec koji ste odredili u PARAMETRIMA 2. </text:p>
        </text:list-item>
        <text:list-item>
          <text:p text:style-name="P13">LISTIĆI RADNICI – </text:p>
        </text:list-item>
        <text:list-item>
          <text:p text:style-name="P13">LISTIĆ RADNIK -</text:p>
        </text:list-item>
      </text:list>
      <text:p text:style-name="P4"/>
      <text:p text:style-name="P4"/>
      <text:p text:style-name="P2">UNOS <text:s/>PODATAKA <text:s/>ZA <text:s/>ZA <text:s/>KREDIT</text:p>
      <text:p text:style-name="P4"/>
      <text:p text:style-name="P3"><text:tab/></text:p>
      <text:p text:style-name="P3"><text:tab/><text:tab/> </text:p>
      <text:p text:style-name="P14"><text:tab/>Iz glavnog menija Zarade i <text:s/>druga lična primanja kliktite na dugme KREDITI. Otvorili ste meni Evidencija kredita. </text:p>
      <text:p text:style-name="P14"><text:tab/>Klikom na dugme plus otvarate tabelu za unos novog kredita.</text:p>
      <text:p text:style-name="P14"><text:tab/>Kliknite u polje BROJ pa na dugme RADNICI F7 i otvoriće se podmeni </text:p>
      <text:p text:style-name="P14">EVIDENCIJA ZAPOSLENIH. </text:p>
      <text:p text:style-name="P14"><text:tab/>Strelicama gore dole, tasterima gore dole, klikom miša <text:span text:style-name="T8">na ime zaposlenog </text:span>ili <text:span text:style-name="T8">kucanjem njegovog imena </text:span>u belom polju ispod tabele, <text:span text:style-name="T8">selektujete zaposlenog kome evidentirate kredit,</text:span> a zatim kliknite na izlaz. </text:p>
      <text:p text:style-name="P14"><text:tab/>U polju BROJ sada imate šifru radnika kome evidentirate kredit, a u plavom polju ispod tabele ubeleženo je njegovo ime i prezime. </text:p>
      <text:p text:style-name="P20"><text:span text:style-name="T1"><text:tab/>Sada kliknite mišem u polje ŠIFRA, pa na taster PARTNERI F8 i otvoriće vam se podmeni PARTNERI 1. Na isti način kako ste izabrali radnika izaberite i partnera. Ukoliko nemate datog partnera, unesite ga. </text:span><text:span text:style-name="T3">Kliknite na DODAJ i otvoriće se KARTICA FIRME koja sadrži OPŠTE PODATKE, KOMERCIJALNE PODATKE i OSTALO. Klikom miša otvarate polja za unos podataka, a popunjavate ih prema vašim potrebama. <text:s/></text:span></text:p>
      <text:p text:style-name="P20"><text:span text:style-name="T3"><text:tab/></text:span><text:span text:style-name="T5">OBAVEZAN JE UNOS NAZIVA PARTNERA I BROJA ŽIRO RAČUNA.</text:span><text:span text:style-name="T1"> </text:span><text:span text:style-name="T2">ŠIFRU SELEKTOVANOG PARTNERA PRENOSITE U POLJE ŠIFRA tabele kredita k</text:span><text:span text:style-name="T1">lik</text:span><text:span text:style-name="T2">om</text:span><text:span text:style-name="T1"> na dugme IZLAZ. </text:span></text:p>
      <text:p text:style-name="P20"><text:span text:style-name="T1"><text:tab/>U polju šifra sada imate broj partnera, a u narandžastom polju ispod tabele vidite njegov naziv i broj računa. </text:span></text:p>
      <text:p text:style-name="P20"><text:span text:style-name="T1"><text:tab/>Kliknite u polje PARTIJA i unesite broj partije za uplatu kredita, iz ugovora o kreditu, </text:span><text:span text:style-name="T2">administrativne zabrane ili drugog dokumenta sa podacima o obustavi</text:span><text:span text:style-name="T1">.</text:span></text:p>
      <text:p text:style-name="P14"/>
      <text:p text:style-name="P17"><text:span text:style-name="T9">NAPOMENA</text:span> </text:p>
      <text:p text:style-name="P17"/>
      <text:p text:style-name="P16"><text:tab/>Ukoliko imate kredite ili administrativne zabrane, za više zaposlenih kod istog partnera, a sa različitim pozivivima na broj, različitim PARTIJAMA, za svaki novi poziv na broj morate otvoriti <text:span text:style-name="T9">različite šifre partnera</text:span> sa istim osnovnim podacima ( naziv partnera, tekući račun ) i <text:soft-page-break/><text:span text:style-name="T9">povezati ih sa različitim pozivima na broj</text:span>, odnosno kreditima. Ukoliko to ne uradite, prilikom formiranja naloga za plaćanje kredita, program će sve iznose sabrati u jedan nalog prema šifri partnera, i povezati ga sa prvim unetim pozivom na broj iz tabele kredita, a vi ćete partneru morati da šaljete poseban izveštaj sa podacima zaposlenih, njihovim pozivima na broj, PARTIJAMA i iznosom kredita.</text:p>
      <text:p text:style-name="P16"/>
      <text:p text:style-name="P14"><text:tab/>Na isti način popunite ostale podatke prema sadržaju tabele. Iznos kredita, broj rata kredita, iznos prve rate, iznos ostalih rata, za odbitak ( * ), i datum dokumenta. </text:p>
      <text:p text:style-name="P14"><text:tab/>Polje AKTIVNA RATA – popunjavate ili kontrolišete uvek pre unosa podataka u obračun.</text:p>
      <text:p text:style-name="P14"><text:tab/>AKONTRATA - popunjavate samo u slučaju da imate više isplata zarade za isti mesec i da odrđene kredite obračunavate kroz prvu isplatu. Ostala polja ne popunjavate. </text:p>
      <text:p text:style-name="P14"><text:tab/>Sada kliknite na taster SREĐIVANJE KREDITA, pa taster PREGLED OTPLATA, da bi ste mogli da pratite otplate. </text:p>
      <text:p text:style-name="P3"><text:tab/>SREĐIVANJE KREDITA je obavezan korak pri svakom unosu novog kredita.</text:p>
      <text:p text:style-name="P6"/>
      <text:p text:style-name="P5"/>
      <text:p text:style-name="P5"/>
      <text:p text:style-name="P2"/>
      <text:p text:style-name="P2">OBRAČUN ZARADA SA KREDITIMA</text:p>
      <text:p text:style-name="P5"><text:tab/></text:p>
      <text:p text:style-name="P5"/>
      <text:p text:style-name="P1"><text:span text:style-name="T6"><text:tab/></text:span><text:span text:style-name="T7">Prvo pregledajte kredite i proverite iznose aktivnih rata. </text:span></text:p>
      <text:p text:style-name="P7">Ako imate samo jednu isplatu zarade kao konačnu aktivna rata će uvek biti ista. </text:p>
      <text:p text:style-name="P7">Ako imate više isplata, aktivnu ratu menjate u zavisnosti od toga koju isplatu radite.</text:p>
      <text:p text:style-name="P7"><text:tab/>Kada radite prvu isplatu za jedan mesec i imate kredite u prvoj isplati, aktivna i akontativna rata sadrže isti iznos. Aktivna rata kod kredita koje ne obračunavate kroz akontaciju mora biti 0.</text:p>
      <text:p text:style-name="P7"><text:tab/>Kada radite drugu isplatu aktivna rata kod kredita koje obračunavate kroz drugu isplatu sadrži iznos rate kredita, a aktivna rata kod kredita koje ste već obračunali kroz akontaciju mora biti 0. <text:s/></text:p>
      <text:p text:style-name="P3"><text:tab/>Kod svakog obračuna zarada pregledajte PARAMETRE 2. U PARAMETRIMA 2 obavezno popunite polje REDNI <text:s/>BROJ <text:s/>ISPLATE <text:s/>I KONAČNA ISPLATA u skladu sa obračunom koji radite. <text:s text:c="2"/><text:tab/></text:p>
      <text:p text:style-name="P3"><text:tab/>Unos podataka za kredit je automatski. Iz platnog spiska kliknite na dugme </text:p>
      <text:p text:style-name="P3">PRENOSI, </text:p>
      <text:p text:style-name="P3">PRENOS KREDITA, </text:p>
      <text:p text:style-name="P3">ŽELIM PRENOS KREDITA, </text:p>
      <text:p text:style-name="P3">IZLAZ i još jednom </text:p>
      <text:p text:style-name="P3">IZLAZ. Krediti su sada uneti u platni spisak. Sa obračunom nastavljate standardno.</text:p>
      <text:p text:style-name="P4"/>
      <text:p text:style-name="P4"/>
      <text:p text:style-name="P4"/>
      <text:p text:style-name="P2">PRAĆENJE KREDITA</text:p>
      <text:p text:style-name="P4"/>
      <text:p text:style-name="P4"/>
      <text:p text:style-name="P1"><text:span text:style-name="T1"><text:tab/></text:span><text:span text:style-name="T5">Nakon obračuna zarade</text:span><text:span text:style-name="T1"> iz </text:span></text:p>
      <text:p text:style-name="P3">GLAVNOG MENIJA ZARADE I DRUGA LIČNA PRIMANJA kliknite na dugme KREDITI. Sada kliknite na dugme </text:p>
      <text:p text:style-name="P3">RASKNJIŽAVANJE PLATE ILI RASKNJIŽAVANJE AKONTACIJE <text:s/>( podatak mora da bude isti kao i u PARAMETRIMA 2 za zaradu koju rasknjižavate ). Unesite datum plaćanja koji ste uneli u PPP - PD i kliknite na dugme </text:p>
      <text:p text:style-name="P3"><text:soft-page-break/>U REDU. Kliknite na dugme </text:p>
      <text:p text:style-name="P3">PREGLED OTPLATA da bi ste videli evidentirane uplate i dugovanja ili štampali preglede kredita.</text:p>
      <text:p text:style-name="P3"><text:tab/>Rasknjižavanje akontacije ( prve isplate ) obavezno je pre obračuna konačne isplate, ukoliko imate rate kredita koje obračunavate samo kroz akontaciju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2-01T17:21:44.945000000</dc:date>
    <meta:editing-duration>PT7H30M51S</meta:editing-duration>
    <meta:editing-cycles>6</meta:editing-cycles>
    <meta:generator>LibreOffice/7.5.0.3$Windows_X86_64 LibreOffice_project/c21113d003cd3efa8c53188764377a8272d9d6de</meta:generator>
    <meta:document-statistic meta:table-count="0" meta:image-count="0" meta:object-count="0" meta:page-count="4" meta:paragraph-count="89" meta:word-count="1234" meta:character-count="7774" meta:non-whitespace-character-count="6540"/>
  </office:meta>
</office:document-meta>
</file>