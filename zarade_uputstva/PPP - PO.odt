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1819a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rfc-language-tag="sr-Latn-RS" fo:language="sr" fo:script="Latn" fo:country="RS"/>
    </style:style>
    <style:style style:name="T4" style:family="text">
      <style:text-properties style:rfc-language-tag="sr-Latn-RS" fo:language="sr" fo:script="Latn" fo:country="RS" officeooo:rsid="0011819a"/>
    </style:style>
    <style:style style:name="T5" style:family="text">
      <style:text-properties style:rfc-language-tag="sr-Latn-RS" fo:language="sr" fo:script="Latn" fo:country="RS" fo:font-weight="normal" officeooo:rsid="0011819a" style:font-weight-asian="normal" style:font-weight-complex="normal"/>
    </style:style>
    <style:style style:name="T6" style:family="text">
      <style:text-properties officeooo:rsid="00118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P – PO POTVDA</text:p>
      <text:p text:style-name="P1"/>
      <text:p text:style-name="P2"><text:tab/>PPP – PO <text:span text:style-name="T6">š</text:span><text:span text:style-name="T4">tampate</text:span><text:span text:style-name="T3"> </text:span><text:span text:style-name="T4">iz</text:span><text:span text:style-name="T3"> </text:span><text:span text:style-name="T1">ZARADA</text:span>.</text:p>
      <text:p text:style-name="P2"/>
      <text:p text:style-name="P4"><text:tab/><text:span text:style-name="T2">GLAVNI MENI &gt; ZARADE &gt; </text:span><text:span text:style-name="T5">ARHIVA ZARADA – Proverite da li ste arhivirali sve zarade i izađite iz arhive.</text:span></text:p>
      <text:p text:style-name="P4"><text:span text:style-name="T5"><text:tab/>Sada kliknite na </text:span><text:span text:style-name="T2">OBRAZAC PPP. </text:span><text:span text:style-name="T5">Ispod prazne tabele kliknite na dugme PREUZMI ZARADE &gt; POPUNI OPŠTE PODATKE &gt; PPP-PO. </text:span></text:p>
      <text:p text:style-name="P2"/>
      <text:p text:style-name="P5"><text:tab/></text:p>
      <text:p text:style-name="P2"/>
      <text:p text:style-name="P2"><text:tab/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20-09-11T15:08:11.56</meta:creation-date>
    <dc:date>2023-11-07T13:44:36.977000000</dc:date>
    <meta:editing-duration>PT57M25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6" meta:word-count="45" meta:character-count="266" meta:non-whitespace-character-count="215"/>
  </office:meta>
</office:document-meta>
</file>