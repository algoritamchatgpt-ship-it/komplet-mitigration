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 style:list-style-name="L2">
      <style:paragraph-properties fo:text-align="start" style:justify-single-word="false"/>
    </style:style>
    <style:style style:name="P8" style:family="paragraph" style:parent-style-name="Standard" style:list-style-name="L3">
      <style:paragraph-properties fo:text-align="start" style:justify-single-word="false"/>
    </style:style>
    <style:style style:name="P9" style:family="paragraph" style:parent-style-name="Standard" style:list-style-name="L6">
      <style:paragraph-properties fo:text-align="start" style:justify-single-word="false"/>
    </style:style>
    <style:style style:name="P10" style:family="paragraph" style:parent-style-name="Standard" style:list-style-name="L7">
      <style:paragraph-properties fo:text-align="start" style:justify-single-word="false"/>
    </style:style>
    <style:style style:name="P11" style:family="paragraph" style:parent-style-name="Standard" style:list-style-name="L4">
      <style:paragraph-properties fo:text-align="start" style:justify-single-word="false"/>
      <style:text-properties fo:font-weight="bold" style:font-weight-asian="bold" style:font-weight-complex="bold"/>
    </style:style>
    <style:style style:name="P12" style:family="paragraph" style:parent-style-name="Standard" style:list-style-name="L5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 style:parent-style-name="Standard" style:list-style-name="L4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 style:list-style-name="L7">
      <style:paragraph-properties fo:text-align="start" style:justify-single-word="false"/>
      <style:text-properties fo:language="zxx" fo:country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ČNA ZARADA PREDUZETNIKA</text:p>
      <text:p text:style-name="P1">PP-OD-P</text:p>
      <text:p text:style-name="P1"/>
      <text:p text:style-name="P2"><text:tab/>Iz GLAVNOG MENIJA ZARADE I DRUGA LIČNA PRIMANJA kliknite na dugme </text:p>
      <text:p text:style-name="P2">OD-P <text:s/>I <text:s/>OD-O, a zatim na dugme PP-OD-P PREDUZETNIK. Sada ste u tabeli Obrazac PP OD-P. Klikom na dugme + ispod tabele otvarate prvi red za unos podataka za obračun. </text:p>
      <text:p text:style-name="P2"><text:tab/>Kliknite na prazno polje isod naziva </text:p>
      <text:list xml:id="list1092113888730984970" text:style-name="L1">
        <text:list-item>
          <text:p text:style-name="P6">BROJ, zatim kliknite na dugme PRIMAOCI, pa na broj primaoca prihoda iz evidencije primaoca prihoda, kliknite na krstić i broj primaoca prihoda biće unet u tabelu. Ime i prezime primaoca prihoda sada vidite u žutom polju ispod tabele. Ukoliko nemate evidenciju primaoca prihoda morate je formirati. PRIMAOCI PRIHODA - posebno uputstvo. </text:p>
        </text:list-item>
      </text:list>
      <text:p text:style-name="P2"><text:tab/>Ostla polja popunjavate datim redosledom.</text:p>
      <text:list xml:id="list4832098997298540731" text:style-name="L2">
        <text:list-item>
          <text:p text:style-name="P7">GRUPA – U obračunu lične zarade preduzetnika se ne popounjava ( uvek je 0 ).</text:p>
        </text:list-item>
        <text:list-item>
          <text:p text:style-name="P7">DATUM DOKUMENTA – Unesite datum obračuna.</text:p>
        </text:list-item>
        <text:list-item>
          <text:p text:style-name="P7">ZARADA – Unosite bruto podatak ako je zarada utvrđena u bruto iznosu. Ukoliko je zarada utvrđena u neto iznosu vršite preračun po formulama za preračun neta na bruto za ličnu zaradu preduzetnika, s obzirom na plaćanje doprinosa i visinu zarade, koristite jednu od sledećih formula. </text:p>
        </text:list-item>
      </text:list>
      <text:p text:style-name="P2"/>
      <text:list xml:id="list2665922039989742297" text:style-name="L3">
        <text:list-header>
          <text:p text:style-name="P8"><text:span text:style-name="T3">Za preduzetnika se plaćaju svi dorinosi, nije osiguran po drugom osnovu. </text:span><text:s text:c="106"/></text:p>
        </text:list-header>
      </text:list>
      <text:p text:style-name="P2"><text:s text:c="121"/></text:p>
      <text:p text:style-name="P3"/>
      <text:p text:style-name="P3"><text:s text:c="79"/>NETO – UPO x SP </text:p>
      <text:p text:style-name="P3"><text:s text:c="9"/>OD 01.01.2020. <text:s text:c="24"/>BRUTO = ------------------------------------</text:p>
      <text:p text:style-name="P3"><text:s text:c="93"/>0,5395</text:p>
      <text:p text:style-name="P3"/>
      <text:p text:style-name="P3"><text:tab/>U kolonu zarada i osnovica unosite isti bruto iznos, koji ste dobili po prethodnoj formuli. </text:p>
      <text:list xml:id="list8222514510692481279" text:style-name="L4">
        <text:list-header>
          <text:p text:style-name="P11"/>
          <text:p text:style-name="P11"/>
          <text:p text:style-name="P13">Za predutenika se plaća samo dorinos PIO, osiguran je po drugom osnovu. </text:p>
        </text:list-header>
      </text:list>
      <text:p text:style-name="P4"/>
      <text:p text:style-name="P3"/>
      <text:p text:style-name="P2"><text:s text:c="79"/><text:span text:style-name="T1">NETO – UPO x SP</text:span></text:p>
      <text:p text:style-name="P3"><text:s text:c="59"/>BRUTO = ----------------------------</text:p>
      <text:p text:style-name="P3"><text:s text:c="91"/>0,65</text:p>
      <text:p text:style-name="P3"/>
      <text:p text:style-name="P3"><text:tab/>U kolonu zarada i osnovica unosite isti bruto iznos, koji ste dobili po prethodnoj formuli. </text:p>
      <text:p text:style-name="P2"/>
      <text:p text:style-name="P2"><text:tab/><text:span text:style-name="T3">Ako je zarada manja od najniže ili veća od najviše osnovice, a preduzetnik nije osiguran po drugom osnovu:</text:span></text:p>
      <text:p text:style-name="P2"/>
      <text:p text:style-name="P2"><text:s text:c="40"/><text:span text:style-name="T1"><text:s text:c="19"/>NETO – UPO x SP + SD od NnO ili od NvO( 36,05% )</text:span></text:p>
      <text:p text:style-name="P3"><text:s text:c="38"/>BRUTO = -------------------------------------------------------------------------</text:p>
      <text:p text:style-name="P3"><text:s text:c="98"/>0,9 <text:s/></text:p>
      <text:p text:style-name="P2"/>
      <text:list xml:id="list43687776" text:continue-numbering="true" text:style-name="L4">
        <text:list-header>
          <text:p text:style-name="P11"><text:s/>U kolonu zarada unosite bruto iznos, koji ste dobili po prethodnoj formuli, a u kolonu</text:p>
        </text:list-header>
      </text:list>
      <text:p text:style-name="P3">osnovica unosite iznos propisane najniže osnovice za doprinose ( NnO ) ili iznos najviše propisane osnovice za doprinose ( NvO ).</text:p>
      <text:list xml:id="list43674629" text:continue-numbering="true" text:style-name="L4">
        <text:list-header>
          <text:p text:style-name="P11"/>
        </text:list-header>
      </text:list>
      <text:p text:style-name="P2"><text:soft-page-break/></text:p>
      <text:p text:style-name="P3"><text:tab/><text:span text:style-name="T2">Ako je zarada manja od najniže ili veća od najviše osnovice, a preduzetnik je osiguran po drugom osnovu:</text:span></text:p>
      <text:p text:style-name="P2"/>
      <text:p text:style-name="P2"><text:s text:c="45"/><text:span text:style-name="T1"><text:s text:c="14"/>NETO – UPO x SP + SD od NnO ili od NvO ( 25% ) </text:span></text:p>
      <text:p text:style-name="P3"><text:s text:c="40"/>BRUTO = ------------------------------------------------------------------- <text:s text:c="2"/></text:p>
      <text:p text:style-name="P3"><text:s text:c="102"/>0,9</text:p>
      <text:p text:style-name="P3"/>
      <text:list xml:id="list43674459" text:continue-numbering="true" text:style-name="L4">
        <text:list-header>
          <text:p text:style-name="P11"><text:s/>U kolonu zarada unosite bruto iznos, koji ste dobili po prethodnoj formuli, a u kolonu</text:p>
        </text:list-header>
      </text:list>
      <text:p text:style-name="P3">osnovica unosite iznos propisane najniže osnovice za doprinose ( NnO ) ili iznos najviše propisane osnovice za doprinose ( NvO ).</text:p>
      <text:p text:style-name="P2"><text:tab/></text:p>
      <text:p text:style-name="P2"><text:tab/><text:span text:style-name="T1">Legenda:</text:span></text:p>
      <text:list xml:id="list1508935081912564666" text:style-name="L5">
        <text:list-header>
          <text:p text:style-name="P12">NETO – Ugovorena neto zarada </text:p>
          <text:p text:style-name="P12">UPO – Propisani neoporezivi iznos zarade ( umanjenje poreske osnovice )</text:p>
          <text:p text:style-name="P12">SP – Stopa poreza</text:p>
          <text:p text:style-name="P12">SD – Iznos doprinosa <text:s text:c="2"/></text:p>
        </text:list-header>
      </text:list>
      <text:p text:style-name="P3"><text:tab/>NnO - <text:s/>Propisana najniža osnovica za doprinose.</text:p>
      <text:p text:style-name="P3"><text:tab/>NvO - <text:s/>Propisana najviša osnovica za doprinose.</text:p>
      <text:p text:style-name="P3"/>
      <text:p text:style-name="P5">NAPOMENA – <text:s/>Pri promeni propisanih stopa za obračun poreza i doprinosa potrebno je uraditi preračun koeficijenata u formulama.</text:p>
      <text:p text:style-name="P2"/>
      <text:list xml:id="list1157438195489218953" text:style-name="L6">
        <text:list-item>
          <text:p text:style-name="P9">ZARADA – IZNOS BRUTO ZARADE</text:p>
        </text:list-item>
        <text:list-item>
          <text:p text:style-name="P9">OSNOVICA – OSNOVICA DOPRINOSA. Isti iznos kao bruto zarada osim u slučaju kada je zarada manja od najniže ili veća od najviše propisane osnovice za doprinose. Tada unosite iznos važeće najniže ili najviše osnovice za doprinose.</text:p>
        </text:list-item>
        <text:list-item>
          <text:p text:style-name="P9">NETO – Unosite neto iznos za isplatu, ako imate podatak, ukoliko nemate unesite ga nakon obračuna.</text:p>
        </text:list-item>
        <text:list-item>
          <text:p text:style-name="P9">NAJNIZA – Unosite iznos važeće najniže osnovice.</text:p>
        </text:list-item>
        <text:list-item>
          <text:p text:style-name="P9">NAJVISA – Unosite iznos važeće najviše osnovice.</text:p>
        </text:list-item>
        <text:list-item>
          <text:p text:style-name="P9">PROCPIO – 25,</text:p>
        </text:list-item>
        <text:list-item>
          <text:p text:style-name="P9">PROCZDR – 10,3. Ukoliko je preduzetnik osiguran po drugom osnovu ne unosite podatak.</text:p>
        </text:list-item>
        <text:list-item>
          <text:p text:style-name="P9">PRONEZ – 0,75. Ukoliko je preduzetnik osiguran po drugom osnovu ne unosite podatak.</text:p>
        </text:list-item>
        <text:list-item>
          <text:p text:style-name="P9">DOPSOC – Automatsko izračunavanje.</text:p>
        </text:list-item>
        <text:list-item>
          <text:p text:style-name="P9">DOPPIO - Automatsko izračunavanje.</text:p>
        </text:list-item>
        <text:list-item>
          <text:p text:style-name="P9">DOPZDR - Automatsko izračunavanje.</text:p>
        </text:list-item>
        <text:list-item>
          <text:p text:style-name="P9">DOPNEZ - Automatsko izračunavanje.</text:p>
        </text:list-item>
        <text:list-item>
          <text:p text:style-name="P9">PROCPOR – Procenat poreza – 10</text:p>
        </text:list-item>
        <text:list-item>
          <text:p text:style-name="P9">PORUMANJ – Propisan iznos poreskog oslobođenja – važeći podatak je 19 300,00</text:p>
        </text:list-item>
      </text:list>
      <text:p text:style-name="P2"/>
      <text:p text:style-name="P2">Ostala polja na desno ne popunjavate sve do polja:</text:p>
      <text:p text:style-name="P2"/>
      <text:list xml:id="list8323282746629382973" text:style-name="L7">
        <text:list-item>
          <text:p text:style-name="P10">MESEC – Unosite numerički broj meseca za koji radite obračun.</text:p>
        </text:list-item>
        <text:list-item>
          <text:p text:style-name="P10">NAZMES - Unosite naziv meseca za koji radite obračun.</text:p>
        </text:list-item>
        <text:list-item>
          <text:p text:style-name="P10">REDISPL – Unosite redni broj isplate.</text:p>
        </text:list-item>
        <text:list-item>
          <text:p text:style-name="P14">ŠIFRAPRIH – 103106000 – za preduzetnika,</text:p>
          <text:p text:style-name="P14"><text:s text:c="22"/>- 104107000 - za preduzetnika poljoprivrednika.</text:p>
        </text:list-item>
      </text:list>
      <text:p text:style-name="P2"><text:s text:c="19"/></text:p>
      <text:p text:style-name="P2"><text:tab/>Ako se, međutim, preduzetnik koji se opredelio za ličnu zaradu istovremeno svrstava u primaoce prihoda oznake 01 ( zaposleni ), 02 (član privrednog društva zaposlen u tom društvu), 08 <text:soft-page-break/>(vojni osiguranik), ili  09 ( penzioner po osnovu zaposlenosti ) , 10 ( penzioner po osnovu samostalne delatnosti ), 12 ( vojni penzioner ) i 13 ( poljoprivredni penzioneri ) za prijavljivanje lične zarade takvog preduzetnika šifru <text:span text:style-name="T1">primaoca prihoda</text:span> birate prema postojećem osiguranju. <text:tab/>Isplatilac oznake 04 ( poljoprivrednik ) koristi OVP 199 uz koju koristi TIP ISPLATE <text:s/>7 za PPP PD koja odgovara njegovoj konkretnoj situaciji. U ovom slučaju obavezno se plaćaju porez i doprinos za PIO – ŠIFRAPRIH – 104199000 – za poljoprivrednika koji doprinose plaća kroz registrovao poljoprivredno gazdinstvo, a je registrovao je i preduzetničku radnju, u okviru koje se opredelio za isplatu zarade preduzetnika. <text:s text:c="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Title" style:family="paragraph" style:parent-style-name="Standard" style:class="chapter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zef Brnić</meta:initial-creator>
    <meta:creation-date>2018-02-08T12:21:47.52</meta:creation-date>
    <dc:date>2022-03-10T23:44:21.88</dc:date>
    <dc:creator>Jozef Brnić</dc:creator>
    <meta:editing-duration>PT12H28M34S</meta:editing-duration>
    <meta:editing-cycles>17</meta:editing-cycles>
    <meta:generator>OpenOffice/4.1.1$Win32 OpenOffice.org_project/411m6$Build-9775</meta:generator>
    <meta:document-statistic meta:table-count="0" meta:image-count="0" meta:object-count="0" meta:page-count="3" meta:paragraph-count="64" meta:word-count="791" meta:character-count="6008"/>
  </office:meta>
</office:document-meta>
</file>