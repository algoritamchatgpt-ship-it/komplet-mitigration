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682EAE8EBC437287.png" manifest:media-type="image/png"/>
  <manifest:file-entry manifest:full-path="Pictures/100000000000055600000300DE6734D7E2C6431D.png" manifest:media-type="image/png"/>
  <manifest:file-entry manifest:full-path="Pictures/100000000000055600000300464988598E7A663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zxx" fo:country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97eab" style:font-weight-asian="bold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zxx" fo:country="none" fo:font-weight="bold" style:font-weight-asian="bold" style:font-weight-complex="bold"/>
    </style:style>
    <style:style style:name="T4" style:family="text">
      <style:text-properties fo:language="zxx" fo:country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RAČUN ZARADE ZA ZATVOR U KRAGUJEVCU</text:p>
      <text:p text:style-name="P1"/>
      <text:p text:style-name="P1"/>
      <text:p text:style-name="P2"><text:tab/>U EVIDECIJI ZAPOSLENIH je unet staž svim zaposlenima i zapolsleni su podeljeni u pet grupa. Prve tri grupe imaju istu cenu rada, četvrta grupa ima veću cenu rada od prve tri grupe, a peta grupa je formirana zbog polovine cene rada za isplatu akontacije. U ovoj grupi su zaposleni čija polovina zarade iznosi manje od najniže osnovice. Pre samog unosa zaposlenih u platni spisak zaposleni koji spadaju u ovu grupu moraju biti izdvojeni u grupu 5.</text:p>
      <text:p text:style-name="P2"><text:s/></text:p>
      <text:p text:style-name="P1"><text:tab/><text:span text:style-name="T5">Prva isplata:</text:span></text:p>
      <text:p text:style-name="P2"/>
      <text:list text:style-name="L1">
        <text:list-item>
          <text:p text:style-name="P5">PARAMETRI 1:</text:p>
        </text:list-item>
      </text:list>
      <text:p text:style-name="P2"/>
      <text:p text:style-name="P2"><draw:frame draw:style-name="fr1" draw:name="графика1" text:anchor-type="paragraph" svg:width="17cm" svg:height="16.448cm" draw:z-index="0"><draw:image xlink:href="Pictures/100000000000055600000300DE6734D7E2C6431D.png" xlink:type="simple" xlink:show="embed" xlink:actuate="onLoad" draw:mime-type="image/png"/></draw:frame></text:p>
      <text:p text:style-name="P2"/>
      <text:p text:style-name="P2"><text:tab/><text:span text:style-name="T5">Minuli rad </text:span><text:span text:style-name="T1">= </text:span><text:span text:style-name="T3">0.4 i oznaka za način obračunavanja minulog rada </text:span><text:span text:style-name="T1">= </text:span><text:span text:style-name="T3">1 na sva primanja.</text:span></text:p>
      <text:p text:style-name="P2"/>
      <text:p text:style-name="P2"/>
      <text:p text:style-name="P2"/>
      <text:list text:style-name="L2">
        <text:list-item>
          <text:p text:style-name="P6"><text:soft-page-break/>PARAMETRI 2:</text:p>
        </text:list-item>
      </text:list>
      <text:p text:style-name="P2"/>
      <text:p text:style-name="P2"><draw:frame draw:style-name="fr1" draw:name="графика2" text:anchor-type="paragraph" svg:width="17cm" svg:height="17.895cm" draw:z-index="1"><draw:image xlink:href="Pictures/100000000000055600000300682EAE8EBC437287.png" xlink:type="simple" xlink:show="embed" xlink:actuate="onLoad" draw:mime-type="image/png"/></draw:frame></text:p>
      <text:p text:style-name="P2"><text:tab/><text:span text:style-name="T5">Najniža osnovica bez unosa, prazno polje.</text:span></text:p>
      <text:p text:style-name="P3"/>
      <text:list text:style-name="L3">
        <text:list-item>
          <text:p text:style-name="P7">PLATNI SPISAK:</text:p>
        </text:list-item>
      </text:list>
      <text:p text:style-name="P2"/>
      <text:p text:style-name="P2"><text:tab/>Nakon unosa zaposlenih i unosa časova, unesite u kartice zaposlenih F7 časove po vremenu i učinku i časove NAKNADA odnosno časove plaćenog odsustva, časove bolovanja i časove godišnjeg odmora. Uradite obračun sa polovinom cene rada za grupu 1,2 i 3 i uključite obračun naknada. Uradite obračun za grupu 4 sa polovinom cene rada i uključite obračun naknada. Sada se vratite u PARAMETRE 2 i unesite iznos najniže osnovice za obračun doprinosa u za to predviđeno polje, a zatim uradite obračun za grupu 5 sa polovinom cene rada i uključite obračun naknada. Time ste završili obračun prve isplate odnosno akontacije. Vratite se u PARAMETRE 2 i obrišite najnižu osnovicu zato što vam ona nije potrebna za drugu ispaltu.</text:p>
      <text:p text:style-name="P11"><text:tab/></text:p>
      <text:p text:style-name="P11"><text:soft-page-break/>DRUGA ISPLATA:</text:p>
      <text:p text:style-name="P11"/>
      <text:list text:style-name="L4">
        <text:list-item>
          <text:p text:style-name="P9">PARAMETRI 1:</text:p>
        </text:list-item>
      </text:list>
      <text:p text:style-name="P3"><text:tab/></text:p>
      <text:p text:style-name="P3"><text:tab/>Isti su kao u prvoj isplati, slika 1.</text:p>
      <text:p text:style-name="P3"/>
      <text:list text:style-name="L5">
        <text:list-item>
          <text:p text:style-name="P10">PARAMETRI 2:</text:p>
        </text:list-item>
      </text:list>
      <text:p text:style-name="P3"/>
      <text:p text:style-name="P3"><draw:frame draw:style-name="fr1" draw:name="графика3" text:anchor-type="paragraph" svg:width="17cm" svg:height="14.365cm" draw:z-index="2"><draw:image xlink:href="Pictures/100000000000055600000300464988598E7A6638.png" xlink:type="simple" xlink:show="embed" xlink:actuate="onLoad" draw:mime-type="image/png"/></draw:frame></text:p>
      <text:p text:style-name="P2"/>
      <text:p text:style-name="P2"><text:tab/>Prvo uradite prenos zarade i akontacije, <text:span text:style-name="T5">zatim dodajte časove prekovremenog rada na časove po učinku, časove po vremenu nemojte menjati i </text:span><text:span text:style-name="T6">uradite obračune sa celom cenom rada. Nakon toga uradite obračun sa celom cenom rada za grupu 4. Sada izmenite podatke u PARAMETRIMA 1. Obrišite podatak 0.4 u polju minuli rad i obrišite podatak 1 u polju za način obračuna minulog rada. Oba polja ostaju prazna. Sada od časova po učinku oduzmite časove prekovremenog rada –</text:span><text:span text:style-name="T2"> </text:span><text:span text:style-name="T4">podatak u polju po vremenu možete da unesete u časove po učinku, zatim unesite časove za sve dodatke u za to predviđena polja. Sada uradite obračun sa celom cenom rada za grupe 1, 2, 3 i 5. Nakon toga uradite obračun sa celom cenom rada za grupu 4. Završili ste obračun.</text:span></text:p>
      <text:p text:style-name="P4"/>
      <text:p text:style-name="P2"><text:span text:style-name="T4"><text:tab/></text:span><text:span text:style-name="T3">Napomena: Nakon PRVE ISPLATE za svaki naredni mesec obavezno uraditi arhiviranje podataka. Bilo koji preskočen korak u Vašem obračunu usloviće pogrešne iznose u okviru zarade. </text:span></text:p>
      <text:p text:style-name="P2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5T16:15:14.09</meta:creation-date>
    <dc:date>2023-04-04T15:57:34.050000000</dc:date>
    <meta:editing-duration>PT3H29M46S</meta:editing-duration>
    <meta:editing-cycles>3</meta:editing-cycles>
    <meta:generator>LibreOffice/7.5.0.3$Windows_X86_64 LibreOffice_project/c21113d003cd3efa8c53188764377a8272d9d6de</meta:generator>
    <meta:document-statistic meta:table-count="0" meta:image-count="3" meta:object-count="0" meta:page-count="4" meta:paragraph-count="18" meta:word-count="399" meta:character-count="2369" meta:non-whitespace-character-count="1977"/>
  </office:meta>
</office:document-meta>
</file>