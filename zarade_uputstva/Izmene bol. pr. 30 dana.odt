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color="#ff3333"/>
    </style:style>
    <style:style style:name="P3" style:family="paragraph" style:parent-style-name="Text_20_body">
      <style:paragraph-properties fo:text-align="center" style:justify-single-word="false"/>
      <style:text-properties fo:color="#ff3333"/>
    </style:style>
    <style:style style:name="P4" style:family="paragraph" style:parent-style-name="Text_20_body">
      <style:paragraph-properties fo:text-align="start" style:justify-single-word="false"/>
      <style:text-properties fo:color="#ff3333"/>
    </style:style>
    <style:style style:name="P5" style:family="paragraph" style:parent-style-name="Text_20_body">
      <style:paragraph-properties fo:text-align="start" style:justify-single-word="false"/>
    </style:style>
    <style:style style:name="P6" style:family="paragraph" style:parent-style-name="Text_20_body">
      <style:text-properties fo:color="#ff6600"/>
    </style:style>
    <style:style style:name="P7" style:family="paragraph" style:parent-style-name="Text_20_body">
      <style:paragraph-properties fo:text-align="center" style:justify-single-word="false"/>
      <style:text-properties fo:color="#ff6600"/>
    </style:style>
    <style:style style:name="P8" style:family="paragraph" style:parent-style-name="Text_20_body">
      <style:paragraph-properties fo:text-align="start" style:justify-single-word="false"/>
      <style:text-properties fo:color="#ff6600"/>
    </style:style>
    <style:style style:name="P9" style:family="paragraph" style:parent-style-name="Text_20_body">
      <style:paragraph-properties fo:text-align="center" style:justify-single-word="false"/>
      <style:text-properties fo:color="#333333"/>
    </style:style>
    <style:style style:name="P10" style:family="paragraph" style:parent-style-name="Text_20_body">
      <style:paragraph-properties fo:text-align="start" style:justify-single-word="false"/>
      <style:text-properties fo:color="#333333"/>
    </style:style>
    <style:style style:name="T1" style:family="text">
      <style:text-properties fo:color="#ff3333"/>
    </style:style>
    <style:style style:name="T2" style:family="text">
      <style:text-properties fo:color="#ff66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RI</text:p>
      <text:p text:style-name="P5"><text:bookmark text:name="clan_79"/>Član 79 </text:p>
      <text:p text:style-name="P5">Naknada zarade zbog nege deteta pripada osiguraniku ako oba roditelja imaju utvrđen osnov osiguranja iz člana 11. stav 1. tač. 1)-7), 18), 20) i 23) ovog zakona ili ako dete ima samo jednog roditelja ili ako samo jedan roditelj vrši roditeljsko pravo u smislu propisa o porodici ili ako jedan od roditelja nema utvrđen osnov osiguranja iz člana 11. stav 1. tač. 1)-7), 18), 20) i 23) ovog zakona, ali je iz zdravstvenih razloga nesposoban da neguje obolelo dete. </text:p>
      <text:p text:style-name="P5">Naknada zarade zbog nege deteta pod uslovima iz stava 1. ovog člana pripada i osiguraniku koji je usvojitelj, hranitelj, očuh ili maćeha detetu. </text:p>
      <text:p text:style-name="P1"><text:span text:style-name="T2">NOVI</text:span></text:p>
      <text:p text:style-name="P5"><text:span text:style-name="T2">U članu 79. posle stava 2. dodaje se stav 3. koji glasi:</text:span></text:p>
      <text:p text:style-name="P8">"Naknada zarade zbog nege deteta iz stava 1. ovog člana pripada osiguraniku i kada je drugi roditelj obavezno zdravstveno osiguran kod drugog nadležnog nosioca zdravstvenog osiguranja."</text:p>
      <text:p text:style-name="P1">STARI</text:p>
      <text:p text:style-name="P5">Član 87 </text:p>
      <text:p text:style-name="P5">Osnov za naknadu zarade koja se isplaćuje iz sredstava obaveznog zdravstvenog osiguranja, za osiguranike iz člana 72. tačka 1) ovog zakona, čini prosečna zarada koju je osiguranik ostvario u prethodnih 12 meseci pre meseca u kojem je nastupila privremena sprečenost za rad. </text:p>
      <text:p text:style-name="P5">Zaradu, u smislu stava 1. ovog člana, čini zarada za obavljeni rad i vreme provedeno na radu, utvrđena u skladu sa propisima o radu, i to: </text:p>
      <text:p text:style-name="P5">1) osnovna zarada zaposlenog; </text:p>
      <text:p text:style-name="P5">2) deo zarade za radni učinak; </text:p>
      <text:p text:style-name="P5">3) uvećana zarada. </text:p>
      <text:p text:style-name="P5">Za sve vreme isplate naknade zarade iz sredstava obaveznog zdravstvenog osiguranja, za osiguranika koji ima prethodno osiguranje, osnov za naknadu utvrđuje se u skladu sa stavom 1. ovog člana. </text:p>
      <text:p text:style-name="P5">Za osiguranika koji ne ispunjava uslov u pogledu prethodnog osiguranja u momentu početka korišćenja prava na naknadu zarade iz sredstava obaveznog zdravstvenog osiguranja, osnov za naknadu zarade utvrđuje se u skladu sa stavom 1. ovog člana od momenta ispunjenja uslova u pogledu prethodnog osiguranja, kao i ostvarivanja zarade iz stava 2. ovog člana. </text:p>
      <text:p text:style-name="P7">NOVI</text:p>
      <text:p text:style-name="Text_20_body"><text:span text:style-name="T2">U članu 87. stav 1. na kraju teksta briše se tačka i dodaju se reči: "i naknada zarade koju je osiguranik ostvario u tom periodu." </text:span></text:p>
      <text:p text:style-name="P1">STARI</text:p>
      <text:p text:style-name="Text_20_body">Član 102 </text:p>
      <text:p text:style-name="Text_20_body">Poslodavac isplaćuje i naknadu zarade zaposlenima koja se obezbeđuje iz sredstava obaveznog zdravstvenog osiguranja, u skladu sa ovim zakonom. </text:p>
      <text:p text:style-name="Text_20_body">Poslodavac vrši obračun naknade zarade iz stava 1. ovog člana u skladu sa ovim zakonom i dostavlja ga filijali, uz zahtev za isplatu naknade zarade. </text:p>
      <text:p text:style-name="Text_20_body">Filijala utvrđuje pravo na naknadu zarade i visinu naknade i najkasnije u roku od 30 dana od dana prijema obračuna iz stava 2. ovog člana prenosi odgovarajući iznos sredstava na poseban račun poslodavca. </text:p>
      <text:p text:style-name="Text_20_body"><text:soft-page-break/>Sredstva iz stava 3. ovog člana koja ne isplati osiguraniku u roku od 30 dana od dana njihovog prijema poslodavac je dužan da vrati filijali sa kamatom za koju su sredstva uvećana dok su se nalazila na posebnom računu poslodavca. </text:p>
      <text:p text:style-name="Text_20_body">Sredstva iz stava 3. ovog člana ne mogu biti predmet izvršenja, osim za svrhu iz stava 1. ovog člana. </text:p>
      <text:p text:style-name="Text_20_body">Naknadu zarade preduzetnicima i zaposlenima kod preduzetnika, pod uslovom da preduzetnici nemaju poseban račun, kao i sveštenicima i verskim službenicima, koja se obezbeđuje iz sredstava obaveznog zdravstvenog osiguranja, obračunava i isplaćuje filijala na tekući račun tog lica. </text:p>
      <text:p text:style-name="Text_20_body">Poslodavac može iz svojih sredstava da isplati naknadu zarade i kada se ta naknada obezbeđuje iz sredstava obaveznog zdravstvenog osiguranja, s tim da je filijala dužna da isplaćene iznose naknadi poslodavcu u roku od 15 dana od dana predaje zahteva filijali, uplatom na poseban račun poslodavca. </text:p>
      <text:p text:style-name="Text_20_body">Rokovi iz ovog člana računaju se od dana dostavljanja kompletne dokumentacije filijali. </text:p>
      <text:p text:style-name="P1"><text:span text:style-name="T1">NOVI</text:span></text:p>
      <text:p text:style-name="P2">Član 102. menja se i glasi:</text:p>
      <text:p text:style-name="P2">"Član 102.</text:p>
      <text:p text:style-name="P2">Poslodavac isplaćuje i naknadu zarade zaposlenima koja se obezbeđuje iz sredstava obaveznog zdravstvenog osiguranja, u skladu sa ovim zakonom.</text:p>
      <text:p text:style-name="P2">Filijala utvrđuje pravo na naknadu zarade, visinu naknade i vrši obračun naknade zarade iz stava 1. ovog člana i najkasnije u roku od 15 dana od izvršenog obračuna naknade zarade prenosi odgovarajući iznos sredstava na poseban račun poslodavca.</text:p>
      <text:p text:style-name="P2">Sredstva iz stava 2. ovog člana koja ne isplati osiguraniku u roku od tri dana od dana njihovog prijema poslodavac je dužan da vrati filijali sa kamatom za koju su sredstva uvećana dok su se nalazila na posebnom računu poslodavca.</text:p>
      <text:p text:style-name="P2">Sredstva iz stava 2. ovog člana ne mogu biti predmet izvršenja, osim za svrhu iz stava 1. ovog člana.</text:p>
      <text:p text:style-name="P2">Naknadu zarade preduzetnicima i zaposlenima kod preduzetnika, pod uslovom da preduzetnici nemaju poseban račun, kao i sveštenicima i verskim službenicima, koja se obezbeđuje iz sredstava obaveznog zdravstvenog osiguranja, obračunava i isplaćuje filijala na tekući račun tog lica.</text:p>
      <text:p text:style-name="P2">Izuzetno od st. 1. i 2. ovog člana, u slučaju privremene sprečenosti za rad iz člana 73. stav 1. tačka 3) ovog zakona, Republički fond naknadu zarade uplaćuje na račun osiguranika.</text:p>
      <text:p text:style-name="P2">Način i bliži uslovi za ostvarivanja prava na naknadu zarade koja se obezbeđuje iz sredstava obaveznog zdravstvenog osiguranja, uređuju se propisom iz člana 124. ovog zakona."</text:p>
      <text:p text:style-name="P9"/>
      <text:p text:style-name="P9">STARI</text:p>
      <text:p text:style-name="P5">Član 109 </text:p>
      <text:p text:style-name="Text_20_body">Poslodavac je dužan da podnese zahtev za ostvarivanje naknade zarade filijali najkasnije u roku od 30 dana od dana isplate zarade za mesec na koji se naknada odnosi. </text:p>
      <text:p text:style-name="Text_20_body">Zahtev za ostvarivanje novčanih naknada i drugih prava iz zdravstvenog osiguranja može se podneti u roku od tri godine od dana dospelosti prava. </text:p>
      <text:p text:style-name="P3">NOVI</text:p>
      <text:p text:style-name="P4">U članu 109. stav 1. briše se. </text:p>
      <text:p text:style-name="P4"/>
      <text:p text:style-name="P9"><text:soft-page-break/>STARI</text:p>
      <text:p text:style-name="P10">Član 125 </text:p>
      <text:p text:style-name="Text_20_body">Prava iz obaveznog zdravstvenog osiguranja ostvaruju se na osnovu overene isprave o osiguranju. </text:p>
      <text:p text:style-name="Text_20_body">Overu isprave o osiguranju vrši matična filijala na osnovu dokaza da je uplaćen dospeli doprinos, kao i na osnovu drugih dokaza, u skladu sa zakonom. </text:p>
      <text:p text:style-name="Text_20_body">Ako isprava o osiguranju nije overena zbog toga što dospeli doprinos nije plaćen, izvršiće se naknadna overa kada taj doprinos bude uplaćen. </text:p>
      <text:p text:style-name="Text_20_body">U slučaju da nije izvršena uplata dospelog doprinosa, pravo na zdravstvenu zaštitu u skladu sa ovim zakonom i propisima donetim za sprovođenje ovog zakona može da se koristi na teret sredstava obaveznog zdravstvenog osiguranja u slučaju: </text:p>
      <text:p text:style-name="Text_20_body">1) hitne medicinske pomoći; </text:p>
      <text:p text:style-name="Text_20_body">2) ciljanih preventivnih pregleda - skrininga prema odgovarajućim nacionalnim programima; </text:p>
      <text:p text:style-name="Text_20_body">3) obavezne imunizacije prema propisima kojima se uređuje zdravstvena zaštita stanovništva od zaraznih bolesti; </text:p>
      <text:p text:style-name="Text_20_body">4) palijativnog zbrinjavanja. </text:p>
      <text:p text:style-name="P10"/>
      <text:p text:style-name="P7">NOVI</text:p>
      <text:p text:style-name="P8">U članu 125. posle stava 4. dodaje se stav 5. koji glasi:</text:p>
      <text:p text:style-name="P6">"Osiguranici iz člana 72. ovog zakona u slučaju privremene sprečenosti za rad zbog bolesti ili komplikacija u vezi sa održavanjem trudnoće, ostvaruju prava iz obaveznog zdravstvenog osiguranja bez obzira da li je uplaćen dospeli doprinos."</text:p>
      <text:p text:style-name="P9">STARI</text:p>
      <text:p text:style-name="P10">Član 260 </text:p>
      <text:p text:style-name="Text_20_body">Novčanom kaznom od 300.000 do 1.000.000 dinara kazniće se za prekršaj poslodavac sa svojstvom pravnog lica, ako: </text:p>
      <text:p text:style-name="Text_20_body">1) ne dostavi matičnoj filijali dokaze, tačna obaveštenja, odnosno podatke na kojima se zasnivaju podaci uneti u prijave, odnosno od značaja za utvđivanje činjenica važnih za sticanje i ostvarivanje prava iz obaveznog zdravstvenog osiguranja, odnosno ne omogući matičnoj filijali uvid u evidenciju i dokumentaciju (član 42. stav 2); </text:p>
      <text:p text:style-name="Text_20_body">2) ne izvrši isplatu naknade zarade zaposlenom koja se obezbeđuje iz sredstava obaveznog zdravstvenog osiguranja ili ne obračuna naknadu zarade koja se osiguraniku obezbeđuje iz sredstava obaveznog zdravstvenog osiguranja ili ako naknadu zarade iz sredstava obaveznog zdravstvenog osiguranja koja je preneta na poseban račun poslodavca ne isplati osiguraniku u roku od 30 dana od dana njihovog prijema, a ne vrati ih filijali sa kamatom za koju su sredstva uvećana dok su se nalazila na posebnom računu poslodavca (član 102. st. 1, 2. i 4); </text:p>
      <text:p text:style-name="Text_20_body">3) ne uplati iznos naknade plaćenih troškova na račun osiguranog lica, odnosno ako mu ne izvrši isplatu na drugi odgovarajući način za zdravstvene usluge koje su obuhvaćene obaveznim zdravstvenim osiguranjem, a koje je osigurano lice platilo zato što nije uplaćen doprinos za zdravstveno osiguranje, odnosno nije uplaćen u celini (član 127. stav 2); </text:p>
      <text:p text:style-name="Text_20_body">4) Republičkom fondu ne dostavi podatke od značaja za postupak naknade štete (član 227. stav 1). </text:p>
      <text:p text:style-name="Text_20_body">Novčanom kaznom od 40.000 do 50.000 dinara kazniće se za prekršaj iz stava 1. tačka 1) ovog člana i drugi podnosioci prijave. </text:p>
      <text:p text:style-name="Text_20_body">Novčanom kaznom od 40.000 do 50.000 dinara kazniće se za prekršaj iz stava 1. ovog člana i <text:soft-page-break/>odgovorno lice u pravnom licu. </text:p>
      <text:p text:style-name="Text_20_body">Novčanom kaznom od 300.000 do 500.000 dinara kazniće se za prekršaj iz stava 1. ovog člana i poslodavac - preduzetnik. </text:p>
      <text:p text:style-name="P7">NOVI</text:p>
      <text:p text:style-name="P8">U članu 260. stav 1. tačka 2) menja se i glasi:</text:p>
      <text:p text:style-name="P6">"2) ne izvrši isplatu naknade zarade zaposlenom koja se obezbeđuje iz sredstava obaveznog zdravstvenog osiguranja ili ako naknadu zarade iz sredstva obaveznog zdravstvenog osiguranja koja je preneta na poseban račun poslodavca ne isplati osiguraniku u roku od tri dana od dana njihovog prijema, a ne vrati filijali sa kamatom za koju su sredstva uvećana dok su se nalazila na posebnom računu poslodavca (član 102. st. 1. i 3);".</text:p>
      <text:p text:style-name="P9">STARI</text:p>
      <text:p text:style-name="P10">Član 261 </text:p>
      <text:p text:style-name="Text_20_body">Novčanom kaznom od 300.000 do 1.000.000 dinara kazniće se za prekršaj Republički fond, ako: </text:p>
      <text:p text:style-name="Text_20_body">1) podatke koji se vode u matičnoj evidenciji, a koji se odnose na korišćenje prava iz zdravstvenog osiguranja za osigurana lica ne vodi odvojeno od drugih podataka iz matične evidencije ili ako te podatke unosi i njima rukuje neovlašćeno lice (član 33. st. 1. i 2); </text:p>
      <text:p text:style-name="Text_20_body">2) podatke koji se vode u matičnoj evidenciji koristi suprotno članu 33. stav 3; </text:p>
      <text:p text:style-name="Text_20_body">3) ne proveri tačnost podataka unetih u matičnu evidenciju za lica iz čl. 16. i 17. ovog zakona, kao i članove njihovih porodica (član 42. stav 3); </text:p>
      <text:p text:style-name="Text_20_body">4) osiguranom licu na njegov zahtev ne izda uverenje o podacima koji su uneti u matičnu evidenciju (član 45. stav 1); </text:p>
      <text:p text:style-name="Text_20_body">5) ne prenese odgovarajući iznos sredstava na poseban račun poslodavca u roku od 30 dana od dana prijema obračuna naknade zarade (član 102. stav 3); </text:p>
      <text:p text:style-name="Text_20_body">6) ne naknadi poslodavcu isplaćene iznose naknade zarade, u roku od 15 dana od dana predaje zahteva filijali (član 102. stav 7); </text:p>
      <text:p text:style-name="Text_20_body">7) overi zdravstvenu ispravu bez dokaza da je uplaćen dospeli doprinos za obavezno zdravstveno osiguranje, odnosno da je obveznik uplate doprinosa započeo sa izmirivanjem zaostalih doprinosa za obavezno zdravstveno osiguranje i nastavio sa njegovim kontinuiranim izmirivanjem (čl. 125-126); </text:p>
      <text:p text:style-name="Text_20_body">8) kontrolu ličnih podataka koji se odnose na zdravstveno stanje osiguranih lica koji se vode u medicinskoj dokumentaciji osiguranih lica, vrši nadzornik osiguranja koji nije doktor medicine, doktor stomatologije, odnosno diplomirani farmaceut (član 207. stav 2). </text:p>
      <text:p text:style-name="Text_20_body">Novčanom kaznom od 40.000 do 50.000 dinara kazniće se za prekršaj iz stava 1. ovog člana i odgovorno lice u Republičkom fondu. </text:p>
      <text:p text:style-name="P7">NOVI</text:p>
      <text:p text:style-name="P8">U članu 261. stav 1. tačka 5) menja se i glasi:</text:p>
      <text:p text:style-name="P8">"5) ne prenese odgovarajući iznos sredstava na poseban račun poslodavca u roku od 15 dana od izvršenog obračuna naknade zarade (član 102. stav 2);"</text:p>
      <text:p text:style-name="P8">Tačka 6) briše se.</text:p>
      <text:p text:style-name="P8"/>
      <text:p text:style-name="P8">Ovaj zakon stupa na snagu osmog dana od dana objavljivanja u "Službenom glasniku Republike Srbije", a primenjuje se od 1. juna 2021. godi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Title"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zef Brnić</meta:initial-creator>
    <meta:creation-date>2021-09-29T13:56:22.88</meta:creation-date>
    <meta:document-statistic meta:table-count="0" meta:image-count="0" meta:object-count="0" meta:page-count="4" meta:paragraph-count="87" meta:word-count="1725" meta:character-count="10842"/>
    <dc:date>2021-09-29T15:49:05.27</dc:date>
    <dc:creator>Jozef Brnić</dc:creator>
    <meta:editing-duration>PT1H7M1S</meta:editing-duration>
    <meta:editing-cycles>1</meta:editing-cycles>
    <meta:generator>OpenOffice/4.1.1$Win32 OpenOffice.org_project/411m6$Build-9775</meta:generator>
  </office:meta>
</office:document-meta>
</file>