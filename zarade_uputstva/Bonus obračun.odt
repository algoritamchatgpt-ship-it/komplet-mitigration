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86b" officeooo:paragraph-rsid="0009d86b"/>
    </style:style>
    <style:style style:name="P2" style:family="paragraph" style:parent-style-name="Standard">
      <style:paragraph-properties fo:text-align="start" style:justify-single-word="false"/>
      <style:text-properties officeooo:rsid="0009d86b" officeooo:paragraph-rsid="0009d86b"/>
    </style:style>
    <style:style style:name="P3" style:family="paragraph" style:parent-style-name="Standard">
      <style:paragraph-properties fo:text-align="start" style:justify-single-word="false"/>
      <style:text-properties officeooo:paragraph-rsid="0009d86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d86b" officeooo:paragraph-rsid="0009d86b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9d86b" officeooo:paragraph-rsid="0009d86b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9d86b" officeooo:paragraph-rsid="000a2f32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9d86b" officeooo:paragraph-rsid="0009d86b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9d86b"/>
    </style:style>
    <style:style style:name="T1" style:family="text">
      <style:text-properties officeooo:rsid="0009d8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d86b" style:font-weight-asian="bold" style:font-weight-complex="bold"/>
    </style:style>
    <style:style style:name="T4" style:family="text">
      <style:text-properties officeooo:rsid="000a31d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US OBRAČUN</text:p>
      <text:p text:style-name="P1"/>
      <text:p text:style-name="P2"><text:tab/>Isplata bonusa može se obračunati:</text:p>
      <text:list text:style-name="L1">
        <text:list-item>
          <text:p text:style-name="P4">Kroz isplatu redovne zarade;</text:p>
        </text:list-item>
        <text:list-item>
          <text:p text:style-name="P4">Kroz posebnu isplatu nakon isplate zarade za DECEMBAR prtehodne godine u tekućoj godini;</text:p>
        </text:list-item>
        <text:list-item>
          <text:p text:style-name="P4">Bonus nakon bolovanja preko 30 dana i porodiljskog odsustva, u slučaju da je osoba imala pun fond časova kroz bolovanje preko 30 dana ili kroz porodiljsko bolovanje, u decembru prethodne godine, a bonus za tu osobu nije isplaćen kroz već isplaćenu zaradu.</text:p>
        </text:list-item>
      </text:list>
      <text:p text:style-name="P2"/>
      <text:list xml:id="list1259436911" text:style-name="L2">
        <text:list-item>
          <text:p text:style-name="P5">Isplata bonusa kroz redovnu zaradu</text:p>
        </text:list-item>
      </text:list>
      <text:p text:style-name="P3"><text:tab/></text:p>
      <text:p text:style-name="P2"><text:tab/>Unutar programa imate dve opcije.</text:p>
      <text:list text:style-name="L3">
        <text:list-item>
          <text:p text:style-name="P8"><text:span text:style-name="T3">Prva opcija</text:span><text:span text:style-name="T1"> je da unesete iznos bonusa u polje FIKSNA ZARADA na KARTICI F 7 za svakog radnika kome isplaćujete bonus. Shodno tome koju vrstu obračuna radite, unosite </text:span><text:span text:style-name="T3">BRUTO</text:span><text:span text:style-name="T1"> podatak ukoliko radite </text:span><text:span text:style-name="T3">bruto obračun</text:span><text:span text:style-name="T1"> ( neto iznos bonusa podeliti sa 0,701 ) ili unosite </text:span><text:span text:style-name="T3">NETO</text:span><text:span text:style-name="T1"> iznos bonusa ukoliko radite </text:span><text:span text:style-name="T3">neto obračun</text:span><text:span text:style-name="T1">. Ovaj iznos će ući u bruto iznos zarade nakon obračuna. U slučaju da BRUTO iznos prelazi NAJVIŠU OSNOVICU DOPRINOSA – program će automatski preračunati doprinose na najvišu osnovicu ( petostruki iznos prosečne zarade ), ukoliko je u PARAMETRIMA 1 unet podatak u polju PROSEČNA BRUTO PLATA. Ovaj podatak mora biti podatak koji važi za godinu u kojoj isplaćujete zaradu. U ov</text:span><text:span text:style-name="T4">o</text:span><text:span text:style-name="T1">j opciji iznos bonusa koji isplaćujete na listiću zaposlenog, OBRAZAC OZ, videće se u polju FIKSNA ZARADA.</text:span></text:p>
        </text:list-item>
        <text:list-item>
          <text:p text:style-name="P7"><text:span text:style-name="T2">Druga opcija</text:span> je za one koji žele da se iznos bonusa koji isplaćuju na listiću zaposlenog, OBRAZAC OZ, vidi kroz polje BONUS. U <text:s/>PARAMETRIMA 2 sa desne strane postoje polja OSTALA PRIMANJA od 1-4. Izaberite polje i upišite velikim slovima BONUS. Ovo polje će se videti na KARTICI F 7, nakon unosa zaposlenih u platni spisak. Da biste dobili podatak kroz obračun morate uneti broj časova za bonus uslklađen sa vašom cenom rada po času. Utvrdite cenu rada po času po učinku i tim iznosom podelite iznos BONUSA. Dobijeni iznos će biti broj časova za polje BONUS. Iznos bonusa ćete dobiti nakon obračuna. U slučaju da BRUTO iznos prelazi NAJVIŠU OSNOVICU DOPRINOSA – program će automatski preračunati doprinose na najvišu osnovicu ( petostruki iznos prosečne zarade ), ukoliko je u <text:span text:style-name="T2">PARAMETRIMA 1</text:span> unet podatak u polju <text:span text:style-name="T2">PROSEČNA BRUTO PLATA</text:span>. Ovaj podatak mora biti podatak koji važi za godinu u kojoj isplaćujete zaradu. Sada vam je podatak o ukupnom broju časova uvećan za časove koje ste uneli za bonus i to treba ispraviti <text:span text:style-name="T2">nakon obračuna </text:span>kroz tabelu PLATNOG SPISKA. Pronađite u tabeli PLATNOG SPISKA kolonu koja se zove Casuk i ispravite iznos – unet podatak umanjite za časove koje ste uneli kao časove bonusa. Sada možete štampati listiće za zaposlene i ostale preglede.</text:p>
        </text:list-item>
      </text:list>
      <text:p text:style-name="P2"/>
      <text:p text:style-name="P2"/>
      <text:list xml:id="list133510988806263" text:continue-list="list1259436911" text:style-name="L2">
        <text:list-item>
          <text:p text:style-name="P6">Isplata bonusa Kroz posebnu isplatu nakon isplate zarade za DECEMBAR prtehodne godine u tekućoj godini;</text:p>
          <text:p text:style-name="P6"/>
        </text:list-item>
        <text:list-item>
          <text:p text:style-name="P6">Bonus nakon bolovanja preko 30 dana i porodiljskog odsustva, u slučaju da je osoba imala pun fond časova kroz bolovanje preko 30 dana ili kroz porodiljsko bolovanje, u decembru prethodne godine, a bonus za tu osobu nije isplaćen kroz već isplaćenu zaradu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55:11.140000000</meta:creation-date>
    <dc:date>2023-10-30T13:35:09.058000000</dc:date>
    <meta:editing-duration>PT2H37M44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2" meta:word-count="478" meta:character-count="2914" meta:non-whitespace-character-count="2448"/>
  </office:meta>
</office:document-meta>
</file>