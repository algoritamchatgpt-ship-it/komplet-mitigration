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M UČENIKA SREĆNO OBRAČUN ZARADE </text:p>
      <text:p text:style-name="P1"/>
      <text:p text:style-name="P1"/>
      <text:p text:style-name="P2"><text:tab/>Koriste neto obračun.</text:p>
      <text:p text:style-name="P2"><text:tab/>Zaradu isplaćuju iz dva dela. U prvoj isplati obračun rade sa polovinom radnog vremena i punom cenom rada – da bi imali proporcionalan obračun doprinosa – izbegavanje obračuna doprinosa na najnižu osnovicu. </text:p>
      <text:p text:style-name="P2"><text:tab/>Imaju naknade i dodatke na zaradu.</text:p>
      <text:p text:style-name="P2"><text:tab/>Naknade obračunavaju kroz program.</text:p>
      <text:p text:style-name="P2"><text:tab/>Kredite prenose automatski – neke koriguju ručno.</text:p>
      <text:p text:style-name="P2"><text:tab/>Obustave unose ručno.</text:p>
      <text:p text:style-name="P2"><text:tab/>Minuli rad obračunavaju na sva primanja – oznaka 1 u <text:s/>PARAMETRIMA 1.</text:p>
      <text:p text:style-name="P2"><text:tab/>Određen broj zaposlenih ima manju zaradu od minimalne po ugovoru – za njih koriste dotaciju. U programu ne postoji opcija u kojoj mogu automatski obračunaju minuli rad na dotaciju.</text:p>
      <text:p text:style-name="P2"><text:tab/>Kada rade prvi obračun u <text:s/>PARAMETRIMA 1 ostaje ubeležen procent minulog rada 0.4% i oznaka 1 <text:s/>- <text:s/>obračun minulog rada na sva primanja i obavezno neto iznos minimalne zarade – NETO OBRAČUN &gt; DODAJ MINULI RAD. OBAVEZNO uraditi dotaciju zbog radnika koji primaju minimalnu zaradu. Nakon dodavanja dotacije – PRENOSI &gt; DOTACIJA &gt; SVI RADNICI &gt; IZLAZ - ponoviti obračun. Dotaciju uvećati za iznos obračunatog minulog rada kod svih zaposlenih koji imaju minimalnu zaradu. Ručno obračunati minuli rad na minimalnu zaradu kod svih zaposlenih koji imaju dotaciju i uneti taj iznos na ručno kroz karticu F7. Ukoliko radnici koji primaju minimalnu zaradu nemaju staž njihov obračun će biti dobar nakon dodavanja dotacije. Zatim u <text:s/>PARAMETRIMA 1 obrisati procent minulog rada i ukucati 0 – minuli rad na start oznaka 0, pa tek onda ponoviti obračun - NETO OBRAČUN &gt; DODAJ MINULI RAD.</text:p>
      <text:p text:style-name="P2"><text:tab/>Kada rade drugi obračun – prvo treba vratiti parametre - u PARAMETRIMA 1 <text:s/>ubeležiti procent minulog rada 0.4% i oznaku 1 <text:s/>- <text:s/>obračun minulog rada na sva primanja i obavezno neto iznos minimalne zarade. Zatim prenos - PRENOSI &gt; PRENOS ZARADE II ISPLATA &gt; ŽELIM PRENOS &gt; PRENOS AKONTACIJE &gt; <text:s/>ŽELIM PRENOS. Uneti kredite i obustave, korigovati časove rada, dopunskog rada, noćnog rada, naknada, korigovati topli obrok i regres ako ga ima.</text:p>
      <text:p text:style-name="P2">Uraditi obračun - NETO OBRAČUN &gt; DODAJ MINULI RAD. OBAVEZNO uraditi dotaciju zbog radnika koji primaju minimalnu zaradu. Nakon dodavanja dotacije – PRENOSI &gt; DOTACIJA &gt; SVI RADNICI &gt; IZLAZ - ponoviti obračun. Dotaciju uvećati za iznos obračunatog minulog rada. Ručno obračunati minuli rad na minimalnu zaradu kod svih zaposlenih koji imaju dotaciju i uneti taj iznos minulog rada ručno kroz karticu F7. Ukoliko radnici koji primaju minimalnu zaradu nemaju staž njihov obračun će biti dobar nakon dodavanja dotacije. Zatim u <text:s/>PARAMETRIMA 1 obrisati procent minulog rada i ukucati 0 – minuli rad na start oznaka 0, pa tek onda ponoviti obračun - NETO OBRAČUN &gt; DODAJ MINULI RA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Title" style:family="paragraph" style:parent-style-name="Standard" style:class="chapter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zef Brnić</meta:initial-creator>
    <meta:creation-date>2018-10-01T13:05:39.44</meta:creation-date>
    <dc:date>2019-01-21T10:11:45.95</dc:date>
    <dc:creator>Jozef Brnić</dc:creator>
    <meta:editing-duration>PT3H29M23S</meta:editing-duration>
    <meta:editing-cycles>4</meta:editing-cycles>
    <meta:generator>OpenOffice/4.1.1$Win32 OpenOffice.org_project/411m6$Build-9775</meta:generator>
    <meta:printed-by>Jozef Brnić</meta:printed-by>
    <meta:print-date>2019-01-21T10:11:20.99</meta:print-date>
    <meta:document-statistic meta:table-count="0" meta:image-count="0" meta:object-count="0" meta:page-count="1" meta:paragraph-count="12" meta:word-count="424" meta:character-count="2641"/>
  </office:meta>
</office:document-meta>
</file>