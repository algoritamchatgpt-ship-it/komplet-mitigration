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fo:language="zxx" fo:country="none" fo:font-weight="normal" style:font-weight-asian="normal" style:font-weight-complex="normal"/>
    </style:style>
    <style:style style:name="P7" style:family="paragraph" style:parent-style-name="Standard" style:list-style-name="L1">
      <style:paragraph-properties fo:text-align="start" style:justify-single-word="false"/>
    </style:style>
    <style:style style:name="P8" style:family="paragraph" style:parent-style-name="Standard" style:list-style-name="L2">
      <style:paragraph-properties fo:text-align="start" style:justify-single-word="false"/>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list-style-name="L2">
      <style:paragraph-properties fo:text-align="start" style:justify-single-word="false"/>
      <style:text-properties fo:font-weight="normal" style:font-weight-asian="normal" style:font-weight-complex="normal"/>
    </style:style>
    <style:style style:name="P11" style:family="paragraph" style:parent-style-name="Standard" style:list-style-name="L3">
      <style:paragraph-properties fo:text-align="start" style:justify-single-word="false"/>
      <style:text-properties fo:font-weight="normal" style:font-weight-asian="normal" style:font-weight-complex="normal"/>
    </style:style>
    <style:style style:name="P12" style:family="paragraph" style:parent-style-name="Standard">
      <style:paragraph-properties fo:text-align="start" style:justify-single-word="false"/>
      <style:text-properties fo:language="zxx" fo:country="none" fo:font-weight="normal" style:font-weight-asian="normal" style:font-weight-complex="normal"/>
    </style:style>
    <style:style style:name="P13" style:family="paragraph" style:parent-style-name="Standard" style:list-style-name="L2">
      <style:paragraph-properties fo:text-align="start" style:justify-single-word="false"/>
      <style:text-properties fo:font-weight="bold" style:font-weight-asian="bold" style:font-weight-complex="bold"/>
    </style:style>
    <style:style style:name="P14" style:family="paragraph" style:parent-style-name="Standard" style:list-style-name="L1">
      <style:paragraph-properties fo:text-align="start" style:justify-single-word="false"/>
      <style:text-properties fo:color="#c9211e" loext:opacity="100%"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zxx" fo:country="none"/>
    </style:style>
    <style:style style:name="T4" style:family="text">
      <style:text-properties fo:color="#c9211e" loext:opacity="100%"/>
    </style:style>
    <style:style style:name="T5" style:family="text">
      <style:text-properties fo:color="#c9211e" loext:opacity="100%"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BRAČUN ZARADE</text:p>
      <text:p text:style-name="P5"/>
      <text:p text:style-name="P5"/>
      <text:p text:style-name="P1"><text:tab/>Pre samog obračuna obaveno proverite parametre i podatke.</text:p>
      <text:p text:style-name="P1"/>
      <text:p text:style-name="P1"><text:tab/><text:span text:style-name="T1">KONTROLA EVIDENCIJE ZAPOSLENIH</text:span> <text:s/></text:p>
      <text:p text:style-name="P1"/>
      <text:p text:style-name="P1"><text:tab/>Iz GLAVNOG MENIJA ZA OBRAČUN ZARADA I DRUGIH LIČNIH PRIMANJA kliknite na dugme RADNICI. Proverite, <text:span text:style-name="T1">uvek</text:span>, EVIDENCIJU ZAPOSLENIH. Npr. da li su vam svi zaposleni evidentirani ispravno, da li ste uneli podatke za novozaposlene i podatke za odjavljene radnike, da li ste ispravno popunili kolonu vrsta i tome prilagodili šifru prihoda. OBAVEZNO URADITE SREĐIVANJE STAŽA. Kada utvrdite da su vam podaci ispravni kliknite na dugme IZLAZ, a zatim na dugme KREDITI ukoliko u obračunu imate kredite. AKO NEMATE KREDITE OVAJ KORAK PRESKOČITE.</text:p>
      <text:p text:style-name="P1"/>
      <text:p text:style-name="P1"><text:tab/><text:span text:style-name="T1">PROVERA KREDITA</text:span> </text:p>
      <text:p text:style-name="P1"/>
      <text:p text:style-name="P1">Proverite da li ste rasknjižili prethodni obračun. Ukoliko niste vratite se u PARAMETRE 2 obeležite mesec i popunite polje KONAČNA ISPLATA shodno isplati koju treba da rasknjižite. Sada ponovo uđite u kredite i uradite rasknjižavanje. Unesite nove kredite ukoliko ih ima. Popunite kolonu <text:s/>AKTIVRATA za obračun koji radite. </text:p>
      <text:p text:style-name="P1">Kliknite na dugme IZLAZ, a zatim na dugme</text:p>
      <text:p text:style-name="P1"/>
      <text:p text:style-name="P1"><text:tab/></text:p>
      <text:p text:style-name="P1"><text:tab/><text:span text:style-name="T1">PARAMETARI 1</text:span></text:p>
      <text:p text:style-name="P4"/>
      <text:p text:style-name="P1">Proverite da li je potrebna neka izmena. Obavezno iznos minimalne bruto ili neto zarade prilagodite mesecu za koji radite obračun, u skladu sa vašim obračunom. Proverite iznos prosečne bruto <text:s/>plate i korigujte ga prema poslednjem objavljenom podatku. Iznos minimalne zarade je neophodan ukoliko u obračunu imate zaposlene kojima je iznos obračunate naknade prema raspoloživim podacima manji od minimalne zarade, da bi obračun sa DOTACIJOM do minimalne zarade bio ispravan, podatak minimalna zarada mora da bude tačan, u skladu sa važećim bruto ili neto iznosom minimalne zarade za mesec za koji radite obračun. Sada kliknite na dugme IZLAZ pa na dugme </text:p>
      <text:p text:style-name="P1">PARAMETRI 2. </text:p>
      <text:p text:style-name="P1"/>
      <text:p text:style-name="P1"><text:tab/><text:span text:style-name="T1">PARAMETARI 2</text:span> </text:p>
      <text:p text:style-name="P1"/>
      <text:p text:style-name="P1">Unesite <text:span text:style-name="T1">vrstu isplate</text:span>, <text:span text:style-name="T1">mesec</text:span> za koji radite obračun, <text:span text:style-name="T1">redni broj </text:span>isplate i <text:span text:style-name="T1">datum obračuna.</text:span> Ukoliko mesec za koji radite obračun sadrži praznike, unesite <text:span text:style-name="T1">časove</text:span> <text:span text:style-name="T1">praznika</text:span> i <text:span text:style-name="T1">korigujte radne sate</text:span>. <text:span text:style-name="T1">OBAVEZNO</text:span> unesite podatak u polje <text:span text:style-name="T1">konačna isplata D/N</text:span><text:span text:style-name="T2"> u skladu sa vašom isplatom. Proverite iznos najniže osnovice i korigujte ga u skladu sa važećim podatkom. Iskontrolišite nazive ostalih primanja i obustava ukoliko koristite ovu programsku opciju. Ostale podatke proverite i promenite ukoliko je potrebno. Sada kliknite na dugme IZLAZ pa na dugme UNOS RADNIKA. </text:span></text:p>
      <text:p text:style-name="P2"/>
      <text:p text:style-name="P2"><text:tab/></text:p>
      <text:p text:style-name="P4"><text:tab/>UNOS RADNIKA</text:p>
      <text:p text:style-name="P4"/>
      <text:p text:style-name="P2">Klikom na dugme UNOS RADNIKA otvarate prozor UNOS RADNIKA U PLATNI SPISAK. </text:p>
      <text:p text:style-name="P1"><text:span text:style-name="T2">U polje GRUPA 1 unesite oznaku GRUPE 1 iz EVIDENCIJE ZAPOSLENIH ili ostavite oznaku </text:span><text:span text:style-name="T1">0,</text:span><text:span text:style-name="T2"> u skladu sa sa tim koje radnike hoćete da unesete u platni spisak. Izaberite opciju. <text:s/></text:span></text:p>
      <text:p text:style-name="P2"><text:s/></text:p>
      <text:list text:style-name="L1">
        <text:list-item>
          <text:p text:style-name="P7"><text:span text:style-name="T2">Polje GRUPA 1 – </text:span><text:span text:style-name="T1">popunjavate isključivo u slučaju da ste radnike u </text:span><text:soft-page-break/><text:span text:style-name="T1">EVIDENCIJI ZAPOSLENIH razvrstali u grupe kroz kolonu GRUPA 1.</text:span><text:span text:style-name="T2"> Time ste se opredelili da za <text:s/>tako grupisane radnike radite potpuno odvojene obračune iste </text:span><text:span text:style-name="T1">VRSTE</text:span><text:span text:style-name="T2">. U tom slučaju za jednu grupu ste u PARAMETRIMA 2 izabrali mesec prema rednom broju meseca u godini, a za drugu grupu grupu ćete taj mesec označiti brojem: redni broj istog meseca + 12 ( npr. april sa oznakom </text:span><text:span text:style-name="T1">4</text:span><text:span text:style-name="T2"> za obračun zarade za mesec april za prvu grupu i april 4+12=</text:span><text:span text:style-name="T1">16 </text:span><text:span text:style-name="T2">kao</text:span><text:span text:style-name="T1"> </text:span><text:span text:style-name="T2">oznaka meseca</text:span><text:span text:style-name="T1"> </text:span><text:span text:style-name="T2">za obračun zarade za april za drugu grupu ). NAPOMENA - ukoliko ste uneli jednu grupu zaposlenih koristeći odgovarajuću oznaku polja GRUPA 1 nećete moći da unesete u platni spisak nijednu drugu grupu zaposlenih.</text:span></text:p>
        </text:list-item>
        <text:list-item>
          <text:p text:style-name="P14">Polje <text:span text:style-name="T1">GRUPA 1</text:span> – ne popunjavate ostaje - <text:span text:style-name="T1">0</text:span>. Time u platni spisak unosite sve zaposlene iz platnog spiska koji u koloni <text:span text:style-name="T1">VRSTA</text:span> imaju istu oznaku u sladu sa vrstom isplate koju ste izabrali, bez obzira da li ste u EVIDENCIJI zaposlenih popunili kolonu GRUPA 1. </text:p>
        </text:list-item>
      </text:list>
      <text:p text:style-name="P2"/>
      <text:p text:style-name="P2">Kliknite na dugme POTVRĐUJEM, a zatim na dugme IZLAZ. </text:p>
      <text:p text:style-name="P2"/>
      <text:p text:style-name="P2"><text:tab/><text:span text:style-name="T1">UNOS ČASOVA</text:span> </text:p>
      <text:p text:style-name="P2"/>
      <text:p text:style-name="P2">Kliknite na dugme UNOS ČASOVA, pa na POTVRĐUJEM i IZLAZ. Time ste u obračun uneli časove onako kako ste ih definisali u PARAMETRIMA 2.</text:p>
      <text:p text:style-name="P2"/>
      <text:p text:style-name="P2"><text:tab/><text:span text:style-name="T5">PLATNI SPISAK</text:span></text:p>
      <text:p text:style-name="P4"/>
      <text:p text:style-name="P2"><text:tab/>Klikom na dugme PLATNI SPISAK otvarate tabelu koja nosi naziv VRSTE ISPLATE KOJU STE IZABRALI U PRAMETRIMA 2 ( plavo polje na vrhu tabele ). U tabelu su uneta imena i prezimena svih zaposlenih, časovi po vremenu, časovi po učinku i časovi praznika ( ukoliko ste ih uneli u PARAMETRIMA 2 ). Ove podatke možete menjati u samoj tabeli, klikom miša u polje u koje hoćete da unesete novi podatak ili u KARTICI-F7 klikom u polje u koje želite da unesete novi podatak. Unesite podatke za časove naknada i dodatke na zaradu ukoliko ih imate.</text:p>
      <text:p text:style-name="P4"/>
      <text:p text:style-name="P4"><text:tab/><text:span text:style-name="T4">OBRAČUN NAKNADA. UKOLIKO NEMATE NAKNADE OVAJ KORAK PRESKOČITE. </text:span></text:p>
      <text:p text:style-name="P1"/>
      <text:p text:style-name="P1"><text:tab/><text:span text:style-name="T1">OBRAČUN NAKNADA</text:span> – posebno uputstvo.</text:p>
      <text:p text:style-name="P1"/>
      <text:p text:style-name="P2">Uradite obračun naknada – ukoliko u obračunu imate naknade zarada. Kliknite na dugme IZLAZ.</text:p>
      <text:p text:style-name="P2"><text:s/><text:tab/></text:p>
      <text:p text:style-name="P2"><text:tab/> Unesite ostala primanja ( topli obrok, regres...), uradite prenos kredita i ostale potrebne prenose. </text:p>
      <text:p text:style-name="P2"/>
      <text:p text:style-name="P2"><text:tab/>Nakon unosa svih potrebnih podataka za obračun kliknite na dugme OBRAČUN BRUTO-F10 ili OBRAČUN NETO u skladu sa unetim podacima. Unesite potrebne podatke za vaš obračun.</text:p>
      <text:p text:style-name="P2"/>
      <text:p text:style-name="P2"><text:tab/>Unesite iznos CENE RADA. Iznos cene rada iz ugovora o radu zavisno od toga kako je u ugovoru definisan. Program automatski množi cenu rada i pojedinačne koeficijente radnih mesta koje ste uneli u EVIDENCIJU ZAPOSLENIH.</text:p>
      <text:p text:style-name="P2"/>
      <text:p text:style-name="P2"><text:tab/><text:span text:style-name="T3">Ukoliko radite obračun preko FIKSNE PLATE CENA RADA je uvek nula.</text:span></text:p>
      <text:p text:style-name="P2"/>
      <text:p text:style-name="P6"><text:tab/>Ukoliko ste radnike podelili u grupe u obračunu unesite oznaku grupe koju ste koristili.</text:p>
      <text:p text:style-name="P6"/>
      <text:p text:style-name="P2"><text:tab/>Ukoliko ste obračunali naknade, <text:span text:style-name="T3">kroz program,</text:span> u polje <text:span text:style-name="T3">OBRAČUNATI NAKNADE</text:span> <text:soft-page-break/>obavezno unesite veliko slovo N. <text:span text:style-name="T3">Ukoliko niste koristili obračun naknada stavite u polje OBRAČUNATI NAKNADE <text:s/>VELIKO SLOVO D da bi vam program obračunao naknade po unetoj ceni rada. </text:span></text:p>
      <text:p text:style-name="P2"/>
      <text:p text:style-name="P6"><text:tab/>Ukoliko koristite opciju OBRAČUNATI OD UKUPNE OBAVEZE u to polje unesite veliko slovo D. Za opciju OBRAČUNATI OD UKUPNE OBAVEZE - CENA RADA je uvek 1 i uvek morate raditi BRUTO OBRAČUN. Ova opcija podrazumeva da ste u polje KOEFICIJENT u EVIDENCIJI ZAPOSLENIH uneli iznos ukupnog troška za zaradu, kod svakog radnika koji je u PLATNOM SPISKU obračuna koji radite. Ne može se koristiti u slučaju kada je bruto zarada manja od najniže ili veća od najviše propisane osnovice za doprinose.</text:p>
      <text:p text:style-name="P2"/>
      <text:p text:style-name="P6"><text:tab/>IZNOS ZARADE BEZ DOPRINOSA – Unosi se kroz PARAMRTRE 2 <text:s/>– ako postoji zakonski propisan iznos – trenutno ne postoji.</text:p>
      <text:p text:style-name="P6"/>
      <text:p text:style-name="P6"><text:tab/>IZNOS ZARADE BEZ POREZA - Unosi se kroz PARAMRTRE 2 – Trenutno zakonski propisan iznos.</text:p>
      <text:p text:style-name="P6"/>
      <text:p text:style-name="P2"><text:span text:style-name="T3"><text:tab/></text:span>Kliknite sada na dugme POTVRĐUJEM.</text:p>
      <text:p text:style-name="P2"/>
      <text:p text:style-name="P2"><text:tab/>Nakon obračuna štampajte potrebne preglede, listiće i spiskove. </text:p>
      <text:p text:style-name="P2"/>
      <text:p text:style-name="P2"><text:tab/>Kliknite na IZLAZ. Sada ste u GLAVNOM MENIJU ZRADA I LIČNIH PRIMANJA. Kliknite na dugme SPISKOVI – treći red, treće dugme odozgo na dole – i otvorićete tabelu SPISKOVI ZA ISPLATU. Klikom na dugme PRENOS - ispod tabele levo – prenećete podatke za isplatu zarade. Samo iz ove tabele možete kasnije pri izradi virmana povući podatke za isplatu zarada radnika. Takođe, ukoliko koristite elektronsko plaćanje, možete preneti podatke u odgovarajući softver banke. </text:p>
      <text:p text:style-name="P2"/>
      <text:p text:style-name="P2"/>
      <text:p text:style-name="P2"/>
      <text:p text:style-name="P5">PRIJAVA PPP – PD </text:p>
      <text:p text:style-name="P5">za zaradu</text:p>
      <text:p text:style-name="P5"/>
      <text:p text:style-name="P1"><text:tab/>Izađite u GLAVNI MENI i kliknite na dugme </text:p>
      <text:p text:style-name="P1"/>
      <text:p text:style-name="P1"><text:tab/>IV XML-TXT zatim na dugme </text:p>
      <text:p text:style-name="P1"><text:tab/>1.XML ZATI zatim na dugme</text:p>
      <text:p text:style-name="P1"><text:tab/>PORESKA PRIJAVA PPP-PD i otvodili ste </text:p>
      <text:p text:style-name="P1"><text:tab/>PODMENI PPP-PD sada kliknite na dugme </text:p>
      <text:p text:style-name="P1"><text:tab/>PARAMETRI i popunite potrebne podatke. </text:p>
      <text:p text:style-name="P1"/>
      <text:list text:style-name="L2">
        <text:list-item>
          <text:p text:style-name="P8">TIP ISPLATE -<text:span text:style-name="T1"> unosite broj 2. </text:span><text:span text:style-name="T2"><text:s/></text:span></text:p>
        </text:list-item>
        <text:list-item>
          <text:p text:style-name="P10">VRSTA ID ISPLATIOCA 0 = PIB <text:s/>1 = JMBG – <text:span text:style-name="T1">unosite broj 0. </text:span></text:p>
        </text:list-item>
        <text:list-item>
          <text:p text:style-name="P10">PROPISANA OSNOVICA - možete uneti najnižu važeću osnovicu za obračun doprinosa, a možete i ostaviti prazno polje.</text:p>
        </text:list-item>
        <text:list-item>
          <text:p text:style-name="P10">ŠIFRA OPŠTINE - unosite šifru vaše opštine.</text:p>
        </text:list-item>
        <text:list-item>
          <text:p text:style-name="P10">PIB ILI JMBG - unosite vaš PIB.</text:p>
        </text:list-item>
        <text:list-item>
          <text:p text:style-name="P10">JMBG PODNOSIOCA – ostaje prazno polje.</text:p>
        </text:list-item>
        <text:list-item>
          <text:p text:style-name="P10">NAZIV / PREZIME I IME – unosite naziv Vaše firme.</text:p>
        </text:list-item>
        <text:list-item>
          <text:p text:style-name="P10">SEDIŠTE – unosite sedište firme.</text:p>
        </text:list-item>
        <text:list-item>
          <text:p text:style-name="P10">TELEFON – unosite broj telefona Vaše firme.</text:p>
        </text:list-item>
        <text:list-item>
          <text:p text:style-name="P10">ULICA I BROJ – unosite naziv ulice i broj.</text:p>
        </text:list-item>
        <text:list-item>
          <text:p text:style-name="P10"><text:soft-page-break/>Email – unosite Email Vaše firme.</text:p>
          <text:p text:style-name="P10"/>
          <text:p text:style-name="P13">SLEDEĆA ČETIRI POLJA POPUNJAVATE SAMO AKO PREDAJETE IZMENJENU PRIJAVU. KADA PREDAJETE REDOVNU PRIJAVU OVA POLJA OSTAJU PRAZNA.</text:p>
          <text:p text:style-name="P10"/>
        </text:list-item>
        <text:list-item>
          <text:p text:style-name="P10">VRSTA IZMENE – unosite jedan od ponuđenih brojeva, odnosno broj koji odgovara Vašoj izmenjenoj prijavi.</text:p>
        </text:list-item>
        <text:list-item>
          <text:p text:style-name="P10">IDENTIFIKACIJA IZMENE – unosite id broj prijave koju ste već predali, odnosno id broj prijave koja se ovom prijavom menja.</text:p>
        </text:list-item>
        <text:list-item>
          <text:p text:style-name="P10">BROJ REŠENJA - unosite broj rešenja na osnovu koga menjate prijavu. Ukoliko ste u polju VRSTA IZMENE uneli broj 1, ovo polje možete ostaviti prazno.</text:p>
        </text:list-item>
        <text:list-item>
          <text:p text:style-name="P10">OSNOV PODNOŠENJA - unosite jedan od ponuđenih brojeva, odnosno broj koji odgovara Vašoj izmenjenoj prijavi. Ukoliko ste u polju VRSTA IZMENE uneli broj 1, ovo polje možete ostaviti prazno.</text:p>
        </text:list-item>
      </text:list>
      <text:p text:style-name="P2"/>
      <text:p text:style-name="P2"><text:tab/><text:span text:style-name="T1">SLEDEĆA POLJA OBAVEZNO POPUNJAVATE KOD SVAKE PRIJAVE.</text:span></text:p>
      <text:p text:style-name="P4"/>
      <text:list text:style-name="L3">
        <text:list-item>
          <text:p text:style-name="P11">DEKLARACIJA BROJ PRIJAVE – unosite broj prijave. </text:p>
        </text:list-item>
        <text:list-item>
          <text:p text:style-name="P11">VRSTA PRIJAVE - unosite jedan od ponuđenih brojeva, odnosno broj koji odgovara Vašoj prijavi. </text:p>
        </text:list-item>
        <text:list-item>
          <text:p text:style-name="P11">GODINA - unosite godinu za koju predajete prijavu.</text:p>
        </text:list-item>
        <text:list-item>
          <text:p text:style-name="P11">ISPLATA ZA MESEC – unosite brojčanu oznaku za mesec za koji predajete prijavu. Oznaka meseca mora da se unese sa 0 ispred broja meseca ako je oznaka meseca jednocifrena.</text:p>
        </text:list-item>
        <text:list-item>
          <text:p text:style-name="P11">REDNI BROJ ISPLATE – unosite redni broj isplate.</text:p>
        </text:list-item>
        <text:list-item>
          <text:p text:style-name="P11">KONAČNA - unosite veliko slovo K ukoliko je Vaša isplata konačna, ukoliko Vaša isplata nije konačna polje ostaje prazno.</text:p>
        </text:list-item>
        <text:list-item>
          <text:p text:style-name="P11">DATUM OBAVEZE - ne popunjava se kod opšte prijave. Kod ostalih prijava unosi se datum shodno prijavi koju predajete.</text:p>
        </text:list-item>
        <text:list-item>
          <text:p text:style-name="P11">DATUM PLAĆANJA - unosite najkasniji datum kada se planira isplata.</text:p>
        </text:list-item>
        <text:list-item>
          <text:p text:style-name="P11">BROJ DANA - unosite kalendarski broj dana za mesec za koji predajete prijavu.</text:p>
        </text:list-item>
        <text:list-item>
          <text:p text:style-name="P11">FOND SATI - unosite broj radnih sati za mesec za koji predajete prijavu.</text:p>
        </text:list-item>
        <text:list-item>
          <text:p text:style-name="P11">BROJ ZAPOSLENIH – unosite broj primaoca prihoda iz prijave koju predajete.</text:p>
          <text:p text:style-name="P11"/>
        </text:list-item>
      </text:list>
      <text:p text:style-name="P1"><text:s text:c="2"/><text:tab/>Kliknite sada na IZLAZ pa na dugme PORESKA PRIJAVA PPP-PD. </text:p>
      <text:p text:style-name="P1"><text:tab/></text:p>
      <text:p text:style-name="P1">Sada ste u tabeli PREUZIMANJE ZARADA I PPP-PD . </text:p>
      <text:p text:style-name="P1">Ukoliko je tabela popunjena kliknite na dugme </text:p>
      <text:p text:style-name="P1">BRIŠI SVE, pa na dugme </text:p>
      <text:p text:style-name="P1">PARAMETRI PRENOSA. Ukoliko je tabela prazna kliknite na dugme </text:p>
      <text:p text:style-name="P1">PARAMETRI PRENOSA. Otvoili ste tabelu </text:p>
      <text:p text:style-name="P1">PARAMETRI PRENOSA. Kliknite na dugme </text:p>
      <text:p text:style-name="P1">BRIŠI SVE pa na dugme </text:p>
      <text:p text:style-name="P1">DODAJ SVE . Sada u tabeli kliknite na red </text:p>
      <text:p text:style-name="P1">REDOVNA ZARADA i unesite podatak </text:p>
      <text:p text:style-name="P1">ISPLATA - <text:s/>broj isplate i </text:p>
      <text:p text:style-name="P1">MESEC – broj meseca. Ovi podaci moraju da budu isti kao u PARMETRIMA 1. Kliknite na </text:p>
      <text:p text:style-name="P1">KRSIĆ da bi ste se vratili u tabelu PREUZIMANJE ZARADA I PPP-PD. Kliknite na dugme PREUZMI ZARADE. Dobili ste podatke iz obračuna ZARADA. Sada kliknite na dugme </text:p>
      <text:p text:style-name="P1">NAPRAVI XML i predajte prijavu.<text:span text:style-name="T2"><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zxx" fo:country="non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zxx" fo:country="non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itle" style:family="paragraph" style:parent-style-name="Standard" style:class="chapter">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zef Brnić</meta:initial-creator>
    <meta:creation-date>2018-03-22T11:06:01.36</meta:creation-date>
    <dc:date>2024-02-06T15:16:12.892000000</dc:date>
    <meta:editing-duration>P1DT6H44M38S</meta:editing-duration>
    <meta:editing-cycles>19</meta:editing-cycles>
    <meta:generator>LibreOffice/7.5.0.3$Windows_X86_64 LibreOffice_project/c21113d003cd3efa8c53188764377a8272d9d6de</meta:generator>
    <meta:document-statistic meta:table-count="0" meta:image-count="0" meta:object-count="0" meta:page-count="4" meta:paragraph-count="95" meta:word-count="1581" meta:character-count="9785" meta:non-whitespace-character-count="8205"/>
  </office:meta>
</office:document-meta>
</file>