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60D835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RAČUN BRUTO</text:p>
      <text:p text:style-name="P1"/>
      <text:p text:style-name="P2"><draw:frame draw:style-name="fr1" draw:name="графика1" text:anchor-type="paragraph" svg:x="-0.0008in" svg:y="0.5701in" svg:width="6.6929in" svg:height="3.7646in" draw:z-index="0"><draw:image xlink:href="Pictures/10000000000006400000038460D8355B.png" xlink:type="simple" xlink:show="embed" xlink:actuate="onLoad"/></draw:frame><text:tab/>Klikom na dugme OBRAČUN BRUTO – otvorili ste podmeni – OBRAČUN PLATA u koji unosite podatke za vaš obračun – slika dole.</text:p>
      <text:p text:style-name="P2"/>
      <text:p text:style-name="P2">U prvo prazno polje unosite :</text:p>
      <text:p text:style-name="P2"/>
      <text:list xml:id="list3307528765300092228" text:style-name="L1">
        <text:list-item>
          <text:list>
            <text:list-item>
              <text:p text:style-name="P3">Bruto cenu rada –bruto iznos cene rada ukoliko u obračunu vaše zarade osnovnu zaradu izračunavate preko bruto cene rada i koeficijenta radnog mesta – njačešći slučaj.</text:p>
            </text:list-item>
            <text:list-item>
              <text:p text:style-name="P3">Ostaje prazno ukoliko koristite opciju fiksne zarade – unos bruto zarade u polje fiksna zarada na kartici F7.</text:p>
            </text:list-item>
            <text:list-item>
              <text:p text:style-name="P3">Jedinicu – 1 - ukoliko koristite opciju – OBRAČUNATI OD UKUPNE OBAVEZE.</text:p>
            </text:list-item>
          </text:list>
        </text:list-item>
      </text:list>
      <text:p text:style-name="P2"/>
      <text:p text:style-name="P2">GRUPA – ovo polje popunjavate ukoliko ste u evidenciji zaposlenih radnike podelili u grupe, koje imaju različite cene rada i radite dva obračuna u okviru istog platnog spiska.</text:p>
      <text:p text:style-name="P2"/>
      <text:p text:style-name="P2">OBRAČUNATI NAKNADE – Unosite slovo D ukoliko hoćete da obračunate časove naknada po zadatoj ceni rada. Ukoliko ste koristili programsku opciju za OBRAČUN NAKNADA u ovo polje obavezno unesite slovo N da bi ste zadržali već obračunat iznos časova naknada.</text:p>
      <text:p text:style-name="P2"/>
      <text:p text:style-name="P2">OBRAČUNATI OD UKUPNE OBAVEZE – Unosite slovo N za sve vrste obračuna osim obračuna koji podrazumeva obračun od ukupne naknade. Kod ovakvog obračuna se u evidenciji zaposlenih u polju koeficijent radnog mesta unese iznos ukupnog troška za zaradu i u ovo polje se unese slovo D.</text:p>
      <text:p text:style-name="P2"/>
      <text:p text:style-name="P2">IZNOS ZARADE BEZ DOPRINOSA – podatak se automatski prenosi iz parametara 2 - važeći podatak propisan zakonom.</text:p>
      <text:p text:style-name="P2"/>
      <text:p text:style-name="P2">IZNOS ZARADE BEZ POREZA - podatak se automatski prenosi iz parametara 2 - važeći podatak propisan zakonom.</text:p>
      <text:p text:style-name="P2"/>
      <text:p text:style-name="P2"><text:tab/>Sada kliknite na dugme POTVRĐUJEM da bi ste završili obračun prema unetim podac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9-01-29T13:59:56.07</meta:creation-date>
    <meta:document-statistic meta:table-count="0" meta:image-count="1" meta:object-count="0" meta:page-count="1" meta:paragraph-count="12" meta:word-count="250" meta:character-count="1515"/>
    <dc:date>2019-01-29T15:06:51.83</dc:date>
    <dc:creator>Jozef Brnić</dc:creator>
    <meta:editing-duration>PT6M14S</meta:editing-duration>
    <meta:editing-cycles>1</meta:editing-cycles>
    <meta:generator>OpenOffice/4.1.1$Win32 OpenOffice.org_project/411m6$Build-9775</meta:generator>
  </office:meta>
</office:document-meta>
</file>