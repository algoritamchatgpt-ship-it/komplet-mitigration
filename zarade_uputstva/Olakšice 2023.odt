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2">
      <style:text-properties fo:color="#ff3333"/>
    </style:style>
    <style:style style:name="P5" style:family="paragraph" style:parent-style-name="Text_20_body" style:list-style-name="L1">
      <style:text-properties fo:color="#ff3333"/>
    </style:style>
    <style:style style:name="P6" style:family="paragraph" style:parent-style-name="Default" style:list-style-name="">
      <style:paragraph-properties style:text-autospace="none"/>
      <style:text-properties fo:color="#000000" style:font-name="F" style:font-name-asian="F" style:font-name-complex="F"/>
    </style:style>
    <style:style style:name="T1" style:family="text">
      <style:text-properties fo:color="#800000"/>
    </style:style>
    <style:style style:name="T2" style:family="text">
      <style:text-properties fo:color="#ff3333"/>
    </style:style>
    <style:style style:name="T3" style:family="text">
      <style:text-properties fo:color="#000000" style:font-name="F" style:font-name-asian="F" style:font-name-complex="F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3">Po članu 21ž Zakona o porezu na dohodak i članu 45đ Zakona o doprinosima </text:span></text:p>
      <text:p text:style-name="Text_20_body"/>
      <text:p text:style-name="Text_20_body"/>
      <text:p text:style-name="P3"><text:tab/>Poslodavac iz stava 3. ovog člana oslobađa se obaveze plaćanja doprinosa za obavezno penzijsko i invalidsko osiguranje, na sledeći način: </text:p>
      <text:list xml:id="list7507550719434348224" text:style-name="L2">
        <text:list-header>
          <text:p text:style-name="P2">1) 85% doprinosa - za zarade isplaćene u periodu od 1. januara 2022. godine do 31. decembra 2022. godine; </text:p>
          <text:p text:style-name="P4">2) 75% doprinosa - za zarade isplaćene u periodu od 1. januara 2023. godine do 31. decembra 2023. godine; </text:p>
          <text:p text:style-name="P2">3) 65% doprinosa - za zarade isplaćene u periodu od 1. januara 2024. godine do 31. decembra 2024. godine; </text:p>
          <text:p text:style-name="P2">4) 55% doprinosa - za zarade isplaćene u periodu od 1. januara 2025. godine do 31. decembra 2025. godine.</text:p>
        </text:list-header>
      </text:list>
      <text:list xml:id="list3761910655191450294" text:style-name="L1">
        <text:list-header>
          <text:p text:style-name="P1">Poslodavac iz stava 3. ovog člana oslobađa se obaveze plaćanja obračunatog i obustavljenog poreza iz zarade, na sledeći način: </text:p>
          <text:p text:style-name="P1">1) 60% poreza - za zarade isplaćene u periodu od 1. januara 2022. godine do 31. decembra 2022. godine; </text:p>
          <text:p text:style-name="P5">2) 50% poreza - za zarade isplaćene u periodu od 1. januara 2023. godine do 31. decembra 2023. godine; </text:p>
          <text:p text:style-name="P1">3) 40% poreza - za zarade isplaćene u periodu od 1. januara 2024. godine do 31. decembra 2024. godine; </text:p>
          <text:p text:style-name="P1">4) 30% poreza - za zarade isplaćene u periodu od 1. januara 2025. godine do 31. decembra 2025. godine. </text:p>
        </text:list-header>
      </text:list>
      <text:p text:style-name="Standard"><text:tab/></text:p>
      <text:p text:style-name="Standard"/>
      <text:p text:style-name="Standard"/>
      <text:p text:style-name="Standard"><text:tab/><text:tab/><text:tab/><text:tab/><text:tab/><text:span text:style-name="T2">Šifra za 2022. godinu je bila 28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F" fo:font-size="12pt" style:font-name-asian="F" style:font-size-asian="12pt" style:font-name-complex="F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18T14:25:49.33</meta:creation-date>
    <dc:date>2023-01-18T15:05:21.73</dc:date>
    <meta:editing-duration>PT24M2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3" meta:word-count="214" meta:character-count="1218"/>
  </office:meta>
</office:document-meta>
</file>