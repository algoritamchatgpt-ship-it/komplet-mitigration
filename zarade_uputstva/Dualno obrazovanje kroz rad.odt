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ans" svg:font-family="OpenSans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013b0c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Text_20_body">
      <style:paragraph-properties fo:margin-left="0cm" fo:margin-right="0cm" fo:margin-top="0.529cm" fo:margin-bottom="0.529cm" style:contextual-spacing="false" fo:line-height="150%" fo:orphans="2" fo:widows="2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 style:list-style-name="L2">
      <style:paragraph-properties fo:margin-top="0cm" fo:margin-bottom="0.397cm" style:contextual-spacing="false" fo:orphans="2" fo:widows="2"/>
      <style:text-properties fo:font-variant="normal" fo:text-transform="none" fo:color="#34495e" loext:opacity="100%" style:font-name="Arial" fo:font-size="12pt" fo:letter-spacing="normal" fo:font-style="normal" fo:font-weight="normal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9" style:family="paragraph" style:parent-style-name="Text_20_body" style:list-style-name="L1">
      <style:text-properties style:font-name="Arial"/>
    </style:style>
    <style:style style:name="P10" style:family="paragraph" style:parent-style-name="Text_20_body">
      <style:text-properties style:font-name="Arial" fo:font-weight="bold" style:font-weight-asian="bold" style:font-weight-complex="bold"/>
    </style:style>
    <style:style style:name="P11" style:family="paragraph" style:parent-style-name="Text_20_body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color="#c9211e" loext:opacity="100%"/>
    </style:style>
    <style:style style:name="T4" style:family="text">
      <style:text-properties fo:font-variant="normal" fo:text-transform="none" fo:color="#34495e" loext:opacity="100%" style:font-name="OpenSans" fo:letter-spacing="normal"/>
    </style:style>
    <style:style style:name="T5" style:family="text">
      <style:text-properties fo:font-variant="normal" fo:text-transform="none" fo:color="#34495e" loext:opacity="100%" style:font-name="OpenSans" fo:letter-spacing="normal" fo:font-weight="bold"/>
    </style:style>
    <style:style style:name="T6" style:family="text">
      <style:text-properties fo:font-variant="normal" fo:text-transform="none" fo:color="#34495e" loext:opacity="100%" fo:letter-spacing="normal"/>
    </style:style>
    <style:style style:name="T7" style:family="text">
      <style:text-properties fo:font-variant="normal" fo:text-transform="none" fo:color="#34495e" loext:opacity="100%" fo:letter-spacing="normal" fo:font-weight="bold"/>
    </style:style>
    <style:style style:name="T8" style:family="text">
      <style:text-properties fo:font-variant="normal" fo:text-transform="none" fo:color="#34495e" loext:opacity="100%" style:font-name="Arial" fo:letter-spacing="normal"/>
    </style:style>
    <style:style style:name="T9" style:family="text">
      <style:text-properties fo:font-variant="normal" fo:text-transform="none" fo:color="#34495e" loext:opacity="100%" style:font-name="Arial" fo:letter-spacing="normal" fo:font-weight="bold"/>
    </style:style>
    <style:style style:name="T10" style:family="text">
      <style:text-properties style:font-name="Arial"/>
    </style:style>
    <style:style style:name="T11" style:family="text">
      <style:text-properties officeooo:rsid="0001ffc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KNADA PO <text:span text:style-name="T1">UGOVORU O UČENJU KROZ RAD.</text:span></text:p>
      <text:p text:style-name="P3"/>
      <text:p text:style-name="P3">Obračun naknade za učenike srednjih škola koji su na praksi – <text:span text:style-name="T3">DUALNO OBRAZOVANJE</text:span>. </text:p>
      <text:p text:style-name="P4"><text:tab/> </text:p>
      <text:p text:style-name="P7">Mišljenjem Ministarstva finansija br. 011-00-353/2019-04 od 3.7.2019. koje je objavljeno 3. jula definisan je tretman primanja koja su ostvarena po osnovu naknade koju ostvaruju učenici koji obavljaju učenje kroz rad počev od školske 2019/2020 godine, u skladu sa Zakonom o dualnom obrazovanju, kao materijalnom i finansijskom obezbeđenju učenika.</text:p>
      <text:p text:style-name="P7">Zakon o porezu na dohodak građana član 2.stav 1. predviđa da se porez na dohodak građana plaća na prihode ostvarene iz svih izvora, osim na prihode koji su posebno izuzeti.</text:p>
      <text:p text:style-name="P7">Naime, <text:span text:style-name="T1">zakonski okvir propisuje oslobađanje od plaćanja poreza na dohodak građana na prihode koje ostvare učenici po osnovu učenja kroz rad</text:span> a sve to u skladu sa Zakonom o dualnom obrazovanju.</text:p>
      <text:p text:style-name="P3">Materijalno i finansijsko obezbeđenje učenika</text:p>
      <text:p text:style-name="P3"/>
      <text:p text:style-name="P7">Poslodavac se obavezuje da učenicima obezbedi sledeće:</text:p>
      <text:list text:style-name="L1">
        <text:list-item>
          <text:p text:style-name="P8">Naknadu stvarnih troškova prevoza na relaciji škola – mesto na kome se odvija učenje kroz rad i to najviše u visini cene karte u javnom prevozu i to pod uslovom da poslodavac nema obezbeđen sopstveni prevoz; </text:p>
        </text:list-item>
        <text:list-item>
          <text:p text:style-name="P8">Naknada troškova ishrane u skladu sa opštim aktom poslodavca; </text:p>
        </text:list-item>
        <text:list-item>
          <text:p text:style-name="P9">Osiguranje za slučaj povrede u periodu učenja kroz rad kod poslodavca. </text:p>
        </text:list-item>
      </text:list>
      <text:p text:style-name="P7">Izuzetno Zakon predviđa i mogućnost poslodavca da pokrije troškove smeštaja i ishrane u učeničkom domu ako učenik za vreme učenja kroz rad živi u učeničkom domu.</text:p>
      <text:p text:style-name="P7">Shodno odredbi člana 34. stav 1. Zakona o dualnom obrazovanju poslodavac isplaćuje naknadu učeniku koji obavlja učenje kroz rad po satu provedenom na učenju kroz rad i to u <text:span text:style-name="T1">minimalnom neto iznosu od najmanje 70% minimalne cene rada </text:span>u skladu sa zakonom.</text:p>
      <text:p text:style-name="P7">Za učenika koji obavlja učenje kroz rad poslodavac <text:span text:style-name="T1">plaća doprinose na najnižu mesečnu osnovicu doprinosa. Poslodavac plaća doprinos za penzijsko i invalidsko osiguranje za slučaj invalidnosti i telesnog oštećenja po osnovu povrede na radu i profesionalne bolesti ( 4% ) i doprinos za zdravstveno osiguranje za slučaj povrede na radu i profesionalne bolesti u slučajevima utvrđenim zakonom ( 2% ). Obveznik plaćanja doprinosa je poslodavac kod koga učenik obavlja učenje kroz rad.</text:span></text:p>
      <text:p text:style-name="P10">U situaciji kada učenik kod poslodavca provede manje od mesec dana , obračun doprinosa se vrši na srazmeran iznos najniže mesečne osnovice.</text:p>
      <text:h text:style-name="P1" text:outline-level="4"/>
      <text:p text:style-name="P5"><text:span text:style-name="Strong_20_Emphasis"><text:span text:style-name="T9">PPP PD obrazac</text:span></text:span><text:span text:style-name="T8">:</text:span></text:p>
      <text:list text:style-name="L2">
        <text:list-item>
          <text:p text:style-name="P6">Šifra prihoda 1 05 620 00 0</text:p>
        </text:list-item>
        <text:list-item>
          <text:p text:style-name="P6">Popunjavaju se polja 3.7; 3.8; 3.12; 3.13 <text:span text:style-name="T11">i </text:span>3.14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ans" svg:font-family="OpenSans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none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none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21-01-14T14:15:14.79</meta:creation-date>
    <dc:date>2025-07-08T16:28:17.632000000</dc:date>
    <meta:editing-duration>PT13M44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8" meta:word-count="381" meta:character-count="2401" meta:non-whitespace-character-count="2034"/>
  </office:meta>
</office:document-meta>
</file>