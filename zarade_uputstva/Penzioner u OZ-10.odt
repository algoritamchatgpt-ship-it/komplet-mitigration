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zioner na bolovanju preko 30 dana</text:p>
      <text:p text:style-name="Standard"/>
      <text:p text:style-name="Standard"/>
      <text:p text:style-name="Standard"><text:tab/>Penzioneri. Penzioner mora da se unese u evidenciju zaposlenih ( obavezno ga obeležiti kao neaktivnog da ne bi kasnije ulazio u obračune koje radite za zaposlene ). U arhivi zarada da mu se promeni šifra pod kojom su mu preneti podaci iz PP OD – P obrasca u šifru pod kojom je otvoren u evidenciji zaposlenih. Ne postoje svi podaci u samom obrascu OD – P, na primer časovi i godina. U arhivu se prenosi samo bruto, porez i doprinosi. Tako da bi se nedostajući podaci morali ukucavati direktno u OZ novi. Ime i prezime i JMBG mora ručno da se unese naknadno u prvi obračun koji je perenet u arhivi. <text:s/>Postoji i problem sa redovima za unos podataka o paušalnom oporezivanju. To je poseban slučaj. PREDLOG – Uraditi obračune za nedostajuće mesece sa brutom = 1. Preneti ih u arhivu uraditi OZ – 7 novi i direktno u obracu korigovati iznose tj. Uneti u kolonu 3 prosečne mesečne osnovi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9-08-22T12:50:13.43</meta:creation-date>
    <dc:date>2019-09-20T09:57:43.25</dc:date>
    <dc:creator>Jozef Brnić</dc:creator>
    <meta:editing-duration>PT1H40M5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166" meta:character-count="920"/>
  </office:meta>
</office:document-meta>
</file>