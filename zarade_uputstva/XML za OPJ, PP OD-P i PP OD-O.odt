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28A0B9DB1F490CA0.png" manifest:media-type="image/png"/>
  <manifest:file-entry manifest:full-path="Pictures/100000000000078000000438F70116EE268F1C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3f3c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3f3ce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paragraph-rsid="0013f3c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13f3c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3f3ce" officeooo:paragraph-rsid="0013f3ce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13f3ce"/>
    </style:style>
    <style:style style:name="P10" style:family="paragraph" style:parent-style-name="Standard">
      <style:paragraph-properties fo:text-align="start" style:justify-single-word="false"/>
      <style:text-properties style:rfc-language-tag="sr-Latn-RS" fo:language="sr" fo:script="Latn" fo:country="RS" fo:font-weight="normal" officeooo:rsid="0013f3ce" officeooo:paragraph-rsid="0013f3ce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rfc-language-tag="sr-Latn-RS" fo:language="sr" fo:script="Latn" fo:country="RS" fo:font-weight="normal" officeooo:rsid="0013f3ce" officeooo:paragraph-rsid="0013f3ce" style:font-weight-asian="normal" style:font-weight-complex="normal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3f3ce"/>
    </style:style>
    <style:style style:name="T3" style:family="text">
      <style:text-properties style:rfc-language-tag="sr-Latn-RS" fo:language="sr" fo:script="Latn" fo:country="RS" fo:font-weight="bold" style:font-weight-asian="bold" style:font-weight-complex="bold"/>
    </style:style>
    <style:style style:name="T4" style:family="text">
      <style:text-properties style:rfc-language-tag="sr-Latn-RS" fo:language="sr" fo:script="Latn" fo:country="RS" fo:font-weight="bold" officeooo:rsid="0013f3ce" style:font-weight-asian="bold" style:font-weight-complex="bold"/>
    </style:style>
    <style:style style:name="T5" style:family="text">
      <style:text-properties style:rfc-language-tag="sr-Latn-RS" fo:language="sr" fo:script="Latn" fo:country="RS" fo:font-weight="normal" officeooo:rsid="0013f3c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XML <text:s/><text:span text:style-name="T2">PPP PD prijave </text:span>ZA <text:s/><text:span text:style-name="T2">OBRAČUNE ZARADA, OBRAČUN PREVOZA, </text:span>OPJ, PP OD – P </text:p>
      <text:p text:style-name="P9"><text:s/>i <text:s/>PP OD – O obračune</text:p>
      <text:p text:style-name="P1"/>
      <text:p text:style-name="P2"><text:tab/>U <text:span text:style-name="T2">svim obračunima</text:span> <text:span text:style-name="T2">iz kojih preuzimate podatke za PPP PD, moraju biti uneti</text:span> poda<text:span text:style-name="T2">ci</text:span> u polja:</text:p>
      <text:p text:style-name="P2"/>
      <text:p text:style-name="P2"><text:span text:style-name="T6">ISPLATA</text:span> – redni broj isplate i</text:p>
      <text:p text:style-name="P2"><text:span text:style-name="T6">MESEC</text:span> – broj meseca u kome radite isplatu.</text:p>
      <text:p text:style-name="P2"><text:tab/>Ove podatke un<text:span text:style-name="T2">o</text:span>site <text:span text:style-name="T2">kasnije </text:span>i u parametre prenosa.</text:p>
      <text:p text:style-name="P4"><text:tab/><text:span text:style-name="T2">Kada završite obračun izađite u GLAVNI MENI i kliknite na dugme</text:span></text:p>
      <text:p text:style-name="Standard"/>
      <text:p text:style-name="P4">IV XML-TXT <text:s/>&gt; 1.XML <text:s/>&gt; <text:s/>PORESKA PRIJAVA PPP-PD &gt; <text:s/>PARAMETRI - <text:s/>sada popunite <text:span text:style-name="T2">ili dopunite </text:span>potrebne podatke <text:span text:style-name="T2">u zadatoj formi.</text:span></text:p>
      <text:p text:style-name="P4"><text:span text:style-name="T2"/></text:p>
      <text:p text:style-name="P4"><text:span text:style-name="T2"><text:tab/>Ukoliko ste u PODACIMA O FIRMI uneli sve potrebne podatke, samo kliknite na dugme OSVEŽI TABELU i automatski ćete preuzeti one podatke koji se podudaraju. Ovaj korak je neophodan samo kada prvi put radite prijavu u programu. Za svaku sledeću prijavu program zadržava preuzete i popunjene podatke, a vi ih samo ispravljate po potrebi ( </text:span><text:span text:style-name="T5">DEKLARACIJA BROJ PRIJAVE, VRSTA PRIJAVE, ISPLATA ZA MESEC, REDNI BROJ ISPLATE, KONAČNA, DATUM OBAVEZE, DATUM PLAĆANJA, BROJ DANA, FOND SATI, BROJ ZAPOSLENIH ). <text:s text:c="3"/></text:span></text:p>
      <text:p text:style-name="P4"/>
      <text:list xml:id="list4166916312" text:style-name="L1">
        <text:list-item>
          <text:p text:style-name="P5">TIP ISPLATE -<text:span text:style-name="T6"> unosite broj, </text:span><text:span text:style-name="T4">od 1 – do 7, koji odgovara vašem obliku organizacije. </text:span><text:span text:style-name="T5">U SIVOM PRAVOUGAONIKU IMATE OPISE OBLIKA ORGANIZOVANJA. </text:span></text:p>
        </text:list-item>
        <text:list-item>
          <text:p text:style-name="P6">VRSTA ID ISPLATIOCA 0 = PIB <text:s/>1 = JMBG – <text:span text:style-name="T6">unosite broj 0 </text:span><text:span text:style-name="T4">ili 1 shodno obliku organizovanja. ZA:</text:span></text:p>
          <text:list>
            <text:list-item>
              <text:list>
                <text:list-header>
                  <text:p text:style-name="P8"><text:span text:style-name="T1">- Pravno lice nije iz budžeta, pravno lice iz budžeta, strano predstavništvo, preduzetnika i vojsku RS </text:span><text:span text:style-name="T3">ostaje broj 0.</text:span></text:p>
                  <text:p text:style-name="P8">- <text:span text:style-name="T1">Fizičko lice i poljoprivredna gazdinstva </text:span><text:span text:style-name="T3">unosite broj 1.</text:span></text:p>
                </text:list-header>
              </text:list>
            </text:list-item>
          </text:list>
        </text:list-item>
        <text:list-item>
          <text:p text:style-name="P6">PROPISANA OSNOVICA - možete uneti najnižu važeću osnovicu za obračun doprinosa, a možete i ostaviti prazno polje. <text:span text:style-name="T2">Nije obavezno polje.</text:span></text:p>
        </text:list-item>
        <text:list-item>
          <text:p text:style-name="P6">ŠIFRA OPŠTINE - unosite šifru vaše opštine.</text:p>
        </text:list-item>
        <text:list-item>
          <text:p text:style-name="P6">PIB ILI JMBG</text:p>
          <text:list>
            <text:list-item>
              <text:list>
                <text:list-header>
                  <text:p text:style-name="P6"><text:s/>- unosite PIB <text:span text:style-name="T2">za: <text:s/>pravno lice nije iz budžeta, pravno lice iz budžeta, strano predstavništvo, preduzetnika i vojsku RS.</text:span></text:p>
                  <text:p text:style-name="P6"><text:span text:style-name="T2"><text:s/>- unosite JMBG za: fizičko lice i poljoprivredna gazdinstva.</text:span></text:p>
                </text:list-header>
              </text:list>
            </text:list-item>
          </text:list>
        </text:list-item>
        <text:list-item>
          <text:p text:style-name="P6">JMBG PODNOSIOCA – <text:span text:style-name="T2">popunjavaju samo fizička lica za ostale </text:span>ostaje prazno polje.</text:p>
        </text:list-item>
        <text:list-item>
          <text:p text:style-name="P6">NAZIV / PREZIME I IME – unosite naziv Vaše firme <text:span text:style-name="T2">ili fizičkog lica</text:span>.</text:p>
        </text:list-item>
        <text:list-item>
          <text:p text:style-name="P6">SEDIŠTE – unosite sedište firme <text:span text:style-name="T2">ili fizičkog lica</text:span>.</text:p>
        </text:list-item>
        <text:list-item>
          <text:p text:style-name="P6">TELEFON – unosite broj telefona.</text:p>
        </text:list-item>
        <text:list-item>
          <text:p text:style-name="P6">ULICA I BROJ – unosite naziv ulice i broj.</text:p>
        </text:list-item>
      </text:list>
      <text:p text:style-name="P10">Sledeći podaci se popunjavaju samo kod <text:s/><text:span text:style-name="T6">PRIJAVA KOJE STE VEĆ PREDALI, A KOJE IZ NEKOG RAZLOGA MORATE DA MENJATE</text:span>, <text:span text:style-name="T9">kada predajete REDOVNU PRIJAVU OSTAJU NEPOPUNJENI.</text:span></text:p>
      <text:list text:style-name="L2">
        <text:list-item>
          <text:p text:style-name="P11">VRSTA IZMENE - <text:span text:style-name="T6">unosite broj, od 1 – do 3, koji odgovara vašem RAZLOGU ZA IZMENU PRIJAVE KOJU STE VEĆ PREDALI. </text:span>U SIVOM PRAVOUGAONIKU IMATE OPISE. Za ispravku podataka bilo koje vrste u već predatoj prijavi unesite <text:s/></text:p>
          <text:p text:style-name="P11">broj <text:span text:style-name="T6">1</text:span> <text:span text:style-name="T6">= IZMENA.</text:span></text:p>
        </text:list-item>
        <text:list-item>
          <text:p text:style-name="P11">IDENTIFIKACIJA IZMENE JE BROJ PRIJAVE KOJU MENJATE. To je BROJ predate PRIJAVE – <text:span text:style-name="T6">UID,</text:span> koji je formiran na portalu Poreske uprave kada je prijava koju menjate dobila status PROKNJIŽENA.</text:p>
        </text:list-item>
        <text:list-item>
          <text:p text:style-name="P11">BROJ REŠENJA – Unosite broj rešenja kontrole ili suda. <text:span text:style-name="T8">Ukoliko ispravljate grešku u prijavi ovo polje ostaje prazno.</text:span></text:p>
        </text:list-item>
        <text:list-item>
          <text:p text:style-name="P11"><text:soft-page-break/>OSNOV PODNOŠENJA – unosite broj osnova od 1 do 3. <text:s/>SIVOM PRAVOUGAONIKU IMATE OPISE osnova. <text:span text:style-name="T8">Ukoliko ispravljate grešku u prijavi ovo polje ostaje prazno.</text:span></text:p>
        </text:list-item>
      </text:list>
      <text:p text:style-name="P10"/>
      <text:p text:style-name="P7"><text:span text:style-name="T2">Sledeći podaci se popunjavaju kod svake prijave:</text:span></text:p>
      <text:list xml:id="list154415396068567" text:continue-list="list4166916312" text:style-name="L1">
        <text:list-item>
          <text:p text:style-name="P6">DEKLARACIJA BROJ PRIJAVE – unosite broj prijave. <text:span text:style-name="T2">Iz ovog polja podatak nema zanačaj za Poresku upravu, ali ima značaj za Vašu arhivu. Osmislite unos u ovo polje kako bi ste kasnije lakše razlikovali i pronalazili prijave u arhivi. U ovo polje možete unositi i kombinaciju brojeva i slova do 11 karaktera. Na primer: </text:span><text:span text:style-name="T4">1</text:span><text:span text:style-name="T2"> </text:span><text:span text:style-name="T4">ZARADA ili JANUAR ZAR.,</text:span></text:p>
          <text:p text:style-name="P8"><text:span text:style-name="T3">2 PORODILJ. Ili FEBR.POROD. </text:span></text:p>
        </text:list-item>
        <text:list-item>
          <text:p text:style-name="P6">VRSTA PRIJAVE - unosite jedan od ponuđenih brojeva, odnosno broj koji odgovara Vašoj prijavi.<text:span text:style-name="T1"> </text:span><text:span text:style-name="T2">U</text:span><text:span text:style-name="T1"> </text:span><text:span text:style-name="T2">SIVOM PRAVOUGAONIKU IMATE OPISE PRIJAVA.</text:span></text:p>
        </text:list-item>
        <text:list-item>
          <text:p text:style-name="P6">GODINA - unosite godinu za koju predajete prijavu.</text:p>
        </text:list-item>
        <text:list-item>
          <text:p text:style-name="P6">ISPLATA ZA MESEC – unosite brojčanu oznaku za mesec za koji predajete prijavu. Oznaka meseca mora da se unese sa 0 ispred broja meseca ako je oznaka meseca jednocifrena.</text:p>
        </text:list-item>
        <text:list-item>
          <text:p text:style-name="P6">REDNI BROJ ISPLATE – unosite redni broj isplate.</text:p>
        </text:list-item>
        <text:list-item>
          <text:p text:style-name="P6">KONAČNA - unosite veliko slovo<text:span text:style-name="T6"> </text:span><text:span text:style-name="T9">K</text:span><text:span text:style-name="T8"> </text:span>ukoliko je Vaša isplata <text:span text:style-name="T9">konačna</text:span><text:span text:style-name="T8">,</text:span> ukoliko Vaša isplata nije konačna polje ostaje prazno.</text:p>
        </text:list-item>
        <text:list-item>
          <text:p text:style-name="P6">DATUM OBAVEZE - <text:span text:style-name="T9">NE POPUNJAVA SE KOD OPŠTE PRIJAVE.</text:span> Kod ostalih prijava unosi se datum shodno prijavi koju predajete. <text:span text:style-name="T2">Kod izmenjenie prijave unosite onaj datum koji ste uneli kao datum plaćanja na već predatoj prijav, odnosno prijavi koju menjate.</text:span></text:p>
        </text:list-item>
        <text:list-item>
          <text:p text:style-name="P6">DATUM PLAĆANJA - unosite najkasniji datum <text:span text:style-name="T2">za koji </text:span>se planira isplata <text:span text:style-name="T2">ili datum poslednjeg radnog dana meseca u kome ste u zakonskoj obavezi da predate prijavu. Kod izmenjenie prijave, ukoliko je predajete nakon isteka datuma plaćanja prijave koju menjate, morate uneti tekući datum</text:span>.</text:p>
        </text:list-item>
        <text:list-item>
          <text:p text:style-name="P6">BROJ DANA - unosite kalendarski broj dana za mesec za koji predajete prijavu.</text:p>
        </text:list-item>
        <text:list-item>
          <text:p text:style-name="P6">FOND SATI - unosite broj radnih sati za mesec za koji predajete prijavu.</text:p>
        </text:list-item>
        <text:list-item>
          <text:p text:style-name="P5"><text:span text:style-name="T7">BROJ ZAPOSLENIH – unosite broj primaoca prihoda iz prijave koju predajete.</text:span></text:p>
        </text:list-item>
      </text:list>
      <text:p text:style-name="P4"><text:span text:style-name="T7"/></text:p>
      <text:p text:style-name="P4"><draw:frame draw:style-name="fr2" draw:name="Image1" text:anchor-type="char" svg:width="17cm" svg:height="11.807cm" draw:z-index="0"><draw:image xlink:href="Pictures/10000000000007800000043828A0B9DB1F490CA0.png" xlink:type="simple" xlink:show="embed" xlink:actuate="onLoad" draw:mime-type="image/png"/></draw:frame></text:p>
      <text:p text:style-name="P4"><text:soft-page-break/><text:s/>Kliknite sada na IZLAZ pa na dugme PORESKA PRIJAVA PPP-PD. </text:p>
      <text:p text:style-name="P4"><text:tab/></text:p>
      <text:p text:style-name="P4">Sada ste u tabeli PREUZIMANJE ZARADA I PPP-PD . </text:p>
      <text:p text:style-name="P4"><text:tab/>Ukoliko je tabela popunjena kliknite na dugme BRIŠI SVE, pa na dugme </text:p>
      <text:p text:style-name="P4">PARAMETRI PRENOSA. </text:p>
      <text:p text:style-name="P4"><text:tab/>Ukoliko je tabela prazna kliknite na dugme PARAMETRI PRENOSA. </text:p>
      <text:p text:style-name="P4"><text:tab/>Otvoili ste tabelu PARAMETRI PRENOSA. Kliknite na dugme BRIŠI SVE pa na dugme </text:p>
      <text:p text:style-name="P4">DODAJ SVE . <text:tab/></text:p>
      <text:p text:style-name="P4"><text:tab/>Sada u tabeli kliknite na red, <text:span text:style-name="T2">koji sadrži opis vašeg obračuna </text:span>i unesite podatak </text:p>
      <text:p text:style-name="P4">ISPLATA - <text:s/>broj isplate i MESEC – broj meseca. <text:span text:style-name="T2">U našem primeru je prva isplata </text:span>REDOVN<text:span text:style-name="T2">E</text:span> ZARAD<text:span text:style-name="T2">E ZA MESEC JANUAR.</text:span> Ovi podaci moraju da budu isti kao u PARMETRIMA 1, <text:span text:style-name="T2">kada prijavu formirate za zaradu, porodilje, bolovanje invalide, prntionere i ugovore o delu, odnodsno isti kao podaci u tabelama drugih prihoda u poljima </text:span><text:span text:style-name="T4">isplata i mesec</text:span><text:span text:style-name="T6">.</text:span> </text:p>
      <text:p text:style-name="P4"><text:tab/>Kliknite na KRSIĆ da bi ste se vratili u tabelu PREUZIMANJE ZARADA I PPP-PD. <draw:frame draw:style-name="fr1" draw:name="Image2" text:anchor-type="char" svg:x="0cm" svg:y="1.672cm" svg:width="17cm" svg:height="15.997cm" draw:z-index="1"><draw:image xlink:href="Pictures/100000000000078000000438F70116EE268F1C3E.png" xlink:type="simple" xlink:show="embed" xlink:actuate="onLoad" draw:mime-type="image/png"/></draw:frame>Kliknite na dugme PREUZMI ZARADE. Dobili ste podatke iz obračuna ZARADA. </text:p>
      <text:p text:style-name="P4"/>
      <text:p text:style-name="P4"/>
      <text:p text:style-name="P4"><text:tab/>Sada kliknite na dugme NAPRAVI XML i predajte <text:span text:style-name="T2">povežite se sa portalom Poreske uprave i predajte </text:span>prijavu.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none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none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8-06-07T11:40:13.62</meta:creation-date>
    <dc:date>2023-05-31T15:44:15.016000000</dc:date>
    <meta:editing-duration>PT5H26M57S</meta:editing-duration>
    <meta:editing-cycles>2</meta:editing-cycles>
    <meta:generator>LibreOffice/7.5.0.3$Windows_X86_64 LibreOffice_project/c21113d003cd3efa8c53188764377a8272d9d6de</meta:generator>
    <meta:document-statistic meta:table-count="0" meta:image-count="2" meta:object-count="0" meta:page-count="3" meta:paragraph-count="54" meta:word-count="931" meta:character-count="5634" meta:non-whitespace-character-count="4718"/>
  </office:meta>
</office:document-meta>
</file>