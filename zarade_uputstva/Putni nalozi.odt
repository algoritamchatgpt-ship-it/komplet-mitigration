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UTNI NALOZI</text:p>
      <text:p text:style-name="P1"/>
      <text:p text:style-name="P2"><text:tab/>Klikom na dugme PUTNI NALOZI otvarate tabelu PUTNI NALOZI. </text:p>
      <text:p text:style-name="P2"><text:s/></text:p>
      <text:p text:style-name="P2"><text:tab/>Dugmad koja se nalaze ispod tabele GORE, DOLE, ZADNJI I PRVI - služe za kretanje unutar tabele. Dugme </text:p>
      <text:p text:style-name="P2"/>
      <text:p text:style-name="P2"><text:tab/><text:span text:style-name="T1">DODAJ -</text:span> Služi za dodavanje novog naloga, a dugme </text:p>
      <text:p text:style-name="P2"/>
      <text:p text:style-name="P2"><text:tab/><text:span text:style-name="T1">JEDAN NALOG</text:span> – Služi za popunjavnje novootvorenog naloga ili pregled i dopunu već otvorenog naloga.</text:p>
      <text:p text:style-name="P2"/>
      <text:p text:style-name="P2"><text:tab/><text:span text:style-name="T1">PREGLED ZA PERIOD – </text:span><text:span text:style-name="T2">Služi za pregled putnih naloga.</text:span></text:p>
      <text:p text:style-name="P2"/>
      <text:p text:style-name="P3">IZRADA PUTNOG NALOGA</text:p>
      <text:p text:style-name="P3"/>
      <text:p text:style-name="P4"><text:tab/><text:span text:style-name="T2">Otvorite tabelu PUTNI NALOZI. Kliknite na dugme </text:span></text:p>
      <text:p text:style-name="P4"><text:span text:style-name="T2"/></text:p>
      <text:p text:style-name="P4"><text:span text:style-name="T2"><text:tab/></text:span>DODAJ<text:span text:style-name="T2"> pa na dugme <text:s/></text:span></text:p>
      <text:p text:style-name="P4"><text:span text:style-name="T2"/></text:p>
      <text:p text:style-name="P4"><text:span text:style-name="T2"><text:tab/></text:span>JEDAN NALOG. <text:span text:style-name="T2">Popunite podatke u datoj formi. Kliknite na dugme OBRAČUN a zatim na dugme ŠTAMPA. </text:span></text:p>
      <text:p text:style-name="P4"><text:span text:style-name="T2"/></text:p>
      <text:p text:style-name="P2"><text:tab/><text:span text:style-name="T1">PREGLED ZA PERIOD</text:span> - <text:s/><text:span text:style-name="T2">Klikom na ovo dugme otvarate podmeni PREGLED PUTNIH NALOGA ZA PERIOD. Unesite datume i kliknite na dugme PREGLED – ovaj pregled možete štampati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Title" style:family="paragraph" style:parent-style-name="Standard" style:class="chapter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zef Brnić</meta:initial-creator>
    <meta:creation-date>2018-04-11T14:48:01.19</meta:creation-date>
    <dc:date>2018-10-31T15:19:46.94</dc:date>
    <dc:creator>Jozef Brnić</dc:creator>
    <meta:editing-duration>PT8M40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12" meta:word-count="119" meta:character-count="729"/>
  </office:meta>
</office:document-meta>
</file>