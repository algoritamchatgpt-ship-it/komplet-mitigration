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fo:font-weight="bold" style:font-weight-asian="bold" style:font-weight-complex="bold"/>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line-height="100%" fo:text-align="start" style:justify-single-word="false"/>
    </style:style>
    <style:style style:name="P8" style:family="paragraph" style:parent-style-name="Standard" style:list-style-name="L2">
      <style:paragraph-properties fo:line-height="100%" fo:text-align="start" style:justify-single-word="false"/>
      <style:text-properties officeooo:paragraph-rsid="000e4d6e"/>
    </style:style>
    <style:style style:name="P9" style:family="paragraph" style:parent-style-name="Standard" style:list-style-name="L3">
      <style:paragraph-properties fo:line-height="100%" fo:text-align="start" style:justify-single-word="false"/>
    </style:style>
    <style:style style:name="P10" style:family="paragraph" style:parent-style-name="Standard" style:list-style-name="L2">
      <style:paragraph-properties fo:line-height="100%"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rfc-language-tag="sr-Latn-RS" fo:language="sr" fo:script="Latn" fo:country="RS" officeooo:rsid="000c681f"/>
    </style:style>
    <style:style style:name="T4" style:family="text">
      <style:text-properties style:rfc-language-tag="sr-Latn-RS" fo:language="sr" fo:script="Latn" fo:country="RS" fo:font-weight="bold" officeooo:rsid="000c681f" style:font-weight-asian="bold" style:font-weight-complex="bold"/>
    </style:style>
    <style:style style:name="T5" style:family="text">
      <style:text-properties officeooo:rsid="000d9149"/>
    </style:style>
    <style:style style:name="T6" style:family="text">
      <style:text-properties fo:color="#c9211e" loext:opacity="100%"/>
    </style:style>
    <style:style style:name="T7" style:family="text">
      <style:text-properties fo:color="#c9211e" loext:opacity="100%"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METRI ZA OBRAČUN </text:p>
      <text:p text:style-name="P1"/>
      <text:p text:style-name="P1"><text:span text:style-name="T1">PARAMETRI 1</text:span> – Tabela sadrži osnovne parametre za obračun.</text:p>
      <text:p text:style-name="P1"/>
      <text:list text:style-name="L1">
        <text:list-item>
          <text:list>
            <text:list-item>
              <text:p text:style-name="P6">% ZA NOĆNI RAD – 26 – važeći podatak po zakonu.</text:p>
            </text:list-item>
            <text:list-item>
              <text:p text:style-name="P6">% ZA PRODUŽEN RAD – 26 - važeći podatak po zakonu.</text:p>
            </text:list-item>
            <text:list-item>
              <text:p text:style-name="P6">% ZA PRAZNIK – 110 - važeći podatak po zakonu.</text:p>
            </text:list-item>
            <text:list-item>
              <text:p text:style-name="P6">% ZA RAD NEDELJOM – 110 - važeći podatak po zakonu.</text:p>
            </text:list-item>
            <text:list-item>
              <text:p text:style-name="P6">% ZA MINULI RAD – 0.4 - važeći podatak po zakonu.</text:p>
            </text:list-item>
            <text:list-item>
              <text:p text:style-name="P6">% ZA BOLOVANJE – 65 -važeći podatak po zakonu.</text:p>
            </text:list-item>
            <text:list-item>
              <text:p text:style-name="P6">% ZA PLAĆENO ODSUSTVO – 45 - važeći podatak po zakonu.</text:p>
            </text:list-item>
            <text:list-item>
              <text:p text:style-name="P6">% ZA SUSPENZIJU – podatak unosite shodno odluci firme – PROCENAT SUSPENZIJE. <text:span text:style-name="T3">Za korišćenje ove opcije morate utvrditi procentualni iznos časova za koje se obračunava suspenzija ( shodno ukupnom broju časova za koji radite obračun ) i u PLATNOM SPISKU u KATRICI F7 u polje SUSPENZIJA morate uneti iznos časova suspenzije sa negativnim predznakom. Ova opcija je predviđena za </text:span><text:span text:style-name="T4">BRUTO OBRAČUN. </text:span></text:p>
            </text:list-item>
            <text:list-item>
              <text:p text:style-name="P6">% ZA BENEFICIJU 12 MESECI – 3.4 - važeći podatak po zakonu.</text:p>
            </text:list-item>
            <text:list-item>
              <text:p text:style-name="P6">% ZA BENEFICIJU 13 MESECI – 5.4 - važeći podatak po zakonu.</text:p>
            </text:list-item>
            <text:list-item>
              <text:p text:style-name="P6">% ZA BENEFICIJU 14 MESECI – 6.9 - važeći podatak po zakonu.</text:p>
            </text:list-item>
            <text:list-item>
              <text:p text:style-name="P6">% ZA BENEFICIJU 15 MESECI – 10.3 - važeći podatak po zakonu.</text:p>
            </text:list-item>
          </text:list>
        </text:list-item>
      </text:list>
      <text:p text:style-name="P2"/>
      <text:p text:style-name="P3"><text:tab/>Prethodne podatke u <text:span text:style-name="T1">PARAMETRIMA 1</text:span> menjate u skladu sa zakonom.</text:p>
      <text:p text:style-name="P3"><text:tab/></text:p>
      <text:p text:style-name="P3"><text:tab/>- <text:s text:c="4"/>KOEFICIJENT STARTA - <text:s/>Koristi se samo ukoliko je u firmi definisan koeficijent starta <text:tab/> <text:s text:c="5"/>i koeficijent radnog mesta kroz Pravilnik o radu i Ugovor o radu. U obračunu cena <text:s text:c="4"/><text:tab/> <text:s text:c="5"/>rada je 1, a koeficijent radnog mesta množi se sa koeficijentom starta da bi izračunao <text:tab/> <text:s text:c="5"/>osnovnu zaradu.</text:p>
      <text:list xml:id="list3954196072" text:style-name="L2">
        <text:list-item>
          <text:list>
            <text:list-item>
              <text:p text:style-name="P7">MINULI RAD – U prazno polje unosite oznaku 0, 1, 2 ili 3.</text:p>
            </text:list-item>
          </text:list>
        </text:list-item>
      </text:list>
      <text:p text:style-name="P3"/>
      <text:list xml:id="list152416146080950" text:continue-numbering="true" text:style-name="L2">
        <text:list-item>
          <text:p text:style-name="P7">NA START = 0 - obračunava minuli rada na osnovnu zaradu po učinku u BRUTO obračunu, u NETO obračunu isključuje obračun minulog rada.</text:p>
        </text:list-item>
        <text:list-item>
          <text:p text:style-name="P7">NA SVA PRIMANJA = 1 - obračunava minuli rad na sva primanja U BRUTO i u NETO obračunu.</text:p>
        </text:list-item>
        <text:list-item>
          <text:p text:style-name="P7">NA PRIMANJA = 2 - obračunava minuli rada na osnovnu zaradu po učinku u BRUTO i u NETO obračunu.</text:p>
        </text:list-item>
        <text:list-item>
          <text:p text:style-name="P7">NA NETO OBRAČUN = 3 – Koristi se isključivo u <text:span text:style-name="T1">NETO OBRAČUNU</text:span> <text:span text:style-name="T1">BUDŽETSKIH FIRMI – posebno uputstvo.</text:span></text:p>
          <text:list>
            <text:list-item>
              <text:list>
                <text:list-header>
                  <text:p text:style-name="P10"/>
                  <text:p text:style-name="P7">Unosom odgovarajuće oznake 0, 1 ili 2 birate na koja primanja ćete obračunavati minuli rad u skladu sa odlukom firme. Naša preporuka je da izaberete opciju MINULI RAD NA START = 0 u BRUTO obračunu ili NA PRIMANJA = 2 u NETO obračunu.</text:p>
                  <text:p text:style-name="P7"><text:s/></text:p>
                </text:list-header>
              </text:list>
            </text:list-item>
            <text:list-item>
              <text:p text:style-name="P7">MINIMALNA ZARADA – Unosite bruto iznos minimalne zarade za mesec za koji radite obračun shodno važećim zakonskim podacima i Vašim obračunom bruto ili neto. Ukoliko radite bruto obračun unosite bruto iznos minimalne zarade, a ukoliko radite neto obračun unosite iznos neto minimlne zarade za određeni mesec.</text:p>
            </text:list-item>
            <text:list-item>
              <text:p text:style-name="P7">PROSEČNA BRUTO PLATA – <text:span text:style-name="T5">Obavezan podatak – bez njega ne obračunava doprinose. </text:span>Unesite iznos prosečne bruto zarade shodno važećim zakonskim podacima. Ovaj podatak je značajan za obračun zarada čiji iznos prelazi najvišu osnovicu za obarčun doprinosa. Program automatski poredi petosruki iznos prosečne bruto zarade sa <text:soft-page-break/>iznosom bruto zarade zaposlenih pri obračunu doprinosa. Ukoliko je iznos bruto zarade veći od najviše osnovice, doprinosi će biti obračunati na najvišu osnovicu. </text:p>
            </text:list-item>
            <text:list-item>
              <text:p text:style-name="P8">ZARADA PO SATU – Koristi se za NETO obračun zarade koja je definisana preko cene rada po času. <text:span text:style-name="T1">ISKLJUČIVO NETO OBRAČUN. BUDŽET</text:span></text:p>
            </text:list-item>
            <text:list-item>
              <text:p text:style-name="P8">TOPLI OBROK PO DANU - Ne koristi se. polje uvek ostaje prazno. <text:span text:style-name="T1">BUDŽET</text:span></text:p>
            </text:list-item>
            <text:list-item>
              <text:p text:style-name="P7">REGRES ZA MESEC - NE KORISTI SE. POLJE UVEK OSTAJE PRAZNO.</text:p>
            </text:list-item>
            <text:list-item>
              <text:p text:style-name="P7">VRSTA ZARADE II D/N -NE KORISTI SE. <text:span text:style-name="T6">POLJE UVEK OSTAJE PRAZNO.</text:span></text:p>
            </text:list-item>
            <text:list-item>
              <text:p text:style-name="P7">SOLIDARNI POREZ - NE KORISTI SE. Stope poreza – <text:s/>uvek nula.</text:p>
            </text:list-item>
          </text:list>
        </text:list-item>
      </text:list>
      <text:p text:style-name="P3"/>
      <text:p text:style-name="P3"><text:tab/>Levi deo tabele sadrži procente doprinosa, na teret radnika i na teret poslodavca, za različite vrste obračuna. Unete vrednosti se mogu menjati ukoliko se promeni zakon.</text:p>
      <text:p text:style-name="P3"/>
      <text:list xml:id="list3077968087" text:style-name="L3">
        <text:list-item>
          <text:list>
            <text:list-item>
              <text:p text:style-name="P9">% POREZA NA ZARADE – Unet je zakonom propisan procenat poreza na zarade. Može se menjati u skladu sa zakonom.</text:p>
            </text:list-item>
          </text:list>
        </text:list-item>
      </text:list>
      <text:p text:style-name="P3"><text:tab/></text:p>
      <text:p text:style-name="P3"><text:tab/><text:span text:style-name="T1">UPUTSTAVA ZA SLEDEĆA POLJA VAŽE ISKLJUČIVO </text:span><text:span text:style-name="T7">ZA BUDŽETSKE KORISNIKE.</text:span><text:span text:style-name="T1"> KOD OSTALIH OSTAJU NEPOPUNJENA – PRAZNA POLJA.</text:span></text:p>
      <text:list xml:id="list152414924021066" text:continue-numbering="true" text:style-name="L3">
        <text:list-item>
          <text:list>
            <text:list-header>
              <text:p text:style-name="P9"><text:s/></text:p>
            </text:list-header>
            <text:list-item>
              <text:p text:style-name="P9">% UMANJENJA – Unosi se procent umanjenja. </text:p>
            </text:list-item>
            <text:list-item>
              <text:p text:style-name="P9">ZAŠIĆENI IZNOS – Unosi se zaštićeni iznos. </text:p>
            </text:list-item>
            <text:list-item>
              <text:p text:style-name="P9">NAČIN 0/1 – Ukoliko ostavite prazno polje ili unesete nulu ( 0 ) umanjenje će biti obračunato na SVA PRIMANJA. Ukoliko u ovo polje unesete jedinicu ( 1 ) umanjenje neće biti obračunato na naknade zarada.</text:p>
            </text:list-item>
          </text:list>
        </text:list-item>
      </text:list>
      <text:p text:style-name="P3"/>
      <text:p text:style-name="P3"/>
      <text:p text:style-name="P5">PARAMETRI 2</text:p>
      <text:p text:style-name="P4"/>
      <text:p text:style-name="P4"/>
      <text:p text:style-name="P3"><text:tab/>VRSTA ISPLATE – Za vrstu isplate koristite jednu od ponuđenih opcija u skladu sa obračunom koji radite. Obavezno u EVIDENCIJI ZAPOSLENIH polje VRSTA obeležite odgovarajućim slovom ( P, B, I, R ili U ), kod onih radnika koje treba da unesete u platni spisak odgovarajućeg obračuna. Kod REDOVNE ZARADE u EVIDENCIJI ZAPOSLENIH polje VRSTA je nepopunjeno. Ovde unosite jedan od ponuđenih brojeva, shodno obračunu koji radite:</text:p>
      <text:p text:style-name="P3"><text:tab/><text:tab/>1 = REDOVNA</text:p>
      <text:p text:style-name="P3"><text:tab/><text:tab/>2 = PODODILJE</text:p>
      <text:p text:style-name="P3"><text:tab/><text:tab/>3 = BOLOVANJE</text:p>
      <text:p text:style-name="P3"><text:tab/><text:tab/>4 = INVALIDI</text:p>
      <text:p text:style-name="P3"><text:tab/><text:tab/>5 = PENZIONERI</text:p>
      <text:p text:style-name="P3"><text:tab/><text:tab/>6 = UGOVOR O DELU</text:p>
      <text:p text:style-name="P3"><text:tab/>REDNI BROJ MESECA – Unosite broj meseca. Program vam omogućava da za jedan isti mesec možete raditi <text:span text:style-name="T1">ČETIRI</text:span> iste VRSTE ISPLATA, za različite grupe radnika, kroz različito obeležavanje jednog istog meseca. Npr. Mesec januar obeležavate brojevima<text:span text:style-name="T1">:</text:span> <text:span text:style-name="T1">1</text:span>, <text:span text:style-name="T1">13</text:span> ( 1+12), <text:span text:style-name="T1">25</text:span> ( 13+12) i <text:span text:style-name="T1">37</text:span> ( 25+12 ). Mesec februrar obeležavate brojevima<text:span text:style-name="T1">: 2, 14, 26 i 38 , </text:span><text:span text:style-name="T2">mesec avgust obeležavate brojevima </text:span><text:span text:style-name="T1">8, 20, 32 i 44 </text:span><text:span text:style-name="T2">itd. Npr. mesec koji ste obeležili kao januar 1 je obračun porodiljskog bolovanja za januar za jednu porodilju, mesec koji ste obeležili kao januar 13 je obračun zarada za drugu porodilju kojoj je rešenje za porodiljsko stiglo nakon isplate porodiljskog bolovanja za prvu porodilju. Ova opcija je korisna i u slučaju potrebe za obračunom zarade zaposlenog koga ste iz nekog razloga izostavili sa platnog spiska već završenog obračuna, a nećete da menjate već predatu PPP-PD. Korisna je i za obračune bolovanja preko 30 dana kada imate više zaposlenih u istom mesecu, a rešenja ste dobili u različito vreme i nakon završenog obračuna itd. Za obračun zarada sa olakšicama, gde poreska uprava traži da se obračun zarada zaposlenih za koje koristite olakšicu preda kroz posebnu PPPD prijavu, koristite ovu opciju. <text:s text:c="4"/></text:span></text:p>
      <text:p text:style-name="P3"><text:soft-page-break/><text:tab/>NAZIV MESECA – Popunjava se automatski popunjavanjem prethodnog polja.</text:p>
      <text:p text:style-name="P3"><text:tab/>DATUM PRVE ISPLATE – Unosite datum prve isplate zarade ili datum jedine isplate ukoliko zaradu isplaćujete u celini kroz jednu isplatu. Ukoliko želite da radite automatsko knjiženje zarade datum mora biti datum knjiženja.</text:p>
      <text:p text:style-name="P3"><text:tab/>DATUM DRUGE ISPLATE - <text:s/>Unosite datum druge isplate zarade, ukoliko radite drugu isplatu. </text:p>
      <text:p text:style-name="P3"><text:tab/>DATUM TREĆE ISPLATE - Unosite datum treće isplate zarade, ukoliko radite treću isplatu. </text:p>
      <text:p text:style-name="P3"><text:tab/>DATUM ČETVTE ISPLATE – Unosite datum četvrte isplate zarade, ukoliko radite četvrtu <text:s/>isplatu.</text:p>
      <text:p text:style-name="P3"><text:tab/>GODINA – Unosite tekuću godinu na početku godine.</text:p>
      <text:p text:style-name="P3"><text:tab/>KALENDARSKI BROJ DANA – Popunjava se automatski unosom broja meseca.</text:p>
      <text:p text:style-name="P3"><text:tab/>ČASOVI PRAZNIKA – Unosite časove praznika ukoliko ih ima u izabranom mesecu i umanjujete broj RADNIH SATI za broj časova praznika.</text:p>
      <text:p text:style-name="P3"><text:tab/>ZAKONSKI BROJ SATI – Popunjava se automatski izborom meseca u skladu sa tekućom godinom. </text:p>
      <text:p text:style-name="P3"><text:tab/>RADNI SATI U MESECU - Popunjava se automatski izborom meseca u skladu sa tekućom godinom. Ukoliko ste uneli ČASOVE PRAZNIKA ovaj podatak morate korigovati, onosno umanjiti za broj časova praznika.</text:p>
      <text:p text:style-name="P3"><text:tab/>KONAČNA ISPLATA D/N – <text:span text:style-name="T1">Unosite slovo D</text:span> ukoliko radite samo jednu isplatu kao konačnu ili radite konačnu isplatu nakon prve ili druge isplate. Unosite slovo N ukoliko radite isplatu koja nije konačna.</text:p>
      <text:p text:style-name="P3"><text:tab/>SATI NAKNADA POSEBNO D/N – <text:span text:style-name="T7">Ne koristi se – ostaje nepopunjeno.</text:span></text:p>
      <text:p text:style-name="P3"><text:tab/>OZNAKA 1 – <text:span text:style-name="T1">Uvek ostaje 1.</text:span></text:p>
      <text:p text:style-name="P3"><text:tab/>NAJNIŽA OSNOVICA – Unosite iznos najniže propisane osnovice za doprinose.</text:p>
      <text:p text:style-name="P3"><text:tab/>POČETNI DATUM – Unosite 01.01. tekuće godine.</text:p>
      <text:p text:style-name="P3"><text:tab/>ZADNJI DATUM- Unosite 31.12. tekuće godine.</text:p>
      <text:p text:style-name="P3"/>
      <text:p text:style-name="P3"><text:tab/>Sledeća tabela je opciona. Možete je koristiti ukoliko se ukaže poteba za definisanjem naziva primanja koja se javljaju jednokratno ili periodično, da ne bi ste pamtili o kom primanju se radi. U polje unosite naziv primanja, koji će se kasnije videti u KARTICI ZAPOSLENOG u okviru PLATNOG SPISKA i na LISTIĆU ( OBRAZAC OZ 7 ). Podatak o časovima za ova primanja unosite kasnije u okviru platnog spiska. Odnosi se samo na primanja koja su definisana preko časova i cene rada, a nisu obuhvaćena primanjima u KARTICI ZAPOSLENOG u okviru PLATNOG SPISKA i na koja morate da platite porez i doprinose. </text:p>
      <text:p text:style-name="P3"><text:s/></text:p>
      <text:p text:style-name="P3"><text:tab/>PRIMANJA 1 – <text:s/>brišete dati tekst i ukucate svoj naziv.</text:p>
      <text:p text:style-name="P3"><text:tab/>PRIMANJA 2 - <text:s text:c="12"/>- <text:s text:c="3"/><text:span text:style-name="T1">//</text:span> <text:s text:c="3"/>-</text:p>
      <text:p text:style-name="P3"><text:tab/>PRIMANJA 3 - <text:s text:c="12"/>- <text:s text:c="3"/><text:span text:style-name="T1">//</text:span> <text:s text:c="3"/>-</text:p>
      <text:p text:style-name="P3"><text:tab/>PRIMANJA 4 - <text:s text:c="12"/>- <text:s text:c="3"/><text:span text:style-name="T1">//</text:span> <text:s text:c="3"/>-</text:p>
      <text:p text:style-name="P3"><text:tab/>TERENSKI – Terenski dodatak – ostaje naziv.</text:p>
      <text:p text:style-name="P3"/>
      <text:p text:style-name="P3"><text:tab/>Evidencija obustava takođe vam ostavlja slobodu u definisanju naziva same obustave. <text:s/>Možete je koristiti ukoliko se ukaže poteba za definisanjem naziva obustava koje se javljaju jednokratno ili periodično, ne preporučujemo unos kredita kroz ovu opciju. Za KREDITE postoji poseban deo programa. Tekstualni unos – brišete dati tekst i ukucate svoj naziv obustave. Iznose obustava unosite kasnije u okviru PLATNOG SPISKA u KARTICI ZAPOSLENOG. Ovu opciju preporučujemo za jednokratne obustave. Za ostake obustave koristiti opciju KREDITI. </text:p>
      <text:p text:style-name="P3"/>
      <text:p text:style-name="P3"><text:tab/>OSTALE OBUSTAVE 1 – Npr. Sudska taksa. <text:s/></text:p>
      <text:p text:style-name="P3"><text:tab/>OSTALE OBUSTAVE 2 - </text:p>
      <text:p text:style-name="P3"><text:tab/>OSTALE OBUSTAVE 3 - </text:p>
      <text:p text:style-name="P3"><text:tab/>OSTALE OBUSTAVE 4 - </text:p>
      <text:p text:style-name="P3"><text:soft-page-break/><text:tab/>OSTALE OBUSTAVE 5 - </text:p>
      <text:p text:style-name="P3"><text:tab/>OSTALE OBUSTAVE 6 -</text:p>
      <text:p text:style-name="P3"/>
      <text:p text:style-name="P3"><text:tab/>Sledeću tabelu popunjavate prema potrebi i zakonskim propisima.</text:p>
      <text:p text:style-name="P3"/>
      <text:p text:style-name="P3"><text:tab/>DOPRINOSI KOMORI SRBIJE – Unosi se propisani procenat.</text:p>
      <text:p text:style-name="P3"><text:tab/>DOPRINOSI KOMORI REGIONA - Unosi se propisani procenat.</text:p>
      <text:p text:style-name="P3"><text:tab/>AKTIVNI TEKUĆI RAČUN – Unosi se šifra tekućeg računa koju ste odredili u tabeli PODACI O FIRMI. Ukoliko imate jedan tekući račun polje može ostati bez podatka. Ukoliko imate više tekućih računa obavezno im dodelite šifre i obeležite ovo polje šifrom računa koji ćete koristiti za isplatu zarade. Ukoliko imate više tekućih računa, a niste im dodelili šifre ili niste popunili ovo polje, program će preuzimati prvi tekući račun iz PODATAKA O FIRMI.</text:p>
      <text:p text:style-name="P3"><text:tab/>IZNOS ZARADE BEZ DOPRINOSA <text:s/>- Unosite propisani iznos zarade na koji se ne obračunavaju doprinosi, <text:span text:style-name="T6">ukoliko postoji</text:span>.</text:p>
      <text:p text:style-name="P3"><text:tab/>IZNOS ZARADE BEZ POREZA – Unosite propisani neoporezivi iznos zarade, <text:span text:style-name="T6">ukoliko postoji.</text:span></text:p>
      <text:p text:style-name="P3"><text:tab/>OSLOBAĐANJE SRAZMERNO ČASOVIMA RADA D/N – Unoste D, da bi poresko oslobođenje ili oslobođenje doprinosa, bilo obračunato proporcionalno časovima rada. <text:s text:c="2"/></text:p>
      <text:p text:style-name="P3"><text:tab/>DECIMALE *=D – Unosite * ako hoćete da iznosi u obračunima budu sa decimalama. Ako hoćete zaokružene iznose polje ostaje prazno – ne popunjavate ga. Naša preporuka je da unesete *, zato što Poreska uprava koristi decimale u kontroli PPPD prijava.</text:p>
      <text:p text:style-name="P3"><text:tab/>DATUM POČETKA OBAVLJANJA DELATNOSTI – Unosi se datum upisa u APR.</text:p>
      <text:p text:style-name="P3"><text:tab/>BROJ NOVOZAPOSLENIH ZA KOJE SE VEĆ KORISTI <text:span text:style-name="T1">PORESKA OLAKŠICA </text:span>– Unosite broj ukoliko imate zaposlene za koje ste koristili neku od propisanih olakšica.</text:p>
      <text:p text:style-name="P3"><text:tab/>BROJ ZAPOSLENIH NA DAN 01.01. - Unosite broj.</text:p>
      <text:p text:style-name="P3"><text:tab/>BROJ ZAPOSLENIH NA DAN ZASNIVANJA RO SA NOVIM RADNIKOM - Unosite broj zaposlenih na dan zasnivanja radnog odnosa sa novim radnikom za koga ćete koristiti olakšice.</text:p>
      <text:p text:style-name="P3"><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class="chapter">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zef Brnić</meta:initial-creator>
    <meta:creation-date>2018-03-20T12:37:43.20</meta:creation-date>
    <dc:date>2024-02-06T15:24:14.780000000</dc:date>
    <meta:editing-duration>PT21H55M18S</meta:editing-duration>
    <meta:editing-cycles>24</meta:editing-cycles>
    <meta:generator>LibreOffice/7.5.0.3$Windows_X86_64 LibreOffice_project/c21113d003cd3efa8c53188764377a8272d9d6de</meta:generator>
    <meta:printed-by>Jozef Brnić</meta:printed-by>
    <meta:print-date>2019-11-20T10:55:03.36</meta:print-date>
    <meta:document-statistic meta:table-count="0" meta:image-count="0" meta:object-count="0" meta:page-count="4" meta:paragraph-count="92" meta:word-count="1667" meta:character-count="10419" meta:non-whitespace-character-count="8634"/>
  </office:meta>
</office:document-meta>
</file>